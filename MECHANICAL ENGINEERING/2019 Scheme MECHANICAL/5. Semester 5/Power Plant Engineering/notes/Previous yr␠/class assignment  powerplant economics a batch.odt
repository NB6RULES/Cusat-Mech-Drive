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125cm" style:rel-column-width="8191*"/>
    </style:style>
    <style:style style:name="Table1.G" style:family="table-column">
      <style:table-column-properties style:column-width="2.125cm" style:rel-column-width="8194*"/>
    </style:style>
    <style:style style:name="Table1.H" style:family="table-column">
      <style:table-column-properties style:column-width="2.125cm" style:rel-column-width="8195*"/>
    </style:style>
    <style:style style:name="Table1.A1" style:family="table-cell">
      <style:table-cell-properties fo:padding="0.097cm" fo:border-left="0.5pt solid #000000" fo:border-right="none" fo:border-top="0.5pt solid #000000" fo:border-bottom="0.5pt solid #000000" style:writing-mode="page"/>
    </style:style>
    <style:style style:name="Table1.H1" style:family="table-cell">
      <style:table-cell-properties fo:padding="0.097cm" fo:border="0.5pt solid #000000" style:writing-mode="page"/>
    </style:style>
    <style:style style:name="Table1.A2" style:family="table-cell">
      <style:table-cell-properties fo:padding="0.097cm" fo:border-left="0.5pt solid #000000" fo:border-right="none" fo:border-top="none" fo:border-bottom="0.5pt solid #000000" style:writing-mode="page"/>
    </style:style>
    <style:style style:name="Table1.H2" style:family="table-cell">
      <style:table-cell-properties fo:padding="0.097cm" fo:border-left="0.5pt solid #000000" fo:border-right="0.5pt solid #000000" fo:border-top="none" fo:border-bottom="0.5pt solid #000000" style:writing-mode="page"/>
    </style:style>
    <style:style style:name="Table3" style:family="table">
      <style:table-properties style:width="17cm" table:align="margins"/>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A1" style:family="table-cell">
      <style:table-cell-properties fo:padding="0.097cm" fo:border-left="0.5pt solid #000000" fo:border-right="none" fo:border-top="0.5pt solid #000000" fo:border-bottom="0.5pt solid #000000" style:writing-mode="page"/>
    </style:style>
    <style:style style:name="Table3.D1" style:family="table-cell">
      <style:table-cell-properties fo:padding="0.097cm" fo:border="0.5pt solid #000000" style:writing-mode="page"/>
    </style:style>
    <style:style style:name="Table3.A2" style:family="table-cell">
      <style:table-cell-properties fo:padding="0.097cm" fo:border-left="0.5pt solid #000000" fo:border-right="none" fo:border-top="none" fo:border-bottom="0.5pt solid #000000" style:writing-mode="page"/>
    </style:style>
    <style:style style:name="Table3.D2" style:family="table-cell">
      <style:table-cell-properties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F" style:family="table-column">
      <style:table-column-properties style:column-width="2.835cm" style:rel-column-width="10925*"/>
    </style:style>
    <style:style style:name="Table2.A1" style:family="table-cell">
      <style:table-cell-properties fo:padding="0.097cm" fo:border-left="0.5pt solid #000000" fo:border-right="none" fo:border-top="0.5pt solid #000000" fo:border-bottom="0.5pt solid #000000" style:writing-mode="page"/>
    </style:style>
    <style:style style:name="Table2.F1" style:family="table-cell">
      <style:table-cell-properties fo:padding="0.097cm" fo:border="0.5pt solid #000000" style:writing-mode="page"/>
    </style:style>
    <style:style style:name="Table2.A2" style:family="table-cell">
      <style:table-cell-properties fo:padding="0.097cm" fo:border-left="0.5pt solid #000000" fo:border-right="none" fo:border-top="none" fo:border-bottom="0.5pt solid #000000" style:writing-mode="page"/>
    </style:style>
    <style:style style:name="Table2.F2" style:family="table-cell">
      <style:table-cell-properties fo:padding="0.097cm" fo:border-left="0.5pt solid #000000" fo:border-right="0.5pt solid #000000" fo:border-top="none" fo:border-bottom="0.5pt solid #000000" style:writing-mode="page"/>
    </style:style>
    <style:style style:name="Table10" style:family="table">
      <style:table-properties style:width="17cm" table:align="margins"/>
    </style:style>
    <style:style style:name="Table10.A" style:family="table-column">
      <style:table-column-properties style:column-width="2.429cm" style:rel-column-width="9362*"/>
    </style:style>
    <style:style style:name="Table10.G" style:family="table-column">
      <style:table-column-properties style:column-width="2.429cm" style:rel-column-width="9363*"/>
    </style:style>
    <style:style style:name="Table10.A1" style:family="table-cell">
      <style:table-cell-properties fo:padding="0.097cm" fo:border-left="0.5pt solid #000000" fo:border-right="none" fo:border-top="0.5pt solid #000000" fo:border-bottom="0.5pt solid #000000" style:writing-mode="page"/>
    </style:style>
    <style:style style:name="Table10.G1" style:family="table-cell">
      <style:table-cell-properties fo:padding="0.097cm" fo:border="0.5pt solid #000000" style:writing-mode="page"/>
    </style:style>
    <style:style style:name="Table10.A2" style:family="table-cell">
      <style:table-cell-properties fo:padding="0.097cm" fo:border-left="0.5pt solid #000000" fo:border-right="none" fo:border-top="none" fo:border-bottom="0.5pt solid #000000" style:writing-mode="page"/>
    </style:style>
    <style:style style:name="Table10.G2" style:family="table-cell">
      <style:table-cell-properties fo:padding="0.097cm" fo:border-left="0.5pt solid #000000" fo:border-right="0.5pt solid #000000" fo:border-top="none" fo:border-bottom="0.5pt solid #000000" style:writing-mode="page"/>
    </style:style>
    <style:style style:name="Table11" style:family="table">
      <style:table-properties style:width="17cm" table:align="margins"/>
    </style:style>
    <style:style style:name="Table11.A" style:family="table-column">
      <style:table-column-properties style:column-width="2.125cm" style:rel-column-width="8191*"/>
    </style:style>
    <style:style style:name="Table11.B" style:family="table-column">
      <style:table-column-properties style:column-width="2.125cm" style:rel-column-width="8192*"/>
    </style:style>
    <style:style style:name="Table11.A1" style:family="table-cell">
      <style:table-cell-properties fo:padding="0.097cm" fo:border-left="0.5pt solid #000000" fo:border-right="none" fo:border-top="0.5pt solid #000000" fo:border-bottom="0.5pt solid #000000" style:writing-mode="page"/>
    </style:style>
    <style:style style:name="Table11.H1" style:family="table-cell">
      <style:table-cell-properties fo:padding="0.097cm" fo:border="0.5pt solid #000000" style:writing-mode="page"/>
    </style:style>
    <style:style style:name="Table11.A2" style:family="table-cell">
      <style:table-cell-properties fo:padding="0.097cm" fo:border-left="0.5pt solid #000000" fo:border-right="none" fo:border-top="none" fo:border-bottom="0.5pt solid #000000" style:writing-mode="page"/>
    </style:style>
    <style:style style:name="Table11.H2" style:family="table-cell">
      <style:table-cell-properties fo:padding="0.097cm" fo:border-left="0.5pt solid #000000" fo:border-right="0.5pt solid #000000" fo:border-top="none" fo:border-bottom="0.5pt solid #000000" style:writing-mode="page"/>
    </style:style>
    <style:style style:name="Table6" style:family="table">
      <style:table-properties style:width="17cm" table:align="margins"/>
    </style:style>
    <style:style style:name="Table6.A" style:family="table-column">
      <style:table-column-properties style:column-width="4.249cm" style:rel-column-width="16383*"/>
    </style:style>
    <style:style style:name="Table6.D" style:family="table-column">
      <style:table-column-properties style:column-width="4.251cm" style:rel-column-width="16386*"/>
    </style:style>
    <style:style style:name="Table6.A1" style:family="table-cell">
      <style:table-cell-properties style:writing-mode="page"/>
    </style:style>
    <style:style style:name="Table12" style:family="table">
      <style:table-properties style:width="17cm" table:align="margins"/>
    </style:style>
    <style:style style:name="Table12.A" style:family="table-column">
      <style:table-column-properties style:column-width="2.429cm" style:rel-column-width="9362*"/>
    </style:style>
    <style:style style:name="Table12.G" style:family="table-column">
      <style:table-column-properties style:column-width="2.429cm" style:rel-column-width="9363*"/>
    </style:style>
    <style:style style:name="Table12.A1" style:family="table-cell">
      <style:table-cell-properties fo:padding="0.097cm" fo:border-left="0.5pt solid #000000" fo:border-right="none" fo:border-top="0.5pt solid #000000" fo:border-bottom="0.5pt solid #000000" style:writing-mode="page"/>
    </style:style>
    <style:style style:name="Table12.G1" style:family="table-cell">
      <style:table-cell-properties fo:padding="0.097cm" fo:border="0.5pt solid #000000" style:writing-mode="page"/>
    </style:style>
    <style:style style:name="Table12.A2" style:family="table-cell">
      <style:table-cell-properties fo:padding="0.097cm" fo:border-left="0.5pt solid #000000" fo:border-right="none" fo:border-top="none" fo:border-bottom="0.5pt solid #000000" style:writing-mode="page"/>
    </style:style>
    <style:style style:name="Table12.G2" style:family="table-cell">
      <style:table-cell-properties fo:padding="0.097cm" fo:border-left="0.5pt solid #000000" fo:border-right="0.5pt solid #000000" fo:border-top="none" fo:border-bottom="0.5pt solid #000000" style:writing-mode="page"/>
    </style:style>
    <style:style style:name="Table13" style:family="table">
      <style:table-properties style:width="17cm" table:align="margins"/>
    </style:style>
    <style:style style:name="Table13.A" style:family="table-column">
      <style:table-column-properties style:column-width="1.545cm" style:rel-column-width="5957*"/>
    </style:style>
    <style:style style:name="Table13.K" style:family="table-column">
      <style:table-column-properties style:column-width="1.547cm" style:rel-column-width="5965*"/>
    </style:style>
    <style:style style:name="Table13.A1" style:family="table-cell">
      <style:table-cell-properties fo:padding="0.097cm" fo:border-left="0.5pt solid #000000" fo:border-right="none" fo:border-top="0.5pt solid #000000" fo:border-bottom="0.5pt solid #000000" style:writing-mode="page"/>
    </style:style>
    <style:style style:name="Table13.K1" style:family="table-cell">
      <style:table-cell-properties fo:padding="0.097cm" fo:border="0.5pt solid #000000" style:writing-mode="page"/>
    </style:style>
    <style:style style:name="Table13.A2" style:family="table-cell">
      <style:table-cell-properties fo:padding="0.097cm" fo:border-left="0.5pt solid #000000" fo:border-right="none" fo:border-top="none" fo:border-bottom="0.5pt solid #000000" style:writing-mode="page"/>
    </style:style>
    <style:style style:name="Table13.K2" style:family="table-cell">
      <style:table-cell-properties fo:padding="0.097cm" fo:border-left="0.5pt solid #000000" fo:border-right="0.5pt solid #000000" fo:border-top="none" fo:border-bottom="0.5pt solid #000000" style:writing-mode="page"/>
    </style:style>
    <style:style style:name="Table14" style:family="table">
      <style:table-properties style:width="17cm" table:align="margins"/>
    </style:style>
    <style:style style:name="Table14.A" style:family="table-column">
      <style:table-column-properties style:column-width="2.125cm" style:rel-column-width="8191*"/>
    </style:style>
    <style:style style:name="Table14.B" style:family="table-column">
      <style:table-column-properties style:column-width="2.125cm" style:rel-column-width="8192*"/>
    </style:style>
    <style:style style:name="Table14.H" style:family="table-column">
      <style:table-column-properties style:column-width="2.125cm" style:rel-column-width="8193*"/>
    </style:style>
    <style:style style:name="Table14.A1" style:family="table-cell">
      <style:table-cell-properties fo:padding="0.097cm" fo:border-left="0.5pt solid #000000" fo:border-right="none" fo:border-top="0.5pt solid #000000" fo:border-bottom="0.5pt solid #000000" style:writing-mode="page"/>
    </style:style>
    <style:style style:name="Table14.H1" style:family="table-cell">
      <style:table-cell-properties fo:padding="0.097cm" fo:border="0.5pt solid #000000" style:writing-mode="page"/>
    </style:style>
    <style:style style:name="Table14.A2" style:family="table-cell">
      <style:table-cell-properties fo:padding="0.097cm" fo:border-left="0.5pt solid #000000" fo:border-right="none" fo:border-top="none" fo:border-bottom="0.5pt solid #000000" style:writing-mode="page"/>
    </style:style>
    <style:style style:name="Table14.H2" style:family="table-cell">
      <style:table-cell-properties fo:padding="0.097cm" fo:border-left="0.5pt solid #000000" fo:border-right="0.5pt solid #000000" fo:border-top="none" fo:border-bottom="0.5pt solid #000000" style:writing-mode="page"/>
    </style:style>
    <style:style style:name="Table15" style:family="table">
      <style:table-properties style:width="17cm" table:align="margins"/>
    </style:style>
    <style:style style:name="Table15.A" style:family="table-column">
      <style:table-column-properties style:column-width="2.125cm" style:rel-column-width="8191*"/>
    </style:style>
    <style:style style:name="Table15.H" style:family="table-column">
      <style:table-column-properties style:column-width="2.127cm" style:rel-column-width="8198*"/>
    </style:style>
    <style:style style:name="Table15.A1" style:family="table-cell">
      <style:table-cell-properties fo:padding="0.097cm" fo:border-left="0.5pt solid #000000" fo:border-right="none" fo:border-top="0.5pt solid #000000" fo:border-bottom="0.5pt solid #000000" style:writing-mode="page"/>
    </style:style>
    <style:style style:name="Table15.H1" style:family="table-cell">
      <style:table-cell-properties fo:padding="0.097cm" fo:border="0.5pt solid #000000" style:writing-mode="page"/>
    </style:style>
    <style:style style:name="Table15.A2" style:family="table-cell">
      <style:table-cell-properties fo:padding="0.097cm" fo:border-left="0.5pt solid #000000" fo:border-right="none" fo:border-top="none" fo:border-bottom="0.5pt solid #000000" style:writing-mode="page"/>
    </style:style>
    <style:style style:name="Table15.H2" style:family="table-cell">
      <style:table-cell-properties fo:padding="0.097cm" fo:border-left="0.5pt solid #000000" fo:border-right="0.5pt solid #000000" fo:border-top="none" fo:border-bottom="0.5pt solid #000000" style:writing-mode="page"/>
    </style:style>
    <style:style style:name="Table16" style:family="table">
      <style:table-properties style:width="17cm" table:align="margins"/>
    </style:style>
    <style:style style:name="Table16.A" style:family="table-column">
      <style:table-column-properties style:column-width="1.545cm" style:rel-column-width="5957*"/>
    </style:style>
    <style:style style:name="Table16.K" style:family="table-column">
      <style:table-column-properties style:column-width="1.547cm" style:rel-column-width="5965*"/>
    </style:style>
    <style:style style:name="Table16.A1" style:family="table-cell">
      <style:table-cell-properties fo:padding="0.097cm" fo:border-left="0.5pt solid #000000" fo:border-right="none" fo:border-top="0.5pt solid #000000" fo:border-bottom="0.5pt solid #000000" style:writing-mode="page"/>
    </style:style>
    <style:style style:name="Table16.K1" style:family="table-cell">
      <style:table-cell-properties fo:padding="0.097cm" fo:border="0.5pt solid #000000" style:writing-mode="page"/>
    </style:style>
    <style:style style:name="Table16.A2" style:family="table-cell">
      <style:table-cell-properties fo:padding="0.097cm" fo:border-left="0.5pt solid #000000" fo:border-right="none" fo:border-top="none" fo:border-bottom="0.5pt solid #000000" style:writing-mode="page"/>
    </style:style>
    <style:style style:name="Table16.K2" style:family="table-cell">
      <style:table-cell-properties fo:padding="0.097cm" fo:border-left="0.5pt solid #000000" fo:border-right="0.5pt solid #000000" fo:border-top="none" fo:border-bottom="0.5pt solid #000000" style:writing-mode="page"/>
    </style:style>
    <style:style style:name="Table17" style:family="table">
      <style:table-properties style:width="17cm" table:align="margins"/>
    </style:style>
    <style:style style:name="Table17.A" style:family="table-column">
      <style:table-column-properties style:column-width="2.125cm" style:rel-column-width="8191*"/>
    </style:style>
    <style:style style:name="Table17.H" style:family="table-column">
      <style:table-column-properties style:column-width="2.127cm" style:rel-column-width="8198*"/>
    </style:style>
    <style:style style:name="Table17.A1" style:family="table-cell">
      <style:table-cell-properties fo:padding="0.097cm" fo:border-left="0.5pt solid #000000" fo:border-right="none" fo:border-top="0.5pt solid #000000" fo:border-bottom="0.5pt solid #000000" style:writing-mode="page"/>
    </style:style>
    <style:style style:name="Table17.H1" style:family="table-cell">
      <style:table-cell-properties fo:padding="0.097cm" fo:border="0.5pt solid #000000" style:writing-mode="page"/>
    </style:style>
    <style:style style:name="Table17.A2" style:family="table-cell">
      <style:table-cell-properties fo:padding="0.097cm" fo:border-left="0.5pt solid #000000" fo:border-right="none" fo:border-top="none" fo:border-bottom="0.5pt solid #000000" style:writing-mode="page"/>
    </style:style>
    <style:style style:name="Table17.H2" style:family="table-cell">
      <style:table-cell-properties fo:padding="0.097cm" fo:border-left="0.5pt solid #000000" fo:border-right="0.5pt solid #000000" fo:border-top="none" fo:border-bottom="0.5pt solid #000000" style:writing-mode="page"/>
    </style:style>
    <style:style style:name="Table18" style:family="table">
      <style:table-properties style:width="17cm" table:align="margins"/>
    </style:style>
    <style:style style:name="Table18.A" style:family="table-column">
      <style:table-column-properties style:column-width="2.125cm" style:rel-column-width="8191*"/>
    </style:style>
    <style:style style:name="Table18.H" style:family="table-column">
      <style:table-column-properties style:column-width="2.127cm" style:rel-column-width="8198*"/>
    </style:style>
    <style:style style:name="Table18.A1" style:family="table-cell">
      <style:table-cell-properties fo:padding="0.097cm" fo:border-left="0.5pt solid #000000" fo:border-right="none" fo:border-top="0.5pt solid #000000" fo:border-bottom="0.5pt solid #000000" style:writing-mode="page"/>
    </style:style>
    <style:style style:name="Table18.H1" style:family="table-cell">
      <style:table-cell-properties fo:padding="0.097cm" fo:border="0.5pt solid #000000" style:writing-mode="page"/>
    </style:style>
    <style:style style:name="Table18.A2" style:family="table-cell">
      <style:table-cell-properties fo:padding="0.097cm" fo:border-left="0.5pt solid #000000" fo:border-right="none" fo:border-top="none" fo:border-bottom="0.5pt solid #000000" style:writing-mode="page"/>
    </style:style>
    <style:style style:name="Table18.H2" style:family="table-cell">
      <style:table-cell-properties fo:padding="0.097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1.545cm" style:rel-column-width="5957*"/>
    </style:style>
    <style:style style:name="Table7.K" style:family="table-column">
      <style:table-column-properties style:column-width="1.547cm" style:rel-column-width="5965*"/>
    </style:style>
    <style:style style:name="Table7.A1" style:family="table-cell">
      <style:table-cell-properties fo:padding="0.097cm" fo:border-left="0.5pt solid #000000" fo:border-right="none" fo:border-top="0.5pt solid #000000" fo:border-bottom="0.5pt solid #000000" style:writing-mode="page"/>
    </style:style>
    <style:style style:name="Table7.K1" style:family="table-cell">
      <style:table-cell-properties fo:padding="0.097cm" fo:border="0.5pt solid #000000" style:writing-mode="page"/>
    </style:style>
    <style:style style:name="Table7.A2" style:family="table-cell">
      <style:table-cell-properties fo:padding="0.097cm" fo:border-left="0.5pt solid #000000" fo:border-right="none" fo:border-top="none" fo:border-bottom="0.5pt solid #000000" style:writing-mode="page"/>
    </style:style>
    <style:style style:name="Table7.K2" style:family="table-cell">
      <style:table-cell-properties fo:padding="0.097cm" fo:border-left="0.5pt solid #000000" fo:border-right="0.5pt solid #000000" fo:border-top="none" fo:border-bottom="0.5pt solid #000000" style:writing-mode="page"/>
    </style:style>
    <style:style style:name="Table19" style:family="table">
      <style:table-properties style:width="17cm" table:align="margins"/>
    </style:style>
    <style:style style:name="Table19.A" style:family="table-column">
      <style:table-column-properties style:column-width="5.667cm" style:rel-column-width="21845*"/>
    </style:style>
    <style:style style:name="Table19.A1" style:family="table-cell">
      <style:table-cell-properties fo:padding="0.097cm" fo:border-left="0.5pt solid #000000" fo:border-right="none" fo:border-top="0.5pt solid #000000" fo:border-bottom="0.5pt solid #000000" style:writing-mode="page"/>
    </style:style>
    <style:style style:name="Table19.C1" style:family="table-cell">
      <style:table-cell-properties fo:padding="0.097cm" fo:border="0.5pt solid #000000" style:writing-mode="page"/>
    </style:style>
    <style:style style:name="Table19.A2" style:family="table-cell">
      <style:table-cell-properties fo:padding="0.097cm" fo:border-left="0.5pt solid #000000" fo:border-right="none" fo:border-top="none" fo:border-bottom="0.5pt solid #000000" style:writing-mode="page"/>
    </style:style>
    <style:style style:name="Table19.C2" style:family="table-cell">
      <style:table-cell-properties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2.429cm" style:rel-column-width="9362*"/>
    </style:style>
    <style:style style:name="Table4.G" style:family="table-column">
      <style:table-column-properties style:column-width="2.429cm" style:rel-column-width="9363*"/>
    </style:style>
    <style:style style:name="Table4.A1" style:family="table-cell">
      <style:table-cell-properties fo:padding="0.097cm" fo:border-left="0.5pt solid #000000" fo:border-right="none" fo:border-top="0.5pt solid #000000" fo:border-bottom="0.5pt solid #000000" style:writing-mode="page"/>
    </style:style>
    <style:style style:name="Table4.G1" style:family="table-cell">
      <style:table-cell-properties fo:padding="0.097cm" fo:border="0.5pt solid #000000" style:writing-mode="page"/>
    </style:style>
    <style:style style:name="Table4.A2" style:family="table-cell">
      <style:table-cell-properties fo:padding="0.097cm" fo:border-left="0.5pt solid #000000" fo:border-right="none" fo:border-top="none" fo:border-bottom="0.5pt solid #000000" style:writing-mode="page"/>
    </style:style>
    <style:style style:name="Table4.G2" style:family="table-cell">
      <style:table-cell-properties fo:padding="0.097cm" fo:border-left="0.5pt solid #000000" fo:border-right="0.5pt solid #000000" fo:border-top="none" fo:border-bottom="0.5pt solid #000000" style:writing-mode="page"/>
    </style:style>
    <style:style style:name="Table20" style:family="table">
      <style:table-properties style:width="17cm" table:align="margins"/>
    </style:style>
    <style:style style:name="Table20.A" style:family="table-column">
      <style:table-column-properties style:column-width="2.833cm" style:rel-column-width="10922*"/>
    </style:style>
    <style:style style:name="Table20.F" style:family="table-column">
      <style:table-column-properties style:column-width="2.835cm" style:rel-column-width="10925*"/>
    </style:style>
    <style:style style:name="Table20.A1" style:family="table-cell">
      <style:table-cell-properties fo:padding="0.097cm" fo:border-left="0.5pt solid #000000" fo:border-right="none" fo:border-top="0.5pt solid #000000" fo:border-bottom="0.5pt solid #000000" style:writing-mode="page"/>
    </style:style>
    <style:style style:name="Table20.F1" style:family="table-cell">
      <style:table-cell-properties fo:padding="0.097cm" fo:border="0.5pt solid #000000" style:writing-mode="page"/>
    </style:style>
    <style:style style:name="Table20.A2" style:family="table-cell">
      <style:table-cell-properties fo:padding="0.097cm" fo:border-left="0.5pt solid #000000" fo:border-right="none" fo:border-top="none" fo:border-bottom="0.5pt solid #000000" style:writing-mode="page"/>
    </style:style>
    <style:style style:name="Table20.F2" style:family="table-cell">
      <style:table-cell-properties fo:padding="0.097cm" fo:border-left="0.5pt solid #000000" fo:border-right="0.5pt solid #000000" fo:border-top="none" fo:border-bottom="0.5pt solid #000000" style:writing-mode="page"/>
    </style:style>
    <style:style style:name="Table5" style:family="table">
      <style:table-properties style:width="17cm" table:align="margins"/>
    </style:style>
    <style:style style:name="Table5.A" style:family="table-column">
      <style:table-column-properties style:column-width="2.833cm" style:rel-column-width="10922*"/>
    </style:style>
    <style:style style:name="Table5.F" style:family="table-column">
      <style:table-column-properties style:column-width="2.835cm" style:rel-column-width="10925*"/>
    </style:style>
    <style:style style:name="Table5.A1" style:family="table-cell">
      <style:table-cell-properties fo:padding="0.097cm" fo:border-left="0.5pt solid #000000" fo:border-right="none" fo:border-top="0.5pt solid #000000" fo:border-bottom="0.5pt solid #000000" style:writing-mode="page"/>
    </style:style>
    <style:style style:name="Table5.F1" style:family="table-cell">
      <style:table-cell-properties fo:padding="0.097cm" fo:border="0.5pt solid #000000" style:writing-mode="page"/>
    </style:style>
    <style:style style:name="Table5.A2" style:family="table-cell">
      <style:table-cell-properties fo:padding="0.097cm" fo:border-left="0.5pt solid #000000" fo:border-right="none" fo:border-top="none" fo:border-bottom="0.5pt solid #000000" style:writing-mode="page"/>
    </style:style>
    <style:style style:name="Table5.F2" style:family="table-cell">
      <style:table-cell-properties fo:padding="0.097cm" fo:border-left="0.5pt solid #000000" fo:border-right="0.5pt solid #000000" fo:border-top="none" fo:border-bottom="0.5pt solid #000000" style:writing-mode="page"/>
    </style:style>
    <style:style style:name="P1" style:family="paragraph" style:parent-style-name="Header">
      <style:text-properties officeooo:rsid="00779fe3" officeooo:paragraph-rsid="00779fe3"/>
    </style:style>
    <style:style style:name="P2" style:family="paragraph" style:parent-style-name="Standard">
      <style:paragraph-properties fo:text-align="center" style:justify-single-word="false"/>
      <style:text-properties fo:font-size="15pt" officeooo:rsid="0006ded2" officeooo:paragraph-rsid="0006ded2" style:font-size-asian="15pt" style:font-size-complex="15pt"/>
    </style:style>
    <style:style style:name="P3" style:family="paragraph" style:parent-style-name="Standard">
      <style:paragraph-properties fo:text-align="start" style:justify-single-word="false"/>
      <style:text-properties fo:font-size="15pt" officeooo:rsid="0006ded2" officeooo:paragraph-rsid="0006ded2" style:font-size-asian="15pt" style:font-size-complex="15pt"/>
    </style:style>
    <style:style style:name="P4" style:family="paragraph" style:parent-style-name="Standard">
      <style:paragraph-properties fo:text-align="start" style:justify-single-word="false"/>
      <style:text-properties fo:font-size="15pt" officeooo:rsid="0006ded2" officeooo:paragraph-rsid="0009554e" style:font-size-asian="15pt" style:font-size-complex="15pt"/>
    </style:style>
    <style:style style:name="P5" style:family="paragraph" style:parent-style-name="Standard">
      <style:paragraph-properties fo:text-align="start" style:justify-single-word="false"/>
      <style:text-properties fo:font-size="15pt" officeooo:rsid="0006ded2" officeooo:paragraph-rsid="0009d63c" style:font-size-asian="15pt" style:font-size-complex="15pt"/>
    </style:style>
    <style:style style:name="P6" style:family="paragraph" style:parent-style-name="Standard">
      <style:paragraph-properties fo:text-align="start" style:justify-single-word="false"/>
      <style:text-properties fo:font-size="15pt" officeooo:rsid="0006ded2" officeooo:paragraph-rsid="00705063" style:font-size-asian="15pt" style:font-size-complex="15pt"/>
    </style:style>
    <style:style style:name="P7" style:family="paragraph" style:parent-style-name="Standard">
      <loext:graphic-properties draw:fill="none"/>
      <style:paragraph-properties fo:text-align="start" style:justify-single-word="false" fo:background-color="transparent"/>
      <style:text-properties fo:font-size="15pt" officeooo:rsid="000d62b7" officeooo:paragraph-rsid="0071c7f7" style:font-size-asian="15pt" style:font-size-complex="15pt"/>
    </style:style>
    <style:style style:name="P8" style:family="paragraph" style:parent-style-name="Standard">
      <style:paragraph-properties fo:text-align="start" style:justify-single-word="false"/>
      <style:text-properties fo:font-size="15pt" officeooo:rsid="000d62b7" officeooo:paragraph-rsid="0009d63c" style:font-size-asian="15pt" style:font-size-complex="15pt"/>
    </style:style>
    <style:style style:name="P9" style:family="paragraph" style:parent-style-name="Standard">
      <loext:graphic-properties draw:fill="none"/>
      <style:paragraph-properties fo:text-align="start" style:justify-single-word="false" fo:background-color="transparent"/>
      <style:text-properties fo:font-size="15pt" officeooo:rsid="003608e2" officeooo:paragraph-rsid="003608e2" style:font-size-asian="15pt" style:font-size-complex="15pt"/>
    </style:style>
    <style:style style:name="P10" style:family="paragraph" style:parent-style-name="Standard">
      <loext:graphic-properties draw:fill="none"/>
      <style:paragraph-properties fo:text-align="start" style:justify-single-word="false" fo:background-color="transparent"/>
      <style:text-properties fo:font-size="15pt" officeooo:rsid="003608e2" officeooo:paragraph-rsid="00375724" style:font-size-asian="15pt" style:font-size-complex="15pt"/>
    </style:style>
    <style:style style:name="P11" style:family="paragraph" style:parent-style-name="Standard">
      <loext:graphic-properties draw:fill="none"/>
      <style:paragraph-properties fo:text-align="start" style:justify-single-word="false" fo:background-color="transparent"/>
      <style:text-properties fo:font-size="15pt" officeooo:rsid="003608e2" officeooo:paragraph-rsid="0082583f" style:font-size-asian="15pt" style:font-size-complex="15pt"/>
    </style:style>
    <style:style style:name="P12" style:family="paragraph" style:parent-style-name="Standard">
      <loext:graphic-properties draw:fill="none"/>
      <style:paragraph-properties fo:text-align="start" style:justify-single-word="false" fo:background-color="transparent"/>
      <style:text-properties fo:font-size="15pt" officeooo:rsid="003608e2" officeooo:paragraph-rsid="007ddef2" style:font-size-asian="15pt" style:font-size-complex="15pt"/>
    </style:style>
    <style:style style:name="P13" style:family="paragraph" style:parent-style-name="Standard">
      <style:paragraph-properties fo:text-align="start" style:justify-single-word="false"/>
      <style:text-properties fo:font-size="15pt" officeooo:rsid="0010a043" officeooo:paragraph-rsid="0010a043" style:font-size-asian="15pt" style:font-size-complex="15pt"/>
    </style:style>
    <style:style style:name="P14" style:family="paragraph" style:parent-style-name="Standard">
      <style:paragraph-properties fo:text-align="start" style:justify-single-word="false"/>
      <style:text-properties fo:font-size="15pt" officeooo:rsid="0015d37b" officeooo:paragraph-rsid="00705063" style:font-size-asian="15pt" style:font-size-complex="15pt"/>
    </style:style>
    <style:style style:name="P15" style:family="paragraph" style:parent-style-name="Standard">
      <loext:graphic-properties draw:fill="none"/>
      <style:paragraph-properties fo:text-align="start" style:justify-single-word="false" fo:background-color="transparent"/>
      <style:text-properties fo:font-size="15pt" officeooo:rsid="0015d37b" officeooo:paragraph-rsid="00705063" style:font-size-asian="15pt" style:font-size-complex="15pt"/>
    </style:style>
    <style:style style:name="P16" style:family="paragraph" style:parent-style-name="Standard">
      <loext:graphic-properties draw:fill="none"/>
      <style:paragraph-properties fo:text-align="start" style:justify-single-word="false" fo:background-color="transparent"/>
      <style:text-properties fo:font-size="15pt" officeooo:rsid="0015d37b" officeooo:paragraph-rsid="0069d7c4" style:font-size-asian="15pt" style:font-size-complex="15pt"/>
    </style:style>
    <style:style style:name="P17" style:family="paragraph" style:parent-style-name="Standard">
      <loext:graphic-properties draw:fill="none"/>
      <style:paragraph-properties fo:text-align="start" style:justify-single-word="false" fo:background-color="transparent"/>
      <style:text-properties fo:font-size="15pt" officeooo:rsid="0015d37b" officeooo:paragraph-rsid="0082583f" style:font-size-asian="15pt" style:font-size-complex="15pt"/>
    </style:style>
    <style:style style:name="P18" style:family="paragraph" style:parent-style-name="Standard">
      <loext:graphic-properties draw:fill="none"/>
      <style:paragraph-properties fo:text-align="start" style:justify-single-word="false" fo:background-color="transparent"/>
      <style:text-properties fo:font-size="15pt" officeooo:rsid="0015d37b" officeooo:paragraph-rsid="007aa0a6" style:font-size-asian="15pt" style:font-size-complex="15pt"/>
    </style:style>
    <style:style style:name="P19" style:family="paragraph" style:parent-style-name="Standard">
      <loext:graphic-properties draw:fill="none"/>
      <style:paragraph-properties fo:text-align="start" style:justify-single-word="false" fo:background-color="transparent"/>
      <style:text-properties fo:font-size="15pt" officeooo:rsid="0015d37b" officeooo:paragraph-rsid="007ddef2" style:font-size-asian="15pt" style:font-size-complex="15pt"/>
    </style:style>
    <style:style style:name="P20" style:family="paragraph" style:parent-style-name="Standard">
      <loext:graphic-properties draw:fill="none"/>
      <style:paragraph-properties fo:text-align="start" style:justify-single-word="false" fo:background-color="transparent"/>
      <style:text-properties fo:font-size="15pt" officeooo:rsid="00328239" officeooo:paragraph-rsid="00328239" style:font-size-asian="15pt" style:font-size-complex="15pt"/>
    </style:style>
    <style:style style:name="P21" style:family="paragraph" style:parent-style-name="Standard">
      <loext:graphic-properties draw:fill="none"/>
      <style:paragraph-properties fo:text-align="start" style:justify-single-word="false" fo:background-color="transparent"/>
      <style:text-properties fo:font-size="15pt" officeooo:rsid="00328239" officeooo:paragraph-rsid="006cf741" style:font-size-asian="15pt" style:font-size-complex="15pt"/>
    </style:style>
    <style:style style:name="P22" style:family="paragraph" style:parent-style-name="Standard">
      <loext:graphic-properties draw:fill="none"/>
      <style:paragraph-properties fo:text-align="start" style:justify-single-word="false" fo:background-color="transparent"/>
      <style:text-properties fo:font-size="15pt" officeooo:rsid="0034eac7" officeooo:paragraph-rsid="0034eac7" style:font-size-asian="15pt" style:font-size-complex="15pt"/>
    </style:style>
    <style:style style:name="P23" style:family="paragraph" style:parent-style-name="Standard">
      <loext:graphic-properties draw:fill="none"/>
      <style:paragraph-properties fo:text-align="start" style:justify-single-word="false" fo:background-color="transparent"/>
      <style:text-properties fo:font-size="15pt" officeooo:rsid="0034eac7" officeooo:paragraph-rsid="0073add2" style:font-size-asian="15pt" style:font-size-complex="15pt"/>
    </style:style>
    <style:style style:name="P24" style:family="paragraph" style:parent-style-name="Standard">
      <loext:graphic-properties draw:fill="none"/>
      <style:paragraph-properties fo:text-align="start" style:justify-single-word="false" fo:background-color="transparent"/>
      <style:text-properties fo:font-size="15pt" officeooo:rsid="0034eac7" officeooo:paragraph-rsid="003608e2" style:font-size-asian="15pt" style:font-size-complex="15pt"/>
    </style:style>
    <style:style style:name="P25" style:family="paragraph" style:parent-style-name="Standard">
      <loext:graphic-properties draw:fill="none"/>
      <style:paragraph-properties fo:text-align="start" style:justify-single-word="false" fo:background-color="transparent"/>
      <style:text-properties fo:font-size="15pt" officeooo:rsid="0034eac7" officeooo:paragraph-rsid="00779fe3" style:font-size-asian="15pt" style:font-size-complex="15pt"/>
    </style:style>
    <style:style style:name="P26" style:family="paragraph" style:parent-style-name="Standard">
      <loext:graphic-properties draw:fill="none"/>
      <style:paragraph-properties fo:text-align="start" style:justify-single-word="false" fo:background-color="transparent"/>
      <style:text-properties fo:font-size="15pt" officeooo:rsid="0056c779" officeooo:paragraph-rsid="0056bdd4" style:font-size-asian="15pt" style:font-size-complex="15pt"/>
    </style:style>
    <style:style style:name="P27" style:family="paragraph" style:parent-style-name="Standard">
      <style:paragraph-properties fo:text-align="start" style:justify-single-word="false"/>
      <style:text-properties fo:font-size="15pt" officeooo:rsid="005cd23a" officeooo:paragraph-rsid="0073add2" style:font-size-asian="15pt" style:font-size-complex="15pt"/>
    </style:style>
    <style:style style:name="P28" style:family="paragraph" style:parent-style-name="Standard">
      <loext:graphic-properties draw:fill="none"/>
      <style:paragraph-properties fo:text-align="start" style:justify-single-word="false" fo:background-color="transparent"/>
      <style:text-properties fo:font-size="15pt" officeooo:rsid="005cd23a" officeooo:paragraph-rsid="0071c7f7" style:font-size-asian="15pt" style:font-size-complex="15pt"/>
    </style:style>
    <style:style style:name="P29" style:family="paragraph" style:parent-style-name="Standard">
      <loext:graphic-properties draw:fill="none"/>
      <style:paragraph-properties fo:text-align="start" style:justify-single-word="false" fo:background-color="transparent"/>
      <style:text-properties fo:font-size="15pt" officeooo:rsid="005cd23a" officeooo:paragraph-rsid="007fcea8" style:font-size-asian="15pt" style:font-size-complex="15pt"/>
    </style:style>
    <style:style style:name="P30" style:family="paragraph" style:parent-style-name="Standard">
      <style:paragraph-properties fo:text-align="start" style:justify-single-word="false"/>
      <style:text-properties fo:font-size="15pt" officeooo:rsid="006cf741" officeooo:paragraph-rsid="006cf741" style:font-size-asian="15pt" style:font-size-complex="15pt"/>
    </style:style>
    <style:style style:name="P31" style:family="paragraph" style:parent-style-name="Standard">
      <loext:graphic-properties draw:fill="none"/>
      <style:paragraph-properties fo:text-align="start" style:justify-single-word="false" fo:background-color="transparent"/>
      <style:text-properties fo:font-size="15pt" officeooo:rsid="006cf741" officeooo:paragraph-rsid="006cf741" style:font-size-asian="15pt" style:font-size-complex="15pt"/>
    </style:style>
    <style:style style:name="P32" style:family="paragraph" style:parent-style-name="Standard">
      <loext:graphic-properties draw:fill="none"/>
      <style:paragraph-properties fo:text-align="start" style:justify-single-word="false" fo:background-color="transparent"/>
      <style:text-properties fo:font-size="15pt" officeooo:rsid="006cf741" officeooo:paragraph-rsid="007fcea8" style:font-size-asian="15pt" style:font-size-complex="15pt"/>
    </style:style>
    <style:style style:name="P33" style:family="paragraph" style:parent-style-name="Standard">
      <loext:graphic-properties draw:fill="none"/>
      <style:paragraph-properties fo:text-align="start" style:justify-single-word="false" fo:background-color="transparent"/>
      <style:text-properties fo:font-size="15pt" officeooo:rsid="006cf741" officeooo:paragraph-rsid="0080c2d5" style:font-size-asian="15pt" style:font-size-complex="15pt"/>
    </style:style>
    <style:style style:name="P34" style:family="paragraph" style:parent-style-name="Standard">
      <style:paragraph-properties fo:text-align="center" style:justify-single-word="false"/>
      <style:text-properties fo:font-size="15pt" officeooo:rsid="00705063" officeooo:paragraph-rsid="00705063" style:font-size-asian="15pt" style:font-size-complex="15pt"/>
    </style:style>
    <style:style style:name="P35" style:family="paragraph" style:parent-style-name="Standard">
      <style:paragraph-properties fo:text-align="start" style:justify-single-word="false"/>
      <style:text-properties fo:font-size="15pt" officeooo:rsid="00705063" officeooo:paragraph-rsid="00705063" style:font-size-asian="15pt" style:font-size-complex="15pt"/>
    </style:style>
    <style:style style:name="P36" style:family="paragraph" style:parent-style-name="Standard">
      <style:paragraph-properties fo:text-align="start" style:justify-single-word="false"/>
      <style:text-properties fo:font-size="15pt" officeooo:rsid="00705063" officeooo:paragraph-rsid="0006ded2" style:font-size-asian="15pt" style:font-size-complex="15pt"/>
    </style:style>
    <style:style style:name="P37" style:family="paragraph" style:parent-style-name="Standard">
      <loext:graphic-properties draw:fill="none"/>
      <style:paragraph-properties fo:text-align="start" style:justify-single-word="false" fo:background-color="transparent"/>
      <style:text-properties fo:font-size="15pt" officeooo:rsid="00705063" officeooo:paragraph-rsid="0071c7f7" style:font-size-asian="15pt" style:font-size-complex="15pt"/>
    </style:style>
    <style:style style:name="P38" style:family="paragraph" style:parent-style-name="Standard">
      <loext:graphic-properties draw:fill="none"/>
      <style:paragraph-properties fo:text-align="start" style:justify-single-word="false" fo:background-color="transparent"/>
      <style:text-properties fo:font-size="15pt" officeooo:rsid="0071c7f7" officeooo:paragraph-rsid="0071c7f7" style:font-size-asian="15pt" style:font-size-complex="15pt"/>
    </style:style>
    <style:style style:name="P39" style:family="paragraph" style:parent-style-name="Standard">
      <style:paragraph-properties fo:text-align="start" style:justify-single-word="false"/>
      <style:text-properties fo:font-size="15pt" officeooo:rsid="0073add2" officeooo:paragraph-rsid="0073add2" style:font-size-asian="15pt" style:font-size-complex="15pt"/>
    </style:style>
    <style:style style:name="P40" style:family="paragraph" style:parent-style-name="Standard">
      <loext:graphic-properties draw:fill="none"/>
      <style:paragraph-properties fo:text-align="start" style:justify-single-word="false" fo:background-color="transparent"/>
      <style:text-properties fo:font-size="15pt" officeooo:rsid="0073add2" officeooo:paragraph-rsid="0073add2" style:font-size-asian="15pt" style:font-size-complex="15pt"/>
    </style:style>
    <style:style style:name="P41" style:family="paragraph" style:parent-style-name="Standard">
      <loext:graphic-properties draw:fill="none"/>
      <style:paragraph-properties fo:text-align="start" style:justify-single-word="false" fo:background-color="transparent"/>
      <style:text-properties fo:font-size="15pt" officeooo:rsid="00137398" officeooo:paragraph-rsid="0071c7f7" style:font-size-asian="15pt" style:font-size-complex="15pt"/>
    </style:style>
    <style:style style:name="P42" style:family="paragraph" style:parent-style-name="Standard">
      <loext:graphic-properties draw:fill="none"/>
      <style:paragraph-properties fo:text-align="start" style:justify-single-word="false" fo:background-color="transparent"/>
      <style:text-properties fo:font-size="15pt" officeooo:rsid="00137398" officeooo:paragraph-rsid="0078591c" style:font-size-asian="15pt" style:font-size-complex="15pt"/>
    </style:style>
    <style:style style:name="P43" style:family="paragraph" style:parent-style-name="Standard">
      <loext:graphic-properties draw:fill="none"/>
      <style:paragraph-properties fo:text-align="start" style:justify-single-word="false" fo:background-color="transparent"/>
      <style:text-properties fo:font-size="15pt" officeooo:rsid="00137398" officeooo:paragraph-rsid="0082583f" style:font-size-asian="15pt" style:font-size-complex="15pt"/>
    </style:style>
    <style:style style:name="P44" style:family="paragraph" style:parent-style-name="Standard">
      <loext:graphic-properties draw:fill="none"/>
      <style:paragraph-properties fo:text-align="start" style:justify-single-word="false" fo:background-color="transparent"/>
      <style:text-properties fo:font-size="15pt" officeooo:rsid="0053f1be" officeooo:paragraph-rsid="00544124" style:font-size-asian="15pt" style:font-size-complex="15pt"/>
    </style:style>
    <style:style style:name="P45" style:family="paragraph" style:parent-style-name="Standard">
      <loext:graphic-properties draw:fill="none"/>
      <style:paragraph-properties fo:text-align="start" style:justify-single-word="false" fo:background-color="transparent"/>
      <style:text-properties fo:font-size="15pt" officeooo:rsid="0053f1be" officeooo:paragraph-rsid="007fcea8" style:font-size-asian="15pt" style:font-size-complex="15pt"/>
    </style:style>
    <style:style style:name="P46" style:family="paragraph" style:parent-style-name="Standard">
      <loext:graphic-properties draw:fill="none"/>
      <style:paragraph-properties fo:text-align="start" style:justify-single-word="false" fo:background-color="transparent"/>
      <style:text-properties fo:font-size="15pt" officeooo:rsid="0045d2dc" officeooo:paragraph-rsid="003f748d" style:font-size-asian="15pt" style:font-size-complex="15pt"/>
    </style:style>
    <style:style style:name="P47" style:family="paragraph" style:parent-style-name="Standard">
      <loext:graphic-properties draw:fill="none"/>
      <style:paragraph-properties fo:text-align="start" style:justify-single-word="false" fo:background-color="transparent"/>
      <style:text-properties fo:font-size="15pt" officeooo:rsid="00544124" officeooo:paragraph-rsid="00544124" style:font-size-asian="15pt" style:font-size-complex="15pt"/>
    </style:style>
    <style:style style:name="P48" style:family="paragraph" style:parent-style-name="Standard">
      <loext:graphic-properties draw:fill="none"/>
      <style:paragraph-properties fo:text-align="start" style:justify-single-word="false" fo:background-color="transparent"/>
      <style:text-properties fo:font-size="15pt" officeooo:rsid="00762472" officeooo:paragraph-rsid="00762472" style:font-size-asian="15pt" style:font-size-complex="15pt"/>
    </style:style>
    <style:style style:name="P49" style:family="paragraph" style:parent-style-name="Standard">
      <loext:graphic-properties draw:fill="none"/>
      <style:paragraph-properties fo:text-align="start" style:justify-single-word="false" fo:background-color="transparent"/>
      <style:text-properties fo:font-size="15pt" officeooo:rsid="00779fe3" officeooo:paragraph-rsid="00779fe3" style:font-size-asian="15pt" style:font-size-complex="15pt"/>
    </style:style>
    <style:style style:name="P50" style:family="paragraph" style:parent-style-name="Standard">
      <loext:graphic-properties draw:fill="none"/>
      <style:paragraph-properties fo:text-align="start" style:justify-single-word="false" fo:background-color="transparent"/>
      <style:text-properties fo:font-size="15pt" officeooo:rsid="00779fe3" officeooo:paragraph-rsid="007fcea8" style:font-size-asian="15pt" style:font-size-complex="15pt"/>
    </style:style>
    <style:style style:name="P51" style:family="paragraph" style:parent-style-name="Standard">
      <style:paragraph-properties fo:text-align="start" style:justify-single-word="false"/>
      <style:text-properties fo:font-size="15pt" officeooo:rsid="0078591c" officeooo:paragraph-rsid="0078591c" style:font-size-asian="15pt" style:font-size-complex="15pt"/>
    </style:style>
    <style:style style:name="P52" style:family="paragraph" style:parent-style-name="Standard">
      <loext:graphic-properties draw:fill="none"/>
      <style:paragraph-properties fo:text-align="start" style:justify-single-word="false" fo:background-color="transparent"/>
      <style:text-properties fo:font-size="15pt" officeooo:rsid="0078591c" officeooo:paragraph-rsid="0078591c" style:font-size-asian="15pt" style:font-size-complex="15pt"/>
    </style:style>
    <style:style style:name="P53" style:family="paragraph" style:parent-style-name="Standard">
      <style:paragraph-properties fo:text-align="start" style:justify-single-word="false"/>
      <style:text-properties fo:font-size="15pt" officeooo:rsid="0079805d" officeooo:paragraph-rsid="0079805d" style:font-size-asian="15pt" style:font-size-complex="15pt"/>
    </style:style>
    <style:style style:name="P54" style:family="paragraph" style:parent-style-name="Standard">
      <loext:graphic-properties draw:fill="none"/>
      <style:paragraph-properties fo:text-align="start" style:justify-single-word="false" fo:background-color="transparent"/>
      <style:text-properties fo:font-size="15pt" officeooo:rsid="0079805d" officeooo:paragraph-rsid="0079805d" style:font-size-asian="15pt" style:font-size-complex="15pt"/>
    </style:style>
    <style:style style:name="P55" style:family="paragraph" style:parent-style-name="Standard">
      <loext:graphic-properties draw:fill="none"/>
      <style:paragraph-properties fo:text-align="start" style:justify-single-word="false" fo:background-color="transparent"/>
      <style:text-properties fo:font-size="15pt" officeooo:rsid="007aa0a6" officeooo:paragraph-rsid="007aa0a6" style:font-size-asian="15pt" style:font-size-complex="15pt"/>
    </style:style>
    <style:style style:name="P56" style:family="paragraph" style:parent-style-name="Standard">
      <loext:graphic-properties draw:fill="none"/>
      <style:paragraph-properties fo:text-align="start" style:justify-single-word="false" fo:background-color="transparent"/>
      <style:text-properties fo:font-size="15pt" officeooo:rsid="007ddef2" officeooo:paragraph-rsid="007ddef2" style:font-size-asian="15pt" style:font-size-complex="15pt"/>
    </style:style>
    <style:style style:name="P57" style:family="paragraph" style:parent-style-name="Standard">
      <loext:graphic-properties draw:fill="none"/>
      <style:paragraph-properties fo:text-align="start" style:justify-single-word="false" fo:background-color="transparent"/>
      <style:text-properties fo:font-size="15pt" officeooo:rsid="007fcea8" officeooo:paragraph-rsid="007fcea8" style:font-size-asian="15pt" style:font-size-complex="15pt"/>
    </style:style>
    <style:style style:name="P58" style:family="paragraph" style:parent-style-name="Standard">
      <loext:graphic-properties draw:fill="none"/>
      <style:paragraph-properties fo:text-align="start" style:justify-single-word="false" fo:background-color="transparent"/>
      <style:text-properties fo:font-size="15pt" officeooo:rsid="0080c2d5" officeooo:paragraph-rsid="0082583f" style:font-size-asian="15pt" style:font-size-complex="15pt"/>
    </style:style>
    <style:style style:name="P59" style:family="paragraph" style:parent-style-name="Standard">
      <loext:graphic-properties draw:fill="none"/>
      <style:paragraph-properties fo:text-align="start" style:justify-single-word="false" fo:background-color="transparent"/>
      <style:text-properties fo:font-size="15pt" officeooo:rsid="0082583f" officeooo:paragraph-rsid="0082583f" style:font-size-asian="15pt" style:font-size-complex="15pt"/>
    </style:style>
    <style:style style:name="P60" style:family="paragraph" style:parent-style-name="Standard">
      <loext:graphic-properties draw:fill="none"/>
      <style:paragraph-properties fo:text-align="start" style:justify-single-word="false" fo:background-color="transparent"/>
      <style:text-properties officeooo:rsid="0080c2d5" officeooo:paragraph-rsid="0082583f"/>
    </style:style>
    <style:style style:name="P61" style:family="paragraph" style:parent-style-name="Table_20_Contents">
      <style:paragraph-properties fo:text-align="start" style:justify-single-word="false"/>
      <style:text-properties fo:font-size="15pt" officeooo:rsid="00328239" officeooo:paragraph-rsid="00328239" style:font-size-asian="15pt" style:font-size-complex="15pt"/>
    </style:style>
    <style:style style:name="P62" style:family="paragraph" style:parent-style-name="Table_20_Contents">
      <style:paragraph-properties fo:text-align="start" style:justify-single-word="false"/>
      <style:text-properties fo:font-size="15pt" officeooo:rsid="0035934c" officeooo:paragraph-rsid="0035934c" style:font-size-asian="15pt" style:font-size-complex="15pt"/>
    </style:style>
    <style:style style:name="P63" style:family="paragraph" style:parent-style-name="Table_20_Contents">
      <style:paragraph-properties fo:text-align="start" style:justify-single-word="false"/>
      <style:text-properties fo:font-size="15pt" officeooo:rsid="0035934c" officeooo:paragraph-rsid="003608e2" style:font-size-asian="15pt" style:font-size-complex="15pt"/>
    </style:style>
    <style:style style:name="P64" style:family="paragraph" style:parent-style-name="Table_20_Contents">
      <style:paragraph-properties fo:text-align="start" style:justify-single-word="false"/>
      <style:text-properties fo:font-size="15pt" officeooo:rsid="0035934c" officeooo:paragraph-rsid="00779fe3" style:font-size-asian="15pt" style:font-size-complex="15pt"/>
    </style:style>
    <style:style style:name="P65" style:family="paragraph" style:parent-style-name="Table_20_Contents">
      <style:paragraph-properties fo:text-align="start" style:justify-single-word="false"/>
      <style:text-properties fo:font-size="15pt" officeooo:rsid="003608e2" officeooo:paragraph-rsid="003608e2" style:font-size-asian="15pt" style:font-size-complex="15pt"/>
    </style:style>
    <style:style style:name="P66" style:family="paragraph" style:parent-style-name="Table_20_Contents">
      <style:paragraph-properties fo:text-align="start" style:justify-single-word="false"/>
      <style:text-properties fo:font-size="15pt" officeooo:rsid="0038f54b" officeooo:paragraph-rsid="0038f54b" style:font-size-asian="15pt" style:font-size-complex="15pt"/>
    </style:style>
    <style:style style:name="P67" style:family="paragraph" style:parent-style-name="Table_20_Contents">
      <style:paragraph-properties fo:text-align="start" style:justify-single-word="false"/>
      <style:text-properties fo:font-size="15pt" officeooo:rsid="00399c02" officeooo:paragraph-rsid="00399c02" style:font-size-asian="15pt" style:font-size-complex="15pt"/>
    </style:style>
    <style:style style:name="P68" style:family="paragraph" style:parent-style-name="Table_20_Contents">
      <style:paragraph-properties fo:text-align="start" style:justify-single-word="false"/>
      <style:text-properties fo:font-size="15pt" officeooo:rsid="00399c02" officeooo:paragraph-rsid="0082583f" style:font-size-asian="15pt" style:font-size-complex="15pt"/>
    </style:style>
    <style:style style:name="P69" style:family="paragraph" style:parent-style-name="Table_20_Contents">
      <style:paragraph-properties fo:text-align="start" style:justify-single-word="false"/>
      <style:text-properties fo:font-size="15pt" officeooo:rsid="003a8507" officeooo:paragraph-rsid="003a8507" style:font-size-asian="15pt" style:font-size-complex="15pt"/>
    </style:style>
    <style:style style:name="P70" style:family="paragraph" style:parent-style-name="Table_20_Contents">
      <style:paragraph-properties fo:text-align="start" style:justify-single-word="false"/>
      <style:text-properties fo:font-size="15pt" officeooo:rsid="003f748d" officeooo:paragraph-rsid="003f748d" style:font-size-asian="15pt" style:font-size-complex="15pt"/>
    </style:style>
    <style:style style:name="P71" style:family="paragraph" style:parent-style-name="Table_20_Contents">
      <style:paragraph-properties fo:text-align="start" style:justify-single-word="false"/>
      <style:text-properties fo:font-size="15pt" officeooo:rsid="00137398" officeooo:paragraph-rsid="0071c7f7" style:font-size-asian="15pt" style:font-size-complex="15pt"/>
    </style:style>
    <style:style style:name="P72" style:family="paragraph" style:parent-style-name="Table_20_Contents">
      <style:paragraph-properties fo:text-align="start" style:justify-single-word="false"/>
      <style:text-properties fo:font-size="15pt" officeooo:rsid="00137398" officeooo:paragraph-rsid="00779fe3" style:font-size-asian="15pt" style:font-size-complex="15pt"/>
    </style:style>
    <style:style style:name="P73" style:family="paragraph" style:parent-style-name="Table_20_Contents">
      <style:paragraph-properties fo:text-align="start" style:justify-single-word="false"/>
      <style:text-properties fo:font-size="15pt" officeooo:paragraph-rsid="0069d7c4" style:font-size-asian="15pt" style:font-size-complex="15pt"/>
    </style:style>
    <style:style style:name="P74" style:family="paragraph" style:parent-style-name="Table_20_Contents">
      <style:paragraph-properties fo:text-align="start" style:justify-single-word="false"/>
      <style:text-properties fo:font-size="15pt" officeooo:paragraph-rsid="00705063" style:font-size-asian="15pt" style:font-size-complex="15pt"/>
    </style:style>
    <style:style style:name="P75" style:family="paragraph" style:parent-style-name="Table_20_Contents">
      <style:paragraph-properties fo:text-align="start" style:justify-single-word="false"/>
      <style:text-properties fo:font-size="15pt" officeooo:paragraph-rsid="0071c7f7" style:font-size-asian="15pt" style:font-size-complex="15pt"/>
    </style:style>
    <style:style style:name="P76" style:family="paragraph" style:parent-style-name="Table_20_Contents">
      <style:paragraph-properties fo:text-align="start" style:justify-single-word="false"/>
      <style:text-properties fo:font-size="15pt" officeooo:paragraph-rsid="007aa0a6" style:font-size-asian="15pt" style:font-size-complex="15pt"/>
    </style:style>
    <style:style style:name="P77" style:family="paragraph" style:parent-style-name="Table_20_Contents">
      <style:paragraph-properties fo:text-align="start" style:justify-single-word="false"/>
      <style:text-properties fo:font-size="15pt" officeooo:rsid="001787f6" officeooo:paragraph-rsid="0071c7f7" style:font-size-asian="15pt" style:font-size-complex="15pt"/>
    </style:style>
    <style:style style:name="P78" style:family="paragraph" style:parent-style-name="Table_20_Contents">
      <style:paragraph-properties fo:text-align="start" style:justify-single-word="false"/>
      <style:text-properties fo:font-size="15pt" officeooo:rsid="001787f6" officeooo:paragraph-rsid="007aa0a6" style:font-size-asian="15pt" style:font-size-complex="15pt"/>
    </style:style>
    <style:style style:name="P79" style:family="paragraph" style:parent-style-name="Table_20_Contents">
      <style:paragraph-properties fo:text-align="start" style:justify-single-word="false"/>
      <style:text-properties fo:font-size="15pt" officeooo:rsid="001a0a16" officeooo:paragraph-rsid="00705063" style:font-size-asian="15pt" style:font-size-complex="15pt"/>
    </style:style>
    <style:style style:name="P80" style:family="paragraph" style:parent-style-name="Table_20_Contents">
      <style:paragraph-properties fo:text-align="start" style:justify-single-word="false"/>
      <style:text-properties fo:font-size="15pt" officeooo:rsid="002b7bb1" officeooo:paragraph-rsid="0069d7c4" style:font-size-asian="15pt" style:font-size-complex="15pt"/>
    </style:style>
    <style:style style:name="P81" style:family="paragraph" style:parent-style-name="Table_20_Contents">
      <style:paragraph-properties fo:text-align="start" style:justify-single-word="false"/>
      <style:text-properties fo:font-size="15pt" officeooo:rsid="002cb952" officeooo:paragraph-rsid="0069d7c4" style:font-size-asian="15pt" style:font-size-complex="15pt"/>
    </style:style>
    <style:style style:name="P82" style:family="paragraph" style:parent-style-name="Table_20_Contents">
      <style:paragraph-properties fo:text-align="start" style:justify-single-word="false"/>
    </style:style>
    <style:style style:name="P83" style:family="paragraph" style:parent-style-name="Table_20_Contents">
      <style:paragraph-properties fo:text-align="start" style:justify-single-word="false"/>
      <style:text-properties officeooo:paragraph-rsid="005482a8"/>
    </style:style>
    <style:style style:name="P84" style:family="paragraph" style:parent-style-name="Table_20_Contents">
      <style:paragraph-properties fo:text-align="start" style:justify-single-word="false"/>
      <style:text-properties officeooo:rsid="005482a8" officeooo:paragraph-rsid="005482a8"/>
    </style:style>
    <style:style style:name="P85" style:family="paragraph" style:parent-style-name="Table_20_Contents">
      <style:paragraph-properties fo:text-align="start" style:justify-single-word="false"/>
      <style:text-properties officeooo:rsid="0054bfe8" officeooo:paragraph-rsid="0054bfe8"/>
    </style:style>
    <style:style style:name="P86" style:family="paragraph" style:parent-style-name="Standard">
      <loext:graphic-properties draw:fill="none"/>
      <style:paragraph-properties fo:margin-left="0.7cm" fo:margin-right="0cm" fo:text-align="start" style:justify-single-word="false" fo:text-indent="0cm" style:auto-text-indent="false" fo:background-color="transparent"/>
      <style:text-properties fo:font-size="15pt" officeooo:rsid="0015d37b" officeooo:paragraph-rsid="00137398" style:font-size-asian="15pt" style:font-size-complex="15pt"/>
    </style:style>
    <style:style style:name="P87" style:family="paragraph" style:parent-style-name="Standard" style:list-style-name="L1">
      <loext:graphic-properties draw:fill="none"/>
      <style:paragraph-properties fo:text-align="start" style:justify-single-word="false" fo:background-color="transparent"/>
      <style:text-properties fo:font-size="15pt" officeooo:rsid="0015d37b" officeooo:paragraph-rsid="0069d7c4" style:font-size-asian="15pt" style:font-size-complex="15pt"/>
    </style:style>
    <style:style style:name="P88" style:family="paragraph" style:parent-style-name="Standard" style:list-style-name="L1">
      <loext:graphic-properties draw:fill="none"/>
      <style:paragraph-properties fo:text-align="start" style:justify-single-word="false" fo:background-color="transparent"/>
      <style:text-properties fo:font-size="15pt" officeooo:rsid="0015d37b" officeooo:paragraph-rsid="00779fe3" style:font-size-asian="15pt" style:font-size-complex="15pt"/>
    </style:style>
    <style:style style:name="P89" style:family="paragraph" style:parent-style-name="Standard" style:list-style-name="L1">
      <loext:graphic-properties draw:fill="none"/>
      <style:paragraph-properties fo:text-align="start" style:justify-single-word="false" fo:background-color="transparent"/>
      <style:text-properties fo:font-size="15pt" officeooo:rsid="0015d37b" officeooo:paragraph-rsid="006cf741" style:font-size-asian="15pt" style:font-size-complex="15pt"/>
    </style:style>
    <style:style style:name="P90" style:family="paragraph" style:parent-style-name="Standard" style:list-style-name="L1">
      <loext:graphic-properties draw:fill="none"/>
      <style:paragraph-properties fo:text-align="start" style:justify-single-word="false" fo:background-color="transparent"/>
      <style:text-properties fo:font-size="15pt" officeooo:rsid="0015d37b" officeooo:paragraph-rsid="00705063" style:font-size-asian="15pt" style:font-size-complex="15pt"/>
    </style:style>
    <style:style style:name="P91" style:family="paragraph" style:parent-style-name="Standard" style:list-style-name="L1">
      <loext:graphic-properties draw:fill="none"/>
      <style:paragraph-properties fo:text-align="start" style:justify-single-word="false" fo:background-color="transparent"/>
      <style:text-properties fo:font-size="15pt" officeooo:rsid="0015d37b" officeooo:paragraph-rsid="0082583f" style:font-size-asian="15pt" style:font-size-complex="15pt"/>
    </style:style>
    <style:style style:name="P92" style:family="paragraph" style:parent-style-name="Standard" style:list-style-name="L1">
      <loext:graphic-properties draw:fill="none"/>
      <style:paragraph-properties fo:text-align="start" style:justify-single-word="false" fo:background-color="transparent"/>
      <style:text-properties fo:font-size="15pt" officeooo:rsid="0015d37b" officeooo:paragraph-rsid="00841ebd" style:font-size-asian="15pt" style:font-size-complex="15pt"/>
    </style:style>
    <style:style style:name="P93" style:family="paragraph" style:parent-style-name="Standard" style:list-style-name="L2">
      <loext:graphic-properties draw:fill="none"/>
      <style:paragraph-properties fo:text-align="start" style:justify-single-word="false" fo:background-color="transparent"/>
      <style:text-properties fo:font-size="15pt" officeooo:rsid="0015d37b" officeooo:paragraph-rsid="0078591c" style:font-size-asian="15pt" style:font-size-complex="15pt"/>
    </style:style>
    <style:style style:name="P94" style:family="paragraph" style:parent-style-name="Standard" style:list-style-name="L2">
      <loext:graphic-properties draw:fill="none"/>
      <style:paragraph-properties fo:text-align="start" style:justify-single-word="false" fo:background-color="transparent"/>
      <style:text-properties fo:font-size="15pt" officeooo:rsid="0015d37b" officeooo:paragraph-rsid="0071c7f7" style:font-size-asian="15pt" style:font-size-complex="15pt"/>
    </style:style>
    <style:style style:name="P95" style:family="paragraph" style:parent-style-name="Standard" style:list-style-name="L8">
      <loext:graphic-properties draw:fill="none"/>
      <style:paragraph-properties fo:text-align="start" style:justify-single-word="false" fo:background-color="transparent"/>
      <style:text-properties fo:font-size="15pt" officeooo:rsid="0015d37b" officeooo:paragraph-rsid="007aa0a6" style:font-size-asian="15pt" style:font-size-complex="15pt"/>
    </style:style>
    <style:style style:name="P96" style:family="paragraph" style:parent-style-name="Standard" style:list-style-name="L8">
      <loext:graphic-properties draw:fill="none"/>
      <style:paragraph-properties fo:text-align="start" style:justify-single-word="false" fo:background-color="transparent"/>
      <style:text-properties fo:font-size="15pt" officeooo:rsid="0015d37b" officeooo:paragraph-rsid="007ddef2" style:font-size-asian="15pt" style:font-size-complex="15pt"/>
    </style:style>
    <style:style style:name="P97" style:family="paragraph" style:parent-style-name="Standard" style:list-style-name="L3">
      <loext:graphic-properties draw:fill="none"/>
      <style:paragraph-properties fo:text-align="start" style:justify-single-word="false" fo:background-color="transparent"/>
      <style:text-properties fo:font-size="15pt" officeooo:rsid="0015d37b" officeooo:paragraph-rsid="00762472" style:font-size-asian="15pt" style:font-size-complex="15pt"/>
    </style:style>
    <style:style style:name="P98" style:family="paragraph" style:parent-style-name="Standard" style:list-style-name="L3">
      <loext:graphic-properties draw:fill="none"/>
      <style:paragraph-properties fo:text-align="start" style:justify-single-word="false" fo:background-color="transparent"/>
      <style:text-properties fo:font-size="15pt" officeooo:rsid="0015d37b" officeooo:paragraph-rsid="00779fe3" style:font-size-asian="15pt" style:font-size-complex="15pt"/>
    </style:style>
    <style:style style:name="P99" style:family="paragraph" style:parent-style-name="Standard" style:list-style-name="L3">
      <loext:graphic-properties draw:fill="none"/>
      <style:paragraph-properties fo:text-align="start" style:justify-single-word="false" fo:background-color="transparent"/>
      <style:text-properties fo:font-size="15pt" officeooo:rsid="0015d37b" officeooo:paragraph-rsid="006cf741" style:font-size-asian="15pt" style:font-size-complex="15pt"/>
    </style:style>
    <style:style style:name="P100" style:family="paragraph" style:parent-style-name="Standard" style:list-style-name="L3">
      <loext:graphic-properties draw:fill="none"/>
      <style:paragraph-properties fo:text-align="start" style:justify-single-word="false" fo:background-color="transparent"/>
      <style:text-properties fo:font-size="15pt" officeooo:rsid="0015d37b" officeooo:paragraph-rsid="0071c7f7" style:font-size-asian="15pt" style:font-size-complex="15pt"/>
    </style:style>
    <style:style style:name="P101" style:family="paragraph" style:parent-style-name="Standard" style:list-style-name="L6">
      <loext:graphic-properties draw:fill="none"/>
      <style:paragraph-properties fo:text-align="start" style:justify-single-word="false" fo:background-color="transparent"/>
      <style:text-properties fo:font-size="15pt" officeooo:rsid="0015d37b" officeooo:paragraph-rsid="007aa0a6" style:font-size-asian="15pt" style:font-size-complex="15pt"/>
    </style:style>
    <style:style style:name="P102" style:family="paragraph" style:parent-style-name="Standard" style:list-style-name="L12">
      <loext:graphic-properties draw:fill="none"/>
      <style:paragraph-properties fo:text-align="start" style:justify-single-word="false" fo:background-color="transparent"/>
      <style:text-properties fo:font-size="15pt" officeooo:rsid="0015d37b" officeooo:paragraph-rsid="00841ebd" style:font-size-asian="15pt" style:font-size-complex="15pt"/>
    </style:style>
    <style:style style:name="P103" style:family="paragraph" style:parent-style-name="Standard">
      <style:paragraph-properties fo:text-align="start" style:justify-single-word="false"/>
      <style:text-properties fo:font-size="15pt" officeooo:rsid="0015d37b" officeooo:paragraph-rsid="00841ebd" style:font-size-asian="15pt" style:font-size-complex="15pt"/>
    </style:style>
    <style:style style:name="P104" style:family="paragraph" style:parent-style-name="Standard">
      <loext:graphic-properties draw:fill="none"/>
      <style:paragraph-properties fo:text-align="start" style:justify-single-word="false" fo:background-color="transparent"/>
      <style:text-properties fo:font-size="15pt" officeooo:rsid="0015d37b" officeooo:paragraph-rsid="00841ebd" style:font-size-asian="15pt" style:font-size-complex="15pt"/>
    </style:style>
    <style:style style:name="P105" style:family="paragraph" style:parent-style-name="Standard" style:list-style-name="L1">
      <loext:graphic-properties draw:fill="none"/>
      <style:paragraph-properties fo:text-align="start" style:justify-single-word="false" fo:background-color="transparent"/>
      <style:text-properties fo:font-size="15pt" officeooo:rsid="00779fe3" officeooo:paragraph-rsid="00779fe3" style:font-size-asian="15pt" style:font-size-complex="15pt"/>
    </style:style>
    <style:style style:name="P106" style:family="paragraph" style:parent-style-name="Standard" style:list-style-name="L2">
      <loext:graphic-properties draw:fill="none"/>
      <style:paragraph-properties fo:text-align="start" style:justify-single-word="false" fo:background-color="transparent"/>
      <style:text-properties fo:font-size="15pt" officeooo:rsid="00779fe3" officeooo:paragraph-rsid="00779fe3" style:font-size-asian="15pt" style:font-size-complex="15pt"/>
    </style:style>
    <style:style style:name="P107" style:family="paragraph" style:parent-style-name="Standard" style:list-style-name="L2">
      <loext:graphic-properties draw:fill="none"/>
      <style:paragraph-properties fo:text-align="start" style:justify-single-word="false" fo:background-color="transparent"/>
      <style:text-properties fo:font-size="15pt" officeooo:rsid="00779fe3" officeooo:paragraph-rsid="0071c7f7" style:font-size-asian="15pt" style:font-size-complex="15pt"/>
    </style:style>
    <style:style style:name="P108" style:family="paragraph" style:parent-style-name="Standard" style:list-style-name="L3">
      <loext:graphic-properties draw:fill="none"/>
      <style:paragraph-properties fo:text-align="start" style:justify-single-word="false" fo:background-color="transparent"/>
      <style:text-properties fo:font-size="15pt" officeooo:rsid="00779fe3" officeooo:paragraph-rsid="00841ebd" style:font-size-asian="15pt" style:font-size-complex="15pt"/>
    </style:style>
    <style:style style:name="P109" style:family="paragraph" style:parent-style-name="Standard" style:list-style-name="L2">
      <loext:graphic-properties draw:fill="none"/>
      <style:paragraph-properties fo:text-align="start" style:justify-single-word="false" fo:background-color="transparent"/>
      <style:text-properties fo:font-size="15pt" officeooo:rsid="00137398" officeooo:paragraph-rsid="00779fe3" style:font-size-asian="15pt" style:font-size-complex="15pt"/>
    </style:style>
    <style:style style:name="P110" style:family="paragraph" style:parent-style-name="Standard" style:list-style-name="L2">
      <loext:graphic-properties draw:fill="none"/>
      <style:paragraph-properties fo:text-align="start" style:justify-single-word="false" fo:background-color="transparent"/>
      <style:text-properties fo:font-size="15pt" officeooo:rsid="00137398" officeooo:paragraph-rsid="0071c7f7" style:font-size-asian="15pt" style:font-size-complex="15pt"/>
    </style:style>
    <style:style style:name="P111" style:family="paragraph" style:parent-style-name="Standard" style:list-style-name="L2">
      <loext:graphic-properties draw:fill="none"/>
      <style:paragraph-properties fo:text-align="start" style:justify-single-word="false" fo:background-color="transparent"/>
      <style:text-properties fo:font-size="15pt" officeooo:rsid="00137398" officeooo:paragraph-rsid="00762472" style:font-size-asian="15pt" style:font-size-complex="15pt"/>
    </style:style>
    <style:style style:name="P112" style:family="paragraph" style:parent-style-name="Standard" style:list-style-name="L2">
      <loext:graphic-properties draw:fill="none"/>
      <style:paragraph-properties fo:text-align="start" style:justify-single-word="false" fo:background-color="transparent"/>
      <style:text-properties fo:font-size="15pt" officeooo:rsid="00137398" officeooo:paragraph-rsid="0078591c" style:font-size-asian="15pt" style:font-size-complex="15pt"/>
    </style:style>
    <style:style style:name="P113" style:family="paragraph" style:parent-style-name="Standard" style:list-style-name="L3">
      <loext:graphic-properties draw:fill="none"/>
      <style:paragraph-properties fo:text-align="start" style:justify-single-word="false" fo:background-color="transparent"/>
      <style:text-properties fo:font-size="15pt" officeooo:rsid="00137398" officeooo:paragraph-rsid="0082583f" style:font-size-asian="15pt" style:font-size-complex="15pt"/>
    </style:style>
    <style:style style:name="P114" style:family="paragraph" style:parent-style-name="Standard" style:list-style-name="L3">
      <loext:graphic-properties draw:fill="none"/>
      <style:paragraph-properties fo:text-align="start" style:justify-single-word="false" fo:background-color="transparent"/>
      <style:text-properties fo:font-size="15pt" officeooo:rsid="00137398" officeooo:paragraph-rsid="0071c7f7" style:font-size-asian="15pt" style:font-size-complex="15pt"/>
    </style:style>
    <style:style style:name="P115" style:family="paragraph" style:parent-style-name="Standard" style:list-style-name="L3">
      <loext:graphic-properties draw:fill="none"/>
      <style:paragraph-properties fo:text-align="start" style:justify-single-word="false" fo:background-color="transparent"/>
      <style:text-properties fo:font-size="15pt" officeooo:rsid="00137398" officeooo:paragraph-rsid="00841ebd" style:font-size-asian="15pt" style:font-size-complex="15pt"/>
    </style:style>
    <style:style style:name="P116" style:family="paragraph" style:parent-style-name="Standard" style:list-style-name="L1">
      <loext:graphic-properties draw:fill="none"/>
      <style:paragraph-properties fo:text-align="start" style:justify-single-word="false" fo:background-color="transparent"/>
      <style:text-properties fo:font-size="15pt" officeooo:rsid="00137398" officeooo:paragraph-rsid="00841ebd" style:font-size-asian="15pt" style:font-size-complex="15pt"/>
    </style:style>
    <style:style style:name="P117" style:family="paragraph" style:parent-style-name="Standard">
      <loext:graphic-properties draw:fill="none"/>
      <style:paragraph-properties fo:text-align="start" style:justify-single-word="false" fo:background-color="transparent"/>
      <style:text-properties fo:font-size="15pt" officeooo:rsid="00137398" officeooo:paragraph-rsid="00841ebd" style:font-size-asian="15pt" style:font-size-complex="15pt"/>
    </style:style>
    <style:style style:name="P118" style:family="paragraph" style:parent-style-name="Standard" style:list-style-name="L3">
      <loext:graphic-properties draw:fill="none"/>
      <style:paragraph-properties fo:text-align="start" style:justify-single-word="false" fo:background-color="transparent"/>
      <style:text-properties fo:font-size="15pt" officeooo:rsid="0071c7f7" officeooo:paragraph-rsid="0071c7f7" style:font-size-asian="15pt" style:font-size-complex="15pt"/>
    </style:style>
    <style:style style:name="P119" style:family="paragraph" style:parent-style-name="Standard" style:list-style-name="L3">
      <loext:graphic-properties draw:fill="none"/>
      <style:paragraph-properties fo:text-align="start" style:justify-single-word="false" fo:background-color="transparent"/>
      <style:text-properties fo:font-size="15pt" officeooo:rsid="0071c7f7" officeooo:paragraph-rsid="00841ebd" style:font-size-asian="15pt" style:font-size-complex="15pt"/>
    </style:style>
    <style:style style:name="P120" style:family="paragraph" style:parent-style-name="Standard" style:list-style-name="L2">
      <loext:graphic-properties draw:fill="none"/>
      <style:paragraph-properties fo:text-align="start" style:justify-single-word="false" fo:background-color="transparent"/>
      <style:text-properties fo:font-size="15pt" officeooo:rsid="0071c7f7" officeooo:paragraph-rsid="0071c7f7" style:font-size-asian="15pt" style:font-size-complex="15pt"/>
    </style:style>
    <style:style style:name="P121" style:family="paragraph" style:parent-style-name="Standard" style:list-style-name="L3">
      <loext:graphic-properties draw:fill="none"/>
      <style:paragraph-properties fo:text-align="start" style:justify-single-word="false" fo:background-color="transparent"/>
      <style:text-properties fo:font-size="15pt" officeooo:rsid="005cd23a" officeooo:paragraph-rsid="007fcea8" style:font-size-asian="15pt" style:font-size-complex="15pt"/>
    </style:style>
    <style:style style:name="P122" style:family="paragraph" style:parent-style-name="Standard" style:list-style-name="L3">
      <loext:graphic-properties draw:fill="none"/>
      <style:paragraph-properties fo:text-align="start" style:justify-single-word="false" fo:background-color="transparent"/>
      <style:text-properties fo:font-size="15pt" officeooo:rsid="005cd23a" officeooo:paragraph-rsid="0071c7f7" style:font-size-asian="15pt" style:font-size-complex="15pt"/>
    </style:style>
    <style:style style:name="P123" style:family="paragraph" style:parent-style-name="Standard" style:list-style-name="L3">
      <loext:graphic-properties draw:fill="none"/>
      <style:paragraph-properties fo:text-align="start" style:justify-single-word="false" fo:background-color="transparent"/>
      <style:text-properties fo:font-size="15pt" officeooo:rsid="005cd23a" officeooo:paragraph-rsid="0073add2" style:font-size-asian="15pt" style:font-size-complex="15pt"/>
    </style:style>
    <style:style style:name="P124" style:family="paragraph" style:parent-style-name="Standard" style:list-style-name="L3">
      <loext:graphic-properties draw:fill="none"/>
      <style:paragraph-properties fo:text-align="start" style:justify-single-word="false" fo:background-color="transparent"/>
      <style:text-properties fo:font-size="15pt" officeooo:rsid="005cd23a" officeooo:paragraph-rsid="007aa0a6" style:font-size-asian="15pt" style:font-size-complex="15pt"/>
    </style:style>
    <style:style style:name="P125" style:family="paragraph" style:parent-style-name="Standard" style:list-style-name="L3">
      <loext:graphic-properties draw:fill="none"/>
      <style:paragraph-properties fo:text-align="start" style:justify-single-word="false" fo:background-color="transparent"/>
      <style:text-properties fo:font-size="15pt" officeooo:rsid="005cd23a" officeooo:paragraph-rsid="00762472" style:font-size-asian="15pt" style:font-size-complex="15pt"/>
    </style:style>
    <style:style style:name="P126" style:family="paragraph" style:parent-style-name="Standard" style:list-style-name="L3">
      <loext:graphic-properties draw:fill="none"/>
      <style:paragraph-properties fo:text-align="start" style:justify-single-word="false" fo:background-color="transparent"/>
      <style:text-properties fo:font-size="15pt" officeooo:rsid="005cd23a" officeooo:paragraph-rsid="006cf741" style:font-size-asian="15pt" style:font-size-complex="15pt"/>
    </style:style>
    <style:style style:name="P127" style:family="paragraph" style:parent-style-name="Standard" style:list-style-name="L5">
      <loext:graphic-properties draw:fill="none"/>
      <style:paragraph-properties fo:text-align="start" style:justify-single-word="false" fo:background-color="transparent"/>
      <style:text-properties fo:font-size="15pt" officeooo:rsid="005cd23a" officeooo:paragraph-rsid="007fcea8" style:font-size-asian="15pt" style:font-size-complex="15pt"/>
    </style:style>
    <style:style style:name="P128" style:family="paragraph" style:parent-style-name="Standard" style:list-style-name="L5">
      <loext:graphic-properties draw:fill="none"/>
      <style:paragraph-properties fo:text-align="start" style:justify-single-word="false" fo:background-color="transparent"/>
      <style:text-properties fo:font-size="15pt" officeooo:rsid="005cd23a" officeooo:paragraph-rsid="00841ebd" style:font-size-asian="15pt" style:font-size-complex="15pt"/>
    </style:style>
    <style:style style:name="P129" style:family="paragraph" style:parent-style-name="Standard" style:list-style-name="L6">
      <loext:graphic-properties draw:fill="none"/>
      <style:paragraph-properties fo:text-align="start" style:justify-single-word="false" fo:background-color="transparent"/>
      <style:text-properties fo:font-size="15pt" officeooo:rsid="005cd23a" officeooo:paragraph-rsid="0079805d" style:font-size-asian="15pt" style:font-size-complex="15pt"/>
    </style:style>
    <style:style style:name="P130" style:family="paragraph" style:parent-style-name="Standard" style:list-style-name="L6">
      <loext:graphic-properties draw:fill="none"/>
      <style:paragraph-properties fo:text-align="start" style:justify-single-word="false" fo:background-color="transparent"/>
      <style:text-properties fo:font-size="15pt" officeooo:rsid="005cd23a" officeooo:paragraph-rsid="007c2a8c" style:font-size-asian="15pt" style:font-size-complex="15pt"/>
    </style:style>
    <style:style style:name="P131" style:family="paragraph" style:parent-style-name="Standard" style:list-style-name="L1">
      <loext:graphic-properties draw:fill="none"/>
      <style:paragraph-properties fo:text-align="start" style:justify-single-word="false" fo:background-color="transparent"/>
      <style:text-properties fo:font-size="15pt" officeooo:rsid="005cd23a" officeooo:paragraph-rsid="00841ebd" style:font-size-asian="15pt" style:font-size-complex="15pt"/>
    </style:style>
    <style:style style:name="P132" style:family="paragraph" style:parent-style-name="Standard" style:list-style-name="L11">
      <loext:graphic-properties draw:fill="none"/>
      <style:paragraph-properties fo:text-align="start" style:justify-single-word="false" fo:background-color="transparent"/>
      <style:text-properties fo:font-size="15pt" officeooo:rsid="005cd23a" officeooo:paragraph-rsid="00841ebd" style:font-size-asian="15pt" style:font-size-complex="15pt"/>
    </style:style>
    <style:style style:name="P133" style:family="paragraph" style:parent-style-name="Standard" style:list-style-name="L13">
      <loext:graphic-properties draw:fill="none"/>
      <style:paragraph-properties fo:text-align="start" style:justify-single-word="false" fo:background-color="transparent"/>
      <style:text-properties fo:font-size="15pt" officeooo:rsid="005cd23a" officeooo:paragraph-rsid="00841ebd" style:font-size-asian="15pt" style:font-size-complex="15pt"/>
    </style:style>
    <style:style style:name="P134" style:family="paragraph" style:parent-style-name="Standard">
      <style:paragraph-properties fo:text-align="start" style:justify-single-word="false"/>
      <style:text-properties fo:font-size="15pt" officeooo:rsid="005cd23a" officeooo:paragraph-rsid="00841ebd" style:font-size-asian="15pt" style:font-size-complex="15pt"/>
    </style:style>
    <style:style style:name="P135" style:family="paragraph" style:parent-style-name="Standard">
      <loext:graphic-properties draw:fill="none"/>
      <style:paragraph-properties fo:text-align="start" style:justify-single-word="false" fo:background-color="transparent"/>
      <style:text-properties fo:font-size="15pt" officeooo:rsid="005cd23a" officeooo:paragraph-rsid="00841ebd" style:font-size-asian="15pt" style:font-size-complex="15pt"/>
    </style:style>
    <style:style style:name="P136" style:family="paragraph" style:parent-style-name="Standard" style:list-style-name="L4">
      <loext:graphic-properties draw:fill="none"/>
      <style:paragraph-properties fo:text-align="start" style:justify-single-word="false" fo:background-color="transparent"/>
      <style:text-properties fo:font-size="15pt" officeooo:rsid="000d62b7" officeooo:paragraph-rsid="00779fe3" style:font-size-asian="15pt" style:font-size-complex="15pt"/>
    </style:style>
    <style:style style:name="P137" style:family="paragraph" style:parent-style-name="Standard" style:list-style-name="L4">
      <style:paragraph-properties fo:text-align="start" style:justify-single-word="false"/>
      <style:text-properties fo:font-size="15pt" officeooo:rsid="000d62b7" officeooo:paragraph-rsid="006cf741" style:font-size-asian="15pt" style:font-size-complex="15pt"/>
    </style:style>
    <style:style style:name="P138" style:family="paragraph" style:parent-style-name="Standard" style:list-style-name="L4">
      <style:paragraph-properties fo:text-align="start" style:justify-single-word="false"/>
      <style:text-properties fo:font-size="15pt" officeooo:rsid="000d62b7" officeooo:paragraph-rsid="000d62b7" style:font-size-asian="15pt" style:font-size-complex="15pt"/>
    </style:style>
    <style:style style:name="P139" style:family="paragraph" style:parent-style-name="Standard" style:list-style-name="L4">
      <style:paragraph-properties fo:text-align="start" style:justify-single-word="false"/>
      <style:text-properties fo:font-size="15pt" officeooo:rsid="000d62b7" officeooo:paragraph-rsid="0073add2" style:font-size-asian="15pt" style:font-size-complex="15pt"/>
    </style:style>
    <style:style style:name="P140" style:family="paragraph" style:parent-style-name="Standard" style:list-style-name="L7">
      <loext:graphic-properties draw:fill="none"/>
      <style:paragraph-properties fo:text-align="start" style:justify-single-word="false" fo:background-color="transparent"/>
      <style:text-properties fo:font-size="15pt" officeooo:rsid="000d62b7" officeooo:paragraph-rsid="0079805d" style:font-size-asian="15pt" style:font-size-complex="15pt"/>
    </style:style>
    <style:style style:name="P141" style:family="paragraph" style:parent-style-name="Standard" style:list-style-name="L10">
      <style:paragraph-properties fo:text-align="start" style:justify-single-word="false"/>
      <style:text-properties fo:font-size="15pt" officeooo:rsid="000d62b7" officeooo:paragraph-rsid="00841ebd" style:font-size-asian="15pt" style:font-size-complex="15pt"/>
    </style:style>
    <style:style style:name="P142" style:family="paragraph" style:parent-style-name="Standard" style:list-style-name="L14">
      <loext:graphic-properties draw:fill="none"/>
      <style:paragraph-properties fo:text-align="start" style:justify-single-word="false" fo:background-color="transparent"/>
      <style:text-properties fo:font-size="15pt" officeooo:rsid="000d62b7" officeooo:paragraph-rsid="00841ebd" style:font-size-asian="15pt" style:font-size-complex="15pt"/>
    </style:style>
    <style:style style:name="P143" style:family="paragraph" style:parent-style-name="Standard">
      <style:paragraph-properties fo:text-align="start" style:justify-single-word="false"/>
      <style:text-properties fo:font-size="15pt" officeooo:rsid="000d62b7" officeooo:paragraph-rsid="00841ebd" style:font-size-asian="15pt" style:font-size-complex="15pt"/>
    </style:style>
    <style:style style:name="P144" style:family="paragraph" style:parent-style-name="Standard" style:list-style-name="L4">
      <style:paragraph-properties fo:text-align="start" style:justify-single-word="false"/>
      <style:text-properties fo:font-size="15pt" officeooo:rsid="0073add2" officeooo:paragraph-rsid="0073add2" style:font-size-asian="15pt" style:font-size-complex="15pt"/>
    </style:style>
    <style:style style:name="P145" style:family="paragraph" style:parent-style-name="Standard" style:list-style-name="L10">
      <style:paragraph-properties fo:text-align="start" style:justify-single-word="false"/>
      <style:text-properties fo:font-size="15pt" officeooo:rsid="0073add2" officeooo:paragraph-rsid="00841ebd" style:font-size-asian="15pt" style:font-size-complex="15pt"/>
    </style:style>
    <style:style style:name="P146" style:family="paragraph" style:parent-style-name="Standard">
      <style:paragraph-properties fo:text-align="start" style:justify-single-word="false"/>
      <style:text-properties fo:font-size="15pt" officeooo:rsid="0073add2" officeooo:paragraph-rsid="00841ebd" style:font-size-asian="15pt" style:font-size-complex="15pt"/>
    </style:style>
    <style:style style:name="P147" style:family="paragraph" style:parent-style-name="Standard">
      <loext:graphic-properties draw:fill="none"/>
      <style:paragraph-properties fo:text-align="start" style:justify-single-word="false" fo:background-color="transparent"/>
      <style:text-properties fo:font-size="15pt" officeooo:rsid="0073add2" officeooo:paragraph-rsid="00841ebd" style:font-size-asian="15pt" style:font-size-complex="15pt"/>
    </style:style>
    <style:style style:name="P148" style:family="paragraph" style:parent-style-name="Standard" style:list-style-name="L4">
      <style:paragraph-properties fo:text-align="start" style:justify-single-word="false"/>
      <style:text-properties fo:font-size="15pt" officeooo:rsid="0010a043" officeooo:paragraph-rsid="00762472" style:font-size-asian="15pt" style:font-size-complex="15pt"/>
    </style:style>
    <style:style style:name="P149" style:family="paragraph" style:parent-style-name="Standard" style:list-style-name="L4">
      <style:paragraph-properties fo:text-align="start" style:justify-single-word="false"/>
      <style:text-properties fo:font-size="15pt" officeooo:rsid="0010a043" officeooo:paragraph-rsid="0010a043" style:font-size-asian="15pt" style:font-size-complex="15pt"/>
    </style:style>
    <style:style style:name="P150" style:family="paragraph" style:parent-style-name="Standard" style:list-style-name="L4">
      <style:paragraph-properties fo:text-align="start" style:justify-single-word="false"/>
      <style:text-properties fo:font-size="15pt" officeooo:rsid="0010a043" officeooo:paragraph-rsid="006cf741" style:font-size-asian="15pt" style:font-size-complex="15pt"/>
    </style:style>
    <style:style style:name="P151" style:family="paragraph" style:parent-style-name="Standard" style:list-style-name="L6">
      <style:paragraph-properties fo:text-align="start" style:justify-single-word="false"/>
      <style:text-properties fo:font-size="15pt" officeooo:rsid="0010a043" officeooo:paragraph-rsid="007c2a8c" style:font-size-asian="15pt" style:font-size-complex="15pt"/>
    </style:style>
    <style:style style:name="P152" style:family="paragraph" style:parent-style-name="Standard" style:list-style-name="L6">
      <loext:graphic-properties draw:fill="none"/>
      <style:paragraph-properties fo:text-align="start" style:justify-single-word="false" fo:background-color="transparent"/>
      <style:text-properties fo:font-size="15pt" officeooo:rsid="0010a043" officeooo:paragraph-rsid="007c2a8c" style:font-size-asian="15pt" style:font-size-complex="15pt"/>
    </style:style>
    <style:style style:name="P153" style:family="paragraph" style:parent-style-name="Standard" style:list-style-name="L3">
      <style:paragraph-properties fo:text-align="start" style:justify-single-word="false"/>
      <style:text-properties fo:font-size="15pt" officeooo:rsid="0010a043" officeooo:paragraph-rsid="007aa0a6" style:font-size-asian="15pt" style:font-size-complex="15pt"/>
    </style:style>
    <style:style style:name="P154" style:family="paragraph" style:parent-style-name="Standard" style:list-style-name="L3">
      <loext:graphic-properties draw:fill="none"/>
      <style:paragraph-properties fo:text-align="start" style:justify-single-word="false" fo:background-color="transparent"/>
      <style:text-properties fo:font-size="15pt" officeooo:rsid="0010a043" officeooo:paragraph-rsid="007aa0a6" style:font-size-asian="15pt" style:font-size-complex="15pt"/>
    </style:style>
    <style:style style:name="P155" style:family="paragraph" style:parent-style-name="Standard" style:list-style-name="L10">
      <style:paragraph-properties fo:text-align="start" style:justify-single-word="false"/>
      <style:text-properties fo:font-size="15pt" officeooo:rsid="0010a043" officeooo:paragraph-rsid="00841ebd" style:font-size-asian="15pt" style:font-size-complex="15pt"/>
    </style:style>
    <style:style style:name="P156" style:family="paragraph" style:parent-style-name="Standard">
      <style:paragraph-properties fo:text-align="start" style:justify-single-word="false"/>
      <style:text-properties fo:font-size="15pt" officeooo:rsid="0010a043" officeooo:paragraph-rsid="00841ebd" style:font-size-asian="15pt" style:font-size-complex="15pt"/>
    </style:style>
    <style:style style:name="P157" style:family="paragraph" style:parent-style-name="Standard" style:list-style-name="L4">
      <style:paragraph-properties fo:text-align="start" style:justify-single-word="false"/>
      <style:text-properties fo:font-size="15pt" officeooo:rsid="006cf741" officeooo:paragraph-rsid="006cf741" style:font-size-asian="15pt" style:font-size-complex="15pt"/>
    </style:style>
    <style:style style:name="P158" style:family="paragraph" style:parent-style-name="Standard" style:list-style-name="L6">
      <loext:graphic-properties draw:fill="none"/>
      <style:paragraph-properties fo:text-align="start" style:justify-single-word="false" fo:background-color="transparent"/>
      <style:text-properties fo:font-size="15pt" officeooo:rsid="006cf741" officeooo:paragraph-rsid="006cf741" style:font-size-asian="15pt" style:font-size-complex="15pt"/>
    </style:style>
    <style:style style:name="P159" style:family="paragraph" style:parent-style-name="Standard" style:list-style-name="L6">
      <loext:graphic-properties draw:fill="none"/>
      <style:paragraph-properties fo:text-align="start" style:justify-single-word="false" fo:background-color="transparent"/>
      <style:text-properties fo:font-size="15pt" officeooo:rsid="006cf741" officeooo:paragraph-rsid="007c2a8c" style:font-size-asian="15pt" style:font-size-complex="15pt"/>
    </style:style>
    <style:style style:name="P160" style:family="paragraph" style:parent-style-name="Standard" style:list-style-name="L6">
      <loext:graphic-properties draw:fill="none"/>
      <style:paragraph-properties fo:text-align="start" style:justify-single-word="false" fo:background-color="transparent"/>
      <style:text-properties fo:font-size="15pt" officeooo:rsid="006cf741" officeooo:paragraph-rsid="0080c2d5" style:font-size-asian="15pt" style:font-size-complex="15pt"/>
    </style:style>
    <style:style style:name="P161" style:family="paragraph" style:parent-style-name="Standard" style:list-style-name="L6">
      <loext:graphic-properties draw:fill="none"/>
      <style:paragraph-properties fo:text-align="start" style:justify-single-word="false" fo:background-color="transparent"/>
      <style:text-properties fo:font-size="15pt" officeooo:rsid="006cf741" officeooo:paragraph-rsid="007fcea8" style:font-size-asian="15pt" style:font-size-complex="15pt"/>
    </style:style>
    <style:style style:name="P162" style:family="paragraph" style:parent-style-name="Standard" style:list-style-name="L3">
      <loext:graphic-properties draw:fill="none"/>
      <style:paragraph-properties fo:text-align="start" style:justify-single-word="false" fo:background-color="transparent"/>
      <style:text-properties fo:font-size="15pt" officeooo:rsid="006cf741" officeooo:paragraph-rsid="00762472" style:font-size-asian="15pt" style:font-size-complex="15pt"/>
    </style:style>
    <style:style style:name="P163" style:family="paragraph" style:parent-style-name="Standard" style:list-style-name="L3">
      <loext:graphic-properties draw:fill="none"/>
      <style:paragraph-properties fo:text-align="start" style:justify-single-word="false" fo:background-color="transparent"/>
      <style:text-properties fo:font-size="15pt" officeooo:rsid="006cf741" officeooo:paragraph-rsid="006cf741" style:font-size-asian="15pt" style:font-size-complex="15pt"/>
    </style:style>
    <style:style style:name="P164" style:family="paragraph" style:parent-style-name="Standard" style:list-style-name="L1">
      <loext:graphic-properties draw:fill="none"/>
      <style:paragraph-properties fo:text-align="start" style:justify-single-word="false" fo:background-color="transparent"/>
      <style:text-properties fo:font-size="15pt" officeooo:rsid="006cf741" officeooo:paragraph-rsid="00841ebd" style:font-size-asian="15pt" style:font-size-complex="15pt"/>
    </style:style>
    <style:style style:name="P165" style:family="paragraph" style:parent-style-name="Standard" style:list-style-name="L10">
      <style:paragraph-properties fo:text-align="start" style:justify-single-word="false"/>
      <style:text-properties fo:font-size="15pt" officeooo:rsid="006cf741" officeooo:paragraph-rsid="00841ebd" style:font-size-asian="15pt" style:font-size-complex="15pt"/>
    </style:style>
    <style:style style:name="P166" style:family="paragraph" style:parent-style-name="Standard" style:list-style-name="L13">
      <loext:graphic-properties draw:fill="none"/>
      <style:paragraph-properties fo:text-align="start" style:justify-single-word="false" fo:background-color="transparent"/>
      <style:text-properties fo:font-size="15pt" officeooo:rsid="006cf741" officeooo:paragraph-rsid="00841ebd" style:font-size-asian="15pt" style:font-size-complex="15pt"/>
    </style:style>
    <style:style style:name="P167" style:family="paragraph" style:parent-style-name="Standard" style:list-style-name="L4">
      <loext:graphic-properties draw:fill="none"/>
      <style:paragraph-properties fo:text-align="start" style:justify-single-word="false" fo:background-color="transparent"/>
      <style:text-properties fo:font-size="15pt" officeooo:rsid="0053f1be" officeooo:paragraph-rsid="0073add2" style:font-size-asian="15pt" style:font-size-complex="15pt"/>
    </style:style>
    <style:style style:name="P168" style:family="paragraph" style:parent-style-name="Standard" style:list-style-name="L6">
      <loext:graphic-properties draw:fill="none"/>
      <style:paragraph-properties fo:text-align="start" style:justify-single-word="false" fo:background-color="transparent"/>
      <style:text-properties fo:font-size="15pt" officeooo:rsid="0053f1be" officeooo:paragraph-rsid="007fcea8" style:font-size-asian="15pt" style:font-size-complex="15pt"/>
    </style:style>
    <style:style style:name="P169" style:family="paragraph" style:parent-style-name="Standard" style:list-style-name="L3">
      <loext:graphic-properties draw:fill="none"/>
      <style:paragraph-properties fo:text-align="start" style:justify-single-word="false" fo:background-color="transparent"/>
      <style:text-properties fo:font-size="15pt" officeooo:rsid="0053f1be" officeooo:paragraph-rsid="006cf741" style:font-size-asian="15pt" style:font-size-complex="15pt"/>
    </style:style>
    <style:style style:name="P170" style:family="paragraph" style:parent-style-name="Standard" style:list-style-name="L3">
      <loext:graphic-properties draw:fill="none"/>
      <style:paragraph-properties fo:text-align="start" style:justify-single-word="false" fo:background-color="transparent"/>
      <style:text-properties fo:font-size="15pt" officeooo:rsid="0053f1be" officeooo:paragraph-rsid="00544124" style:font-size-asian="15pt" style:font-size-complex="15pt"/>
    </style:style>
    <style:style style:name="P171" style:family="paragraph" style:parent-style-name="Standard">
      <loext:graphic-properties draw:fill="none"/>
      <style:paragraph-properties fo:text-align="start" style:justify-single-word="false" fo:background-color="transparent"/>
      <style:text-properties fo:font-size="15pt" officeooo:rsid="0053f1be" officeooo:paragraph-rsid="00544124" style:font-size-asian="15pt" style:font-size-complex="15pt"/>
    </style:style>
    <style:style style:name="P172" style:family="paragraph" style:parent-style-name="Standard" style:list-style-name="L1">
      <loext:graphic-properties draw:fill="none"/>
      <style:paragraph-properties fo:text-align="start" style:justify-single-word="false" fo:background-color="transparent"/>
      <style:text-properties fo:font-size="15pt" officeooo:rsid="0053f1be" officeooo:paragraph-rsid="00841ebd" style:font-size-asian="15pt" style:font-size-complex="15pt"/>
    </style:style>
    <style:style style:name="P173" style:family="paragraph" style:parent-style-name="Standard">
      <loext:graphic-properties draw:fill="none"/>
      <style:paragraph-properties fo:text-align="start" style:justify-single-word="false" fo:background-color="transparent"/>
      <style:text-properties fo:font-size="15pt" officeooo:rsid="0053f1be" officeooo:paragraph-rsid="00841ebd" style:font-size-asian="15pt" style:font-size-complex="15pt"/>
    </style:style>
    <style:style style:name="P174" style:family="paragraph" style:parent-style-name="Standard" style:list-style-name="L10">
      <loext:graphic-properties draw:fill="none"/>
      <style:paragraph-properties fo:text-align="start" style:justify-single-word="false" fo:background-color="transparent"/>
      <style:text-properties fo:font-size="15pt" officeooo:rsid="0053f1be" officeooo:paragraph-rsid="00841ebd" style:font-size-asian="15pt" style:font-size-complex="15pt"/>
    </style:style>
    <style:style style:name="P175" style:family="paragraph" style:parent-style-name="Standard" style:list-style-name="L6">
      <loext:graphic-properties draw:fill="none"/>
      <style:paragraph-properties fo:text-align="start" style:justify-single-word="false" fo:background-color="transparent"/>
      <style:text-properties fo:font-size="15pt" officeooo:rsid="00328239" officeooo:paragraph-rsid="006cf741" style:font-size-asian="15pt" style:font-size-complex="15pt"/>
    </style:style>
    <style:style style:name="P176" style:family="paragraph" style:parent-style-name="Standard" style:list-style-name="L6">
      <loext:graphic-properties draw:fill="none"/>
      <style:paragraph-properties fo:text-align="start" style:justify-single-word="false" fo:background-color="transparent"/>
      <style:text-properties fo:font-size="15pt" officeooo:rsid="00328239" officeooo:paragraph-rsid="00328239" style:font-size-asian="15pt" style:font-size-complex="15pt"/>
    </style:style>
    <style:style style:name="P177" style:family="paragraph" style:parent-style-name="Standard" style:list-style-name="L6">
      <loext:graphic-properties draw:fill="none"/>
      <style:paragraph-properties fo:text-align="start" style:justify-single-word="false" fo:background-color="transparent"/>
      <style:text-properties fo:font-size="15pt" officeooo:rsid="00328239" officeooo:paragraph-rsid="0033ac45" style:font-size-asian="15pt" style:font-size-complex="15pt"/>
    </style:style>
    <style:style style:name="P178" style:family="paragraph" style:parent-style-name="Standard" style:list-style-name="L13">
      <loext:graphic-properties draw:fill="none"/>
      <style:paragraph-properties fo:text-align="start" style:justify-single-word="false" fo:background-color="transparent"/>
      <style:text-properties fo:font-size="15pt" officeooo:rsid="00328239" officeooo:paragraph-rsid="00841ebd" style:font-size-asian="15pt" style:font-size-complex="15pt"/>
    </style:style>
    <style:style style:name="P179" style:family="paragraph" style:parent-style-name="Standard">
      <loext:graphic-properties draw:fill="none"/>
      <style:paragraph-properties fo:text-align="start" style:justify-single-word="false" fo:background-color="transparent"/>
      <style:text-properties fo:font-size="15pt" officeooo:rsid="00328239" officeooo:paragraph-rsid="00841ebd" style:font-size-asian="15pt" style:font-size-complex="15pt"/>
    </style:style>
    <style:style style:name="P180" style:family="paragraph" style:parent-style-name="Standard" style:list-style-name="L6">
      <loext:graphic-properties draw:fill="none"/>
      <style:paragraph-properties fo:text-align="start" style:justify-single-word="false" fo:background-color="transparent"/>
      <style:text-properties fo:font-size="15pt" officeooo:rsid="0034eac7" officeooo:paragraph-rsid="0073add2" style:font-size-asian="15pt" style:font-size-complex="15pt"/>
    </style:style>
    <style:style style:name="P181" style:family="paragraph" style:parent-style-name="Standard" style:list-style-name="L6">
      <loext:graphic-properties draw:fill="none"/>
      <style:paragraph-properties fo:text-align="start" style:justify-single-word="false" fo:background-color="transparent"/>
      <style:text-properties fo:font-size="15pt" officeooo:rsid="0034eac7" officeooo:paragraph-rsid="006cf741" style:font-size-asian="15pt" style:font-size-complex="15pt"/>
    </style:style>
    <style:style style:name="P182" style:family="paragraph" style:parent-style-name="Standard" style:list-style-name="L6">
      <loext:graphic-properties draw:fill="none"/>
      <style:paragraph-properties fo:text-align="start" style:justify-single-word="false" fo:background-color="transparent"/>
      <style:text-properties fo:font-size="15pt" officeooo:rsid="0034eac7" officeooo:paragraph-rsid="0034eac7" style:font-size-asian="15pt" style:font-size-complex="15pt"/>
    </style:style>
    <style:style style:name="P183" style:family="paragraph" style:parent-style-name="Standard" style:list-style-name="L6">
      <loext:graphic-properties draw:fill="none"/>
      <style:paragraph-properties fo:text-align="start" style:justify-single-word="false" fo:background-color="transparent"/>
      <style:text-properties fo:font-size="15pt" officeooo:rsid="0034eac7" officeooo:paragraph-rsid="0035218f" style:font-size-asian="15pt" style:font-size-complex="15pt"/>
    </style:style>
    <style:style style:name="P184" style:family="paragraph" style:parent-style-name="Standard" style:list-style-name="L6">
      <loext:graphic-properties draw:fill="none"/>
      <style:paragraph-properties fo:text-align="start" style:justify-single-word="false" fo:background-color="transparent"/>
      <style:text-properties fo:font-size="15pt" officeooo:rsid="0034eac7" officeooo:paragraph-rsid="003608e2" style:font-size-asian="15pt" style:font-size-complex="15pt"/>
    </style:style>
    <style:style style:name="P185" style:family="paragraph" style:parent-style-name="Standard" style:list-style-name="L6">
      <loext:graphic-properties draw:fill="none"/>
      <style:paragraph-properties fo:text-align="start" style:justify-single-word="false" fo:background-color="transparent"/>
      <style:text-properties fo:font-size="15pt" officeooo:rsid="0034eac7" officeooo:paragraph-rsid="00762472" style:font-size-asian="15pt" style:font-size-complex="15pt"/>
    </style:style>
    <style:style style:name="P186" style:family="paragraph" style:parent-style-name="Standard" style:list-style-name="L6">
      <loext:graphic-properties draw:fill="none"/>
      <style:paragraph-properties fo:text-align="start" style:justify-single-word="false" fo:background-color="transparent"/>
      <style:text-properties fo:font-size="15pt" officeooo:rsid="0034eac7" officeooo:paragraph-rsid="00779fe3" style:font-size-asian="15pt" style:font-size-complex="15pt"/>
    </style:style>
    <style:style style:name="P187" style:family="paragraph" style:parent-style-name="Standard" style:list-style-name="L3">
      <loext:graphic-properties draw:fill="none"/>
      <style:paragraph-properties fo:text-align="start" style:justify-single-word="false" fo:background-color="transparent"/>
      <style:text-properties fo:font-size="15pt" officeooo:rsid="0034eac7" officeooo:paragraph-rsid="00762472" style:font-size-asian="15pt" style:font-size-complex="15pt"/>
    </style:style>
    <style:style style:name="P188" style:family="paragraph" style:parent-style-name="Standard" style:list-style-name="L13">
      <loext:graphic-properties draw:fill="none"/>
      <style:paragraph-properties fo:text-align="start" style:justify-single-word="false" fo:background-color="transparent"/>
      <style:text-properties fo:font-size="15pt" officeooo:rsid="0034eac7" officeooo:paragraph-rsid="00841ebd" style:font-size-asian="15pt" style:font-size-complex="15pt"/>
    </style:style>
    <style:style style:name="P189" style:family="paragraph" style:parent-style-name="Standard">
      <loext:graphic-properties draw:fill="none"/>
      <style:paragraph-properties fo:text-align="start" style:justify-single-word="false" fo:background-color="transparent"/>
      <style:text-properties fo:font-size="15pt" officeooo:rsid="0034eac7" officeooo:paragraph-rsid="00841ebd" style:font-size-asian="15pt" style:font-size-complex="15pt"/>
    </style:style>
    <style:style style:name="P190" style:family="paragraph" style:parent-style-name="Standard" style:list-style-name="L6">
      <loext:graphic-properties draw:fill="none"/>
      <style:paragraph-properties fo:text-align="start" style:justify-single-word="false" fo:background-color="transparent"/>
      <style:text-properties fo:font-size="15pt" officeooo:rsid="0079805d" officeooo:paragraph-rsid="0079805d" style:font-size-asian="15pt" style:font-size-complex="15pt"/>
    </style:style>
    <style:style style:name="P191" style:family="paragraph" style:parent-style-name="Standard" style:list-style-name="L13">
      <loext:graphic-properties draw:fill="none"/>
      <style:paragraph-properties fo:text-align="start" style:justify-single-word="false" fo:background-color="transparent"/>
      <style:text-properties fo:font-size="15pt" officeooo:rsid="0079805d" officeooo:paragraph-rsid="00841ebd" style:font-size-asian="15pt" style:font-size-complex="15pt"/>
    </style:style>
    <style:style style:name="P192" style:family="paragraph" style:parent-style-name="Standard">
      <style:paragraph-properties fo:text-align="start" style:justify-single-word="false"/>
      <style:text-properties fo:font-size="15pt" officeooo:rsid="0079805d" officeooo:paragraph-rsid="00841ebd" style:font-size-asian="15pt" style:font-size-complex="15pt"/>
    </style:style>
    <style:style style:name="P193" style:family="paragraph" style:parent-style-name="Standard">
      <loext:graphic-properties draw:fill="none"/>
      <style:paragraph-properties fo:text-align="start" style:justify-single-word="false" fo:background-color="transparent"/>
      <style:text-properties fo:font-size="15pt" officeooo:rsid="0079805d" officeooo:paragraph-rsid="00841ebd" style:font-size-asian="15pt" style:font-size-complex="15pt"/>
    </style:style>
    <style:style style:name="P194" style:family="paragraph" style:parent-style-name="Standard" style:list-style-name="L6">
      <loext:graphic-properties draw:fill="none"/>
      <style:paragraph-properties fo:text-align="start" style:justify-single-word="false" fo:background-color="transparent"/>
      <style:text-properties fo:font-size="15pt" officeooo:rsid="003608e2" officeooo:paragraph-rsid="003608e2" style:font-size-asian="15pt" style:font-size-complex="15pt"/>
    </style:style>
    <style:style style:name="P195" style:family="paragraph" style:parent-style-name="Standard" style:list-style-name="L6">
      <loext:graphic-properties draw:fill="none"/>
      <style:paragraph-properties fo:text-align="start" style:justify-single-word="false" fo:background-color="transparent"/>
      <style:text-properties fo:font-size="15pt" officeooo:rsid="003608e2" officeooo:paragraph-rsid="006cf741" style:font-size-asian="15pt" style:font-size-complex="15pt"/>
    </style:style>
    <style:style style:name="P196" style:family="paragraph" style:parent-style-name="Standard" style:list-style-name="L6">
      <loext:graphic-properties draw:fill="none"/>
      <style:paragraph-properties fo:text-align="start" style:justify-single-word="false" fo:background-color="transparent"/>
      <style:text-properties fo:font-size="15pt" officeooo:rsid="003608e2" officeooo:paragraph-rsid="00375724" style:font-size-asian="15pt" style:font-size-complex="15pt"/>
    </style:style>
    <style:style style:name="P197" style:family="paragraph" style:parent-style-name="Standard" style:list-style-name="L6">
      <loext:graphic-properties draw:fill="none"/>
      <style:paragraph-properties fo:text-align="start" style:justify-single-word="false" fo:background-color="transparent"/>
      <style:text-properties fo:font-size="15pt" officeooo:rsid="003608e2" officeooo:paragraph-rsid="006a281e" style:font-size-asian="15pt" style:font-size-complex="15pt"/>
    </style:style>
    <style:style style:name="P198" style:family="paragraph" style:parent-style-name="Standard" style:list-style-name="L6">
      <loext:graphic-properties draw:fill="none"/>
      <style:paragraph-properties fo:text-align="start" style:justify-single-word="false" fo:background-color="transparent"/>
      <style:text-properties fo:font-size="15pt" officeooo:rsid="003608e2" officeooo:paragraph-rsid="0082583f" style:font-size-asian="15pt" style:font-size-complex="15pt"/>
    </style:style>
    <style:style style:name="P199" style:family="paragraph" style:parent-style-name="Standard" style:list-style-name="L9">
      <loext:graphic-properties draw:fill="none"/>
      <style:paragraph-properties fo:text-align="start" style:justify-single-word="false" fo:background-color="transparent"/>
      <style:text-properties fo:font-size="15pt" officeooo:rsid="003608e2" officeooo:paragraph-rsid="007ddef2" style:font-size-asian="15pt" style:font-size-complex="15pt"/>
    </style:style>
    <style:style style:name="P200" style:family="paragraph" style:parent-style-name="Standard" style:list-style-name="L3">
      <loext:graphic-properties draw:fill="none"/>
      <style:paragraph-properties fo:text-align="start" style:justify-single-word="false" fo:background-color="transparent"/>
      <style:text-properties fo:font-size="15pt" officeooo:rsid="003f748d" officeooo:paragraph-rsid="006cf741" style:font-size-asian="15pt" style:font-size-complex="15pt"/>
    </style:style>
    <style:style style:name="P201" style:family="paragraph" style:parent-style-name="Standard" style:list-style-name="L3">
      <loext:graphic-properties draw:fill="none"/>
      <style:paragraph-properties fo:text-align="start" style:justify-single-word="false" fo:background-color="transparent"/>
      <style:text-properties fo:font-size="15pt" officeooo:rsid="003f748d" officeooo:paragraph-rsid="00762472" style:font-size-asian="15pt" style:font-size-complex="15pt"/>
    </style:style>
    <style:style style:name="P202" style:family="paragraph" style:parent-style-name="Standard" style:list-style-name="L3">
      <loext:graphic-properties draw:fill="none"/>
      <style:paragraph-properties fo:text-align="start" style:justify-single-word="false" fo:background-color="transparent"/>
      <style:text-properties fo:font-size="15pt" officeooo:rsid="003f748d" officeooo:paragraph-rsid="003f748d" style:font-size-asian="15pt" style:font-size-complex="15pt"/>
    </style:style>
    <style:style style:name="P203" style:family="paragraph" style:parent-style-name="Standard">
      <loext:graphic-properties draw:fill="none"/>
      <style:paragraph-properties fo:text-align="start" style:justify-single-word="false" fo:background-color="transparent"/>
      <style:text-properties fo:font-size="15pt" officeooo:rsid="003f748d" officeooo:paragraph-rsid="003f748d" style:font-size-asian="15pt" style:font-size-complex="15pt"/>
    </style:style>
    <style:style style:name="P204" style:family="paragraph" style:parent-style-name="Standard" style:list-style-name="L3">
      <loext:graphic-properties draw:fill="none"/>
      <style:paragraph-properties fo:text-align="start" style:justify-single-word="false" fo:background-color="transparent"/>
      <style:text-properties fo:font-size="15pt" officeooo:rsid="0080c2d5" officeooo:paragraph-rsid="0082583f" style:font-size-asian="15pt" style:font-size-complex="15pt"/>
    </style:style>
    <style:style style:name="P205" style:family="paragraph" style:parent-style-name="Standard" style:list-style-name="L3">
      <loext:graphic-properties draw:fill="none"/>
      <style:paragraph-properties fo:text-align="start" style:justify-single-word="false" fo:background-color="transparent"/>
      <style:text-properties fo:font-size="15pt" officeooo:rsid="0042cd78" officeooo:paragraph-rsid="003f748d" style:font-size-asian="15pt" style:font-size-complex="15pt"/>
    </style:style>
    <style:style style:name="P206" style:family="paragraph" style:parent-style-name="Standard" style:list-style-name="L3">
      <loext:graphic-properties draw:fill="none"/>
      <style:paragraph-properties fo:text-align="start" style:justify-single-word="false" fo:background-color="transparent"/>
      <style:text-properties fo:font-size="15pt" officeooo:rsid="0045d2dc" officeooo:paragraph-rsid="003f748d" style:font-size-asian="15pt" style:font-size-complex="15pt"/>
    </style:style>
    <style:style style:name="P207" style:family="paragraph" style:parent-style-name="Standard" style:list-style-name="L3">
      <loext:graphic-properties draw:fill="none"/>
      <style:paragraph-properties fo:text-align="start" style:justify-single-word="false" fo:background-color="transparent"/>
      <style:text-properties fo:font-size="15pt" officeooo:rsid="004bee24" officeooo:paragraph-rsid="003f748d" style:font-size-asian="15pt" style:font-size-complex="15pt"/>
    </style:style>
    <style:style style:name="P208" style:family="paragraph" style:parent-style-name="Standard" style:list-style-name="L3">
      <loext:graphic-properties draw:fill="none"/>
      <style:paragraph-properties fo:text-align="start" style:justify-single-word="false" fo:background-color="transparent"/>
      <style:text-properties fo:font-size="15pt" officeooo:rsid="004bee24" officeooo:paragraph-rsid="004bee24" style:font-size-asian="15pt" style:font-size-complex="15pt"/>
    </style:style>
    <style:style style:name="P209" style:family="paragraph" style:parent-style-name="Standard">
      <loext:graphic-properties draw:fill="none"/>
      <style:paragraph-properties fo:text-align="start" style:justify-single-word="false" fo:background-color="transparent"/>
      <style:text-properties fo:font-size="15pt" officeooo:rsid="004bee24" officeooo:paragraph-rsid="004bee24" style:font-size-asian="15pt" style:font-size-complex="15pt"/>
    </style:style>
    <style:style style:name="P210" style:family="paragraph" style:parent-style-name="Standard" style:list-style-name="L3">
      <loext:graphic-properties draw:fill="none"/>
      <style:paragraph-properties fo:text-align="start" style:justify-single-word="false" fo:background-color="transparent"/>
      <style:text-properties fo:font-size="15pt" officeooo:rsid="00513646" officeooo:paragraph-rsid="004bee24" style:font-size-asian="15pt" style:font-size-complex="15pt"/>
    </style:style>
    <style:style style:name="P211" style:family="paragraph" style:parent-style-name="Standard" style:list-style-name="L3">
      <loext:graphic-properties draw:fill="none"/>
      <style:paragraph-properties fo:text-align="start" style:justify-single-word="false" fo:background-color="transparent"/>
      <style:text-properties fo:font-size="15pt" officeooo:rsid="0051f38f" officeooo:paragraph-rsid="0053f1be" style:font-size-asian="15pt" style:font-size-complex="15pt"/>
    </style:style>
    <style:style style:name="P212" style:family="paragraph" style:parent-style-name="Standard" style:list-style-name="L3">
      <loext:graphic-properties draw:fill="none"/>
      <style:paragraph-properties fo:text-align="start" style:justify-single-word="false" fo:background-color="transparent"/>
      <style:text-properties fo:font-size="15pt" officeooo:rsid="00544124" officeooo:paragraph-rsid="00544124" style:font-size-asian="15pt" style:font-size-complex="15pt"/>
    </style:style>
    <style:style style:name="P213" style:family="paragraph" style:parent-style-name="Standard" style:list-style-name="L3">
      <loext:graphic-properties draw:fill="none"/>
      <style:paragraph-properties fo:text-align="start" style:justify-single-word="false" fo:background-color="transparent"/>
      <style:text-properties fo:font-size="15pt" officeooo:rsid="00544124" officeooo:paragraph-rsid="006cf741" style:font-size-asian="15pt" style:font-size-complex="15pt"/>
    </style:style>
    <style:style style:name="P214" style:family="paragraph" style:parent-style-name="Standard" style:list-style-name="L3">
      <loext:graphic-properties draw:fill="none"/>
      <style:paragraph-properties fo:text-align="start" style:justify-single-word="false" fo:background-color="transparent"/>
      <style:text-properties fo:font-size="15pt" officeooo:rsid="0056c779" officeooo:paragraph-rsid="0056bdd4" style:font-size-asian="15pt" style:font-size-complex="15pt"/>
    </style:style>
    <style:style style:name="P215" style:family="paragraph" style:parent-style-name="Standard" style:list-style-name="L1">
      <loext:graphic-properties draw:fill="none"/>
      <style:paragraph-properties fo:text-align="start" style:justify-single-word="false" fo:background-color="transparent"/>
      <style:text-properties fo:font-size="15pt" officeooo:rsid="0056c779" officeooo:paragraph-rsid="00841ebd" style:font-size-asian="15pt" style:font-size-complex="15pt"/>
    </style:style>
    <style:style style:name="P216" style:family="paragraph" style:parent-style-name="Standard">
      <loext:graphic-properties draw:fill="none"/>
      <style:paragraph-properties fo:text-align="start" style:justify-single-word="false" fo:background-color="transparent"/>
      <style:text-properties fo:font-size="15pt" officeooo:rsid="007aa0a6" officeooo:paragraph-rsid="00841ebd" style:font-size-asian="15pt" style:font-size-complex="15pt"/>
    </style:style>
    <style:style style:name="P217" style:family="paragraph" style:parent-style-name="Standard">
      <style:paragraph-properties fo:text-align="start" style:justify-single-word="false"/>
      <style:text-properties fo:font-size="15pt" officeooo:rsid="0006ded2" officeooo:paragraph-rsid="00841ebd" style:font-size-asian="15pt" style:font-size-complex="15pt"/>
    </style:style>
    <style:style style:name="P218" style:family="paragraph" style:parent-style-name="Standard">
      <style:paragraph-properties fo:text-align="start" style:justify-single-word="false"/>
      <style:text-properties fo:font-size="15pt" officeooo:rsid="00705063" officeooo:paragraph-rsid="00841ebd" style:font-size-asian="15pt" style:font-size-complex="15pt"/>
    </style:style>
    <style:style style:name="P219" style:family="paragraph" style:parent-style-name="Standard">
      <style:paragraph-properties fo:text-align="start" style:justify-single-word="false"/>
      <style:text-properties fo:font-size="15pt" officeooo:rsid="00841ebd" officeooo:paragraph-rsid="00841ebd" style:font-size-asian="15pt" style:font-size-complex="15pt"/>
    </style:style>
    <style:style style:name="P220" style:family="paragraph" style:parent-style-name="Standard" style:list-style-name="L10">
      <style:paragraph-properties fo:text-align="start" style:justify-single-word="false"/>
      <style:text-properties fo:font-size="15pt" officeooo:rsid="00841ebd" officeooo:paragraph-rsid="00841ebd" style:font-size-asian="15pt" style:font-size-complex="15pt"/>
    </style:style>
    <style:style style:name="P221" style:family="paragraph" style:parent-style-name="Standard" style:list-style-name="L3">
      <loext:graphic-properties draw:fill="none"/>
      <style:paragraph-properties fo:text-align="start" style:justify-single-word="false" fo:background-color="transparent"/>
      <style:text-properties officeooo:paragraph-rsid="007fcea8"/>
    </style:style>
    <style:style style:name="P222" style:family="paragraph" style:parent-style-name="Standard" style:list-style-name="L3">
      <loext:graphic-properties draw:fill="none"/>
      <style:paragraph-properties fo:text-align="start" style:justify-single-word="false" fo:background-color="transparent"/>
      <style:text-properties officeooo:paragraph-rsid="0071c7f7"/>
    </style:style>
    <style:style style:name="P223" style:family="paragraph" style:parent-style-name="Standard" style:list-style-name="L3">
      <loext:graphic-properties draw:fill="none"/>
      <style:paragraph-properties fo:text-align="start" style:justify-single-word="false" fo:background-color="transparent"/>
      <style:text-properties officeooo:paragraph-rsid="0073add2"/>
    </style:style>
    <style:style style:name="P224" style:family="paragraph" style:parent-style-name="Standard" style:list-style-name="L3">
      <loext:graphic-properties draw:fill="none"/>
      <style:paragraph-properties fo:text-align="start" style:justify-single-word="false" fo:background-color="transparent"/>
      <style:text-properties officeooo:paragraph-rsid="00762472"/>
    </style:style>
    <style:style style:name="P225" style:family="paragraph" style:parent-style-name="Standard" style:list-style-name="L3">
      <loext:graphic-properties draw:fill="none"/>
      <style:paragraph-properties fo:text-align="start" style:justify-single-word="false" fo:background-color="transparent"/>
      <style:text-properties officeooo:paragraph-rsid="006cf741"/>
    </style:style>
    <style:style style:name="P226" style:family="paragraph" style:parent-style-name="Standard" style:list-style-name="L3">
      <loext:graphic-properties draw:fill="none"/>
      <style:paragraph-properties fo:text-align="start" style:justify-single-word="false" fo:background-color="transparent"/>
      <style:text-properties officeooo:paragraph-rsid="003f748d"/>
    </style:style>
    <style:style style:name="P227" style:family="paragraph" style:parent-style-name="Standard" style:list-style-name="L3">
      <loext:graphic-properties draw:fill="none"/>
      <style:paragraph-properties fo:text-align="start" style:justify-single-word="false" fo:background-color="transparent"/>
      <style:text-properties officeooo:paragraph-rsid="0045d2dc"/>
    </style:style>
    <style:style style:name="P228" style:family="paragraph" style:parent-style-name="Standard" style:list-style-name="L3">
      <loext:graphic-properties draw:fill="none"/>
      <style:paragraph-properties fo:text-align="start" style:justify-single-word="false" fo:background-color="transparent"/>
      <style:text-properties officeooo:paragraph-rsid="004bee24"/>
    </style:style>
    <style:style style:name="P229" style:family="paragraph" style:parent-style-name="Standard" style:list-style-name="L3">
      <loext:graphic-properties draw:fill="none"/>
      <style:paragraph-properties fo:text-align="start" style:justify-single-word="false" fo:background-color="transparent"/>
      <style:text-properties officeooo:paragraph-rsid="00544124"/>
    </style:style>
    <style:style style:name="P230" style:family="paragraph" style:parent-style-name="Standard" style:list-style-name="L3">
      <loext:graphic-properties draw:fill="none"/>
      <style:paragraph-properties fo:text-align="start" style:justify-single-word="false" fo:background-color="transparent"/>
      <style:text-properties officeooo:paragraph-rsid="0056bdd4"/>
    </style:style>
    <style:style style:name="P231" style:family="paragraph" style:parent-style-name="Standard" style:list-style-name="L2">
      <loext:graphic-properties draw:fill="none"/>
      <style:paragraph-properties fo:text-align="start" style:justify-single-word="false" fo:background-color="transparent"/>
      <style:text-properties officeooo:paragraph-rsid="0078591c"/>
    </style:style>
    <style:style style:name="P232" style:family="paragraph" style:parent-style-name="Standard" style:list-style-name="L5">
      <loext:graphic-properties draw:fill="none"/>
      <style:paragraph-properties fo:text-align="start" style:justify-single-word="false" fo:background-color="transparent"/>
      <style:text-properties officeooo:paragraph-rsid="007fcea8"/>
    </style:style>
    <style:style style:name="P233" style:family="paragraph" style:parent-style-name="Standard" style:list-style-name="L5">
      <loext:graphic-properties draw:fill="none"/>
      <style:paragraph-properties fo:text-align="start" style:justify-single-word="false" fo:background-color="transparent"/>
      <style:text-properties officeooo:paragraph-rsid="00841ebd"/>
    </style:style>
    <style:style style:name="P234" style:family="paragraph" style:parent-style-name="Standard" style:list-style-name="L4">
      <loext:graphic-properties draw:fill="none"/>
      <style:paragraph-properties fo:text-align="start" style:justify-single-word="false" fo:background-color="transparent"/>
      <style:text-properties officeooo:paragraph-rsid="0073add2"/>
    </style:style>
    <style:style style:name="P235" style:family="paragraph" style:parent-style-name="Standard" style:list-style-name="L6">
      <loext:graphic-properties draw:fill="none"/>
      <style:paragraph-properties fo:text-align="start" style:justify-single-word="false" fo:background-color="transparent"/>
      <style:text-properties officeooo:paragraph-rsid="0079805d"/>
    </style:style>
    <style:style style:name="P236" style:family="paragraph" style:parent-style-name="Standard" style:list-style-name="L6">
      <loext:graphic-properties draw:fill="none"/>
      <style:paragraph-properties fo:text-align="start" style:justify-single-word="false" fo:background-color="transparent"/>
      <style:text-properties officeooo:paragraph-rsid="007c2a8c"/>
    </style:style>
    <style:style style:name="P237" style:family="paragraph" style:parent-style-name="Standard" style:list-style-name="L1">
      <loext:graphic-properties draw:fill="none"/>
      <style:paragraph-properties fo:text-align="start" style:justify-single-word="false" fo:background-color="transparent"/>
      <style:text-properties officeooo:paragraph-rsid="00841ebd"/>
    </style:style>
    <style:style style:name="P238" style:family="paragraph" style:parent-style-name="Standard">
      <loext:graphic-properties draw:fill="none"/>
      <style:paragraph-properties fo:text-align="start" style:justify-single-word="false" fo:background-color="transparent"/>
      <style:text-properties officeooo:paragraph-rsid="0078591c"/>
    </style:style>
    <style:style style:name="P239" style:family="paragraph" style:parent-style-name="Standard" style:list-style-name="L11">
      <loext:graphic-properties draw:fill="none"/>
      <style:paragraph-properties fo:text-align="start" style:justify-single-word="false" fo:background-color="transparent"/>
      <style:text-properties officeooo:paragraph-rsid="00841ebd"/>
    </style:style>
    <style:style style:name="P240" style:family="paragraph" style:parent-style-name="Standard" style:list-style-name="L10">
      <style:paragraph-properties fo:text-align="start" style:justify-single-word="false"/>
      <style:text-properties officeooo:paragraph-rsid="00841ebd"/>
    </style:style>
    <style:style style:name="P241" style:family="paragraph" style:parent-style-name="Standard" style:list-style-name="L10">
      <loext:graphic-properties draw:fill="none"/>
      <style:paragraph-properties fo:text-align="start" style:justify-single-word="false" fo:background-color="transparent"/>
      <style:text-properties officeooo:paragraph-rsid="00841ebd"/>
    </style:style>
    <style:style style:name="P242" style:family="paragraph" style:parent-style-name="Standard" style:list-style-name="L13">
      <loext:graphic-properties draw:fill="none"/>
      <style:paragraph-properties fo:text-align="start" style:justify-single-word="false" fo:background-color="transparent"/>
      <style:text-properties officeooo:paragraph-rsid="00841ebd"/>
    </style:style>
    <style:style style:name="P243" style:family="paragraph" style:parent-style-name="Standard" style:list-style-name="L5">
      <loext:graphic-properties draw:fill="none"/>
      <style:paragraph-properties fo:text-align="start" style:justify-single-word="false" fo:background-color="transparent"/>
      <style:text-properties officeooo:rsid="0053f1be" officeooo:paragraph-rsid="007fcea8"/>
    </style:style>
    <style:style style:name="P244" style:family="paragraph" style:parent-style-name="Standard" style:list-style-name="L3">
      <loext:graphic-properties draw:fill="none"/>
      <style:paragraph-properties fo:text-align="start" style:justify-single-word="false" fo:background-color="transparent"/>
      <style:text-properties officeooo:rsid="0053f1be" officeooo:paragraph-rsid="006cf741"/>
    </style:style>
    <style:style style:name="P245" style:family="paragraph" style:parent-style-name="Standard" style:list-style-name="L3">
      <loext:graphic-properties draw:fill="none"/>
      <style:paragraph-properties fo:text-align="start" style:justify-single-word="false" fo:background-color="transparent"/>
      <style:text-properties officeooo:rsid="0053f1be" officeooo:paragraph-rsid="0053f1be"/>
    </style:style>
    <style:style style:name="P246" style:family="paragraph" style:parent-style-name="Standard" style:list-style-name="L3">
      <loext:graphic-properties draw:fill="none"/>
      <style:paragraph-properties fo:text-align="start" style:justify-single-word="false" fo:background-color="transparent"/>
      <style:text-properties officeooo:rsid="0053f1be" officeooo:paragraph-rsid="00544124"/>
    </style:style>
    <style:style style:name="P247" style:family="paragraph" style:parent-style-name="Standard" style:list-style-name="L3">
      <loext:graphic-properties draw:fill="none"/>
      <style:paragraph-properties fo:text-align="start" style:justify-single-word="false" fo:background-color="transparent"/>
      <style:text-properties officeooo:rsid="006cf741" officeooo:paragraph-rsid="006cf741"/>
    </style:style>
    <style:style style:name="P248" style:family="paragraph" style:parent-style-name="Standard" style:list-style-name="L4" style:master-page-name="">
      <loext:graphic-properties draw:fill="none"/>
      <style:paragraph-properties fo:margin-left="1.3cm" fo:margin-right="0cm" fo:text-align="start" style:justify-single-word="false" fo:text-indent="-0.6cm" style:auto-text-indent="false" style:page-number="auto" fo:background-color="transparent"/>
      <style:text-properties fo:font-size="15pt" officeooo:rsid="0010a043" officeooo:paragraph-rsid="0010a043" style:font-size-asian="15pt" style:font-size-complex="15pt"/>
    </style:style>
    <style:style style:name="P249" style:family="paragraph" style:parent-style-name="Standard" style:list-style-name="L4">
      <loext:graphic-properties draw:fill="none"/>
      <style:paragraph-properties fo:margin-left="1.3cm" fo:margin-right="0cm" fo:text-align="start" style:justify-single-word="false" fo:text-indent="-0.6cm" style:auto-text-indent="false" fo:background-color="transparent"/>
      <style:text-properties style:text-position="super 58%" fo:font-size="15pt" officeooo:rsid="0010a043" officeooo:paragraph-rsid="0010a043" style:font-size-asian="15pt" style:font-size-complex="15pt"/>
    </style:style>
    <style:style style:name="P250" style:family="paragraph" style:parent-style-name="Standard" style:list-style-name="L10">
      <loext:graphic-properties draw:fill="none"/>
      <style:paragraph-properties fo:margin-left="1.3cm" fo:margin-right="0cm" fo:text-align="start" style:justify-single-word="false" fo:text-indent="-0.6cm" style:auto-text-indent="false" fo:background-color="transparent"/>
      <style:text-properties style:text-position="super 58%" fo:font-size="15pt" officeooo:rsid="0010a043" officeooo:paragraph-rsid="00841ebd" style:font-size-asian="15pt" style:font-size-complex="15pt"/>
    </style:style>
    <style:style style:name="P251" style:family="paragraph" style:parent-style-name="Standard" style:list-style-name="L4">
      <loext:graphic-properties draw:fill="none"/>
      <style:paragraph-properties fo:margin-left="1.3cm" fo:margin-right="0cm" fo:text-align="start" style:justify-single-word="false" fo:text-indent="-0.6cm" style:auto-text-indent="false" fo:background-color="transparent"/>
      <style:text-properties fo:font-size="15pt" officeooo:rsid="0073add2" officeooo:paragraph-rsid="0073add2" style:font-size-asian="15pt" style:font-size-complex="15pt"/>
    </style:style>
    <style:style style:name="P252" style:family="paragraph" style:parent-style-name="Standard" style:list-style-name="L10">
      <loext:graphic-properties draw:fill="none"/>
      <style:paragraph-properties fo:margin-left="1.3cm" fo:margin-right="0cm" fo:text-align="start" style:justify-single-word="false" fo:text-indent="-0.6cm" style:auto-text-indent="false" fo:background-color="transparent"/>
      <style:text-properties fo:font-size="15pt" officeooo:rsid="0073add2" officeooo:paragraph-rsid="00841ebd" style:font-size-asian="15pt" style:font-size-complex="15pt"/>
    </style:style>
    <style:style style:name="P253" style:family="paragraph" style:parent-style-name="Standard" style:list-style-name="L4">
      <loext:graphic-properties draw:fill="none"/>
      <style:paragraph-properties fo:margin-left="1.3cm" fo:margin-right="0cm" fo:text-align="start" style:justify-single-word="false" fo:text-indent="-0.6cm" style:auto-text-indent="false" fo:background-color="transparent"/>
      <style:text-properties fo:font-size="15pt" officeooo:rsid="0053f1be" officeooo:paragraph-rsid="0073add2" style:font-size-asian="15pt" style:font-size-complex="15pt"/>
    </style:style>
    <style:style style:name="P254" style:family="paragraph" style:parent-style-name="Standard" style:list-style-name="L10">
      <loext:graphic-properties draw:fill="none"/>
      <style:paragraph-properties fo:margin-left="1.3cm" fo:margin-right="0cm" fo:text-align="start" style:justify-single-word="false" fo:text-indent="-0.6cm" style:auto-text-indent="false" fo:background-color="transparent"/>
      <style:text-properties fo:font-size="15pt" officeooo:rsid="0053f1be" officeooo:paragraph-rsid="00841ebd" style:font-size-asian="15pt" style:font-size-complex="15pt"/>
    </style:style>
    <style:style style:name="P255" style:family="paragraph" style:parent-style-name="Standard" style:list-style-name="L10" style:master-page-name="">
      <loext:graphic-properties draw:fill="none"/>
      <style:paragraph-properties fo:margin-left="1.3cm" fo:margin-right="0cm" fo:text-align="start" style:justify-single-word="false" fo:text-indent="-0.6cm" style:auto-text-indent="false" style:page-number="auto" fo:background-color="transparent"/>
      <style:text-properties fo:font-size="15pt" officeooo:rsid="0010a043" officeooo:paragraph-rsid="00841ebd" style:font-size-asian="15pt" style:font-size-complex="15pt"/>
    </style:style>
    <style:style style:name="P256" style:family="paragraph" style:parent-style-name="Standard">
      <loext:graphic-properties draw:fill="none"/>
      <style:paragraph-properties fo:margin-left="0.7cm" fo:margin-right="0cm" fo:text-align="start" style:justify-single-word="false" fo:text-indent="0cm" style:auto-text-indent="false" fo:background-color="transparent"/>
      <style:text-properties fo:font-size="15pt" officeooo:rsid="0015d37b" officeooo:paragraph-rsid="00841ebd" style:font-size-asian="15pt" style:font-size-complex="15pt"/>
    </style:style>
    <style:style style:name="P257" style:family="paragraph" style:parent-style-name="Table_20_Contents">
      <style:paragraph-properties fo:text-align="start" style:justify-single-word="false"/>
      <style:text-properties fo:font-size="15pt" officeooo:rsid="001a0a16" officeooo:paragraph-rsid="00841ebd" style:font-size-asian="15pt" style:font-size-complex="15pt"/>
    </style:style>
    <style:style style:name="P258" style:family="paragraph" style:parent-style-name="Table_20_Contents">
      <style:paragraph-properties fo:text-align="start" style:justify-single-word="false"/>
      <style:text-properties fo:font-size="15pt" officeooo:paragraph-rsid="00841ebd" style:font-size-asian="15pt" style:font-size-complex="15pt"/>
    </style:style>
    <style:style style:name="P259" style:family="paragraph" style:parent-style-name="Table_20_Contents">
      <style:paragraph-properties fo:text-align="start" style:justify-single-word="false"/>
      <style:text-properties fo:font-size="15pt" officeooo:rsid="00328239" officeooo:paragraph-rsid="00841ebd" style:font-size-asian="15pt" style:font-size-complex="15pt"/>
    </style:style>
    <style:style style:name="T1" style:family="text">
      <style:text-properties officeooo:rsid="000843d4"/>
    </style:style>
    <style:style style:name="T2" style:family="text">
      <style:text-properties officeooo:rsid="0009554e"/>
    </style:style>
    <style:style style:name="T3" style:family="text">
      <style:text-properties officeooo:rsid="0009d63c"/>
    </style:style>
    <style:style style:name="T4" style:family="text">
      <style:text-properties officeooo:rsid="000a9c89"/>
    </style:style>
    <style:style style:name="T5" style:family="text">
      <style:text-properties officeooo:rsid="000ee09a"/>
    </style:style>
    <style:style style:name="T6" style:family="text">
      <style:text-properties style:text-position="sub 58%"/>
    </style:style>
    <style:style style:name="T7" style:family="text">
      <style:text-properties style:text-position="sub 58%" fo:font-size="15pt" officeooo:rsid="004bee24" style:font-size-asian="15pt" style:font-size-complex="15pt"/>
    </style:style>
    <style:style style:name="T8" style:family="text">
      <style:text-properties style:text-position="sub 58%" fo:font-size="15pt" officeooo:rsid="0051f38f" style:font-size-asian="15pt" style:font-size-complex="15pt"/>
    </style:style>
    <style:style style:name="T9" style:family="text">
      <style:text-properties officeooo:rsid="0014355a"/>
    </style:style>
    <style:style style:name="T10" style:family="text">
      <style:text-properties officeooo:rsid="00187036"/>
    </style:style>
    <style:style style:name="T11" style:family="text">
      <style:text-properties officeooo:rsid="001bc977"/>
    </style:style>
    <style:style style:name="T12" style:family="text">
      <style:text-properties officeooo:rsid="001dc4e1"/>
    </style:style>
    <style:style style:name="T13" style:family="text">
      <style:text-properties style:text-position="super 58%"/>
    </style:style>
    <style:style style:name="T14" style:family="text">
      <style:text-properties style:text-position="super 58%" fo:font-size="15pt" officeooo:rsid="004bee24" style:font-size-asian="15pt" style:font-size-complex="15pt"/>
    </style:style>
    <style:style style:name="T15" style:family="text">
      <style:text-properties style:text-position="super 58%" fo:font-size="15pt" officeooo:rsid="0056c779" style:font-size-asian="15pt" style:font-size-complex="15pt"/>
    </style:style>
    <style:style style:name="T16" style:family="text">
      <style:text-properties style:text-position="super 58%" fo:font-size="15pt" officeooo:rsid="005b4709" style:font-size-asian="15pt" style:font-size-complex="15pt"/>
    </style:style>
    <style:style style:name="T17" style:family="text">
      <style:text-properties style:text-position="super 58%" fo:font-size="15pt" officeooo:rsid="005cd23a" style:font-size-asian="15pt" style:font-size-complex="15pt"/>
    </style:style>
    <style:style style:name="T18" style:family="text">
      <style:text-properties style:text-position="super 58%" fo:font-size="15pt" officeooo:rsid="0062c0e7" style:font-size-asian="15pt" style:font-size-complex="15pt"/>
    </style:style>
    <style:style style:name="T19" style:family="text">
      <style:text-properties style:text-position="super 58%" fo:font-size="15pt" officeooo:rsid="000d62b7" style:font-size-asian="15pt" style:font-size-complex="15pt"/>
    </style:style>
    <style:style style:name="T20" style:family="text">
      <style:text-properties style:text-position="super 58%" fo:font-size="15pt" officeooo:rsid="00647b69" style:font-size-asian="15pt" style:font-size-complex="15pt"/>
    </style:style>
    <style:style style:name="T21" style:family="text">
      <style:text-properties style:text-position="super 58%" officeooo:rsid="0056bdd4"/>
    </style:style>
    <style:style style:name="T22" style:family="text">
      <style:text-properties style:text-position="super 58%" officeooo:rsid="004bee24"/>
    </style:style>
    <style:style style:name="T23" style:family="text">
      <style:text-properties style:text-position="super 58%" officeooo:rsid="00639663"/>
    </style:style>
    <style:style style:name="T24" style:family="text">
      <style:text-properties style:text-position="super 58%" officeooo:rsid="000d62b7"/>
    </style:style>
    <style:style style:name="T25" style:family="text">
      <style:text-properties style:text-position="super 58%" officeooo:rsid="0015d37b"/>
    </style:style>
    <style:style style:name="T26" style:family="text">
      <style:text-properties style:text-position="super 58%" officeooo:rsid="0062c0e7"/>
    </style:style>
    <style:style style:name="T27" style:family="text">
      <style:text-properties style:text-position="super 58%" officeooo:rsid="00647b69"/>
    </style:style>
    <style:style style:name="T28" style:family="text">
      <style:text-properties style:text-position="super 58%" officeooo:rsid="005cd23a"/>
    </style:style>
    <style:style style:name="T29" style:family="text">
      <style:text-properties officeooo:rsid="00272dfb"/>
    </style:style>
    <style:style style:name="T30" style:family="text">
      <style:text-properties officeooo:rsid="002911e7"/>
    </style:style>
    <style:style style:name="T31" style:family="text">
      <style:text-properties officeooo:rsid="002aa4c0"/>
    </style:style>
    <style:style style:name="T32" style:family="text">
      <style:text-properties officeooo:rsid="002d46ff"/>
    </style:style>
    <style:style style:name="T33" style:family="text">
      <style:text-properties officeooo:rsid="0033ac45"/>
    </style:style>
    <style:style style:name="T34" style:family="text">
      <style:text-properties officeooo:rsid="0034eac7"/>
    </style:style>
    <style:style style:name="T35" style:family="text">
      <style:text-properties officeooo:rsid="0035218f"/>
    </style:style>
    <style:style style:name="T36" style:family="text">
      <style:text-properties officeooo:rsid="0035934c"/>
    </style:style>
    <style:style style:name="T37" style:family="text">
      <style:text-properties officeooo:rsid="003608e2"/>
    </style:style>
    <style:style style:name="T38" style:family="text">
      <style:text-properties officeooo:rsid="0036d387"/>
    </style:style>
    <style:style style:name="T39" style:family="text">
      <style:text-properties officeooo:rsid="00375724"/>
    </style:style>
    <style:style style:name="T40" style:family="text">
      <style:text-properties officeooo:rsid="0038f54b"/>
    </style:style>
    <style:style style:name="T41" style:family="text">
      <style:text-properties officeooo:rsid="003a8507"/>
    </style:style>
    <style:style style:name="T42" style:family="text">
      <style:text-properties fo:font-size="15pt" style:font-size-asian="15pt" style:font-size-complex="15pt"/>
    </style:style>
    <style:style style:name="T43" style:family="text">
      <style:text-properties fo:font-size="15pt" officeooo:rsid="003f748d" style:font-size-asian="15pt" style:font-size-complex="15pt"/>
    </style:style>
    <style:style style:name="T44" style:family="text">
      <style:text-properties fo:font-size="15pt" officeooo:rsid="0040bad7" style:font-size-asian="15pt" style:font-size-complex="15pt"/>
    </style:style>
    <style:style style:name="T45" style:family="text">
      <style:text-properties fo:font-size="15pt" officeooo:rsid="00428918" style:font-size-asian="15pt" style:font-size-complex="15pt"/>
    </style:style>
    <style:style style:name="T46" style:family="text">
      <style:text-properties fo:font-size="15pt" officeooo:rsid="0042cd78" style:font-size-asian="15pt" style:font-size-complex="15pt"/>
    </style:style>
    <style:style style:name="T47" style:family="text">
      <style:text-properties fo:font-size="15pt" officeooo:rsid="0045d2dc" style:font-size-asian="15pt" style:font-size-complex="15pt"/>
    </style:style>
    <style:style style:name="T48" style:family="text">
      <style:text-properties fo:font-size="15pt" officeooo:rsid="004bee24" style:font-size-asian="15pt" style:font-size-complex="15pt"/>
    </style:style>
    <style:style style:name="T49" style:family="text">
      <style:text-properties fo:font-size="15pt" officeooo:rsid="004f52ba" style:font-size-asian="15pt" style:font-size-complex="15pt"/>
    </style:style>
    <style:style style:name="T50" style:family="text">
      <style:text-properties fo:font-size="15pt" officeooo:rsid="005050dd" style:font-size-asian="15pt" style:font-size-complex="15pt"/>
    </style:style>
    <style:style style:name="T51" style:family="text">
      <style:text-properties fo:font-size="15pt" officeooo:rsid="0051f38f" style:font-size-asian="15pt" style:font-size-complex="15pt"/>
    </style:style>
    <style:style style:name="T52" style:family="text">
      <style:text-properties fo:font-size="15pt" officeooo:rsid="00544124" style:font-size-asian="15pt" style:font-size-complex="15pt"/>
    </style:style>
    <style:style style:name="T53" style:family="text">
      <style:text-properties fo:font-size="15pt" officeooo:rsid="005482a8" style:font-size-asian="15pt" style:font-size-complex="15pt"/>
    </style:style>
    <style:style style:name="T54" style:family="text">
      <style:text-properties fo:font-size="15pt" officeooo:rsid="0054bfe8" style:font-size-asian="15pt" style:font-size-complex="15pt"/>
    </style:style>
    <style:style style:name="T55" style:family="text">
      <style:text-properties fo:font-size="15pt" officeooo:rsid="0053f1be" style:font-size-asian="15pt" style:font-size-complex="15pt"/>
    </style:style>
    <style:style style:name="T56" style:family="text">
      <style:text-properties fo:font-size="15pt" officeooo:rsid="0056bdd4" style:font-size-asian="15pt" style:font-size-complex="15pt"/>
    </style:style>
    <style:style style:name="T57" style:family="text">
      <style:text-properties fo:font-size="15pt" officeooo:rsid="0056c779" style:font-size-asian="15pt" style:font-size-complex="15pt"/>
    </style:style>
    <style:style style:name="T58" style:family="text">
      <style:text-properties fo:font-size="15pt" officeooo:rsid="005b4709" style:font-size-asian="15pt" style:font-size-complex="15pt"/>
    </style:style>
    <style:style style:name="T59" style:family="text">
      <style:text-properties fo:font-size="15pt" officeooo:rsid="005cd23a" style:font-size-asian="15pt" style:font-size-complex="15pt"/>
    </style:style>
    <style:style style:name="T60" style:family="text">
      <style:text-properties fo:font-size="15pt" officeooo:rsid="006c197f" style:font-size-asian="15pt" style:font-size-complex="15pt"/>
    </style:style>
    <style:style style:name="T61" style:family="text">
      <style:text-properties fo:font-size="15pt" officeooo:rsid="006cf741" style:font-size-asian="15pt" style:font-size-complex="15pt"/>
    </style:style>
    <style:style style:name="T62" style:family="text">
      <style:text-properties fo:font-size="15pt" officeooo:rsid="0015d37b" style:font-size-asian="15pt" style:font-size-complex="15pt"/>
    </style:style>
    <style:style style:name="T63" style:family="text">
      <style:text-properties fo:font-size="15pt" officeooo:rsid="0071c7f7" style:font-size-asian="15pt" style:font-size-complex="15pt"/>
    </style:style>
    <style:style style:name="T64" style:family="text">
      <style:text-properties fo:font-size="15pt" officeooo:rsid="00762472" style:font-size-asian="15pt" style:font-size-complex="15pt"/>
    </style:style>
    <style:style style:name="T65" style:family="text">
      <style:text-properties fo:font-size="15pt" officeooo:rsid="0078591c" style:font-size-asian="15pt" style:font-size-complex="15pt"/>
    </style:style>
    <style:style style:name="T66" style:family="text">
      <style:text-properties fo:font-size="15pt" officeooo:rsid="002aa4c0" style:font-size-asian="15pt" style:font-size-complex="15pt"/>
    </style:style>
    <style:style style:name="T67" style:family="text">
      <style:text-properties fo:font-size="15pt" officeooo:rsid="000d62b7" style:font-size-asian="15pt" style:font-size-complex="15pt"/>
    </style:style>
    <style:style style:name="T68" style:family="text">
      <style:text-properties fo:font-size="15pt" officeooo:rsid="007c2a8c" style:font-size-asian="15pt" style:font-size-complex="15pt"/>
    </style:style>
    <style:style style:name="T69" style:family="text">
      <style:text-properties fo:font-size="15pt" officeooo:rsid="007fcea8" style:font-size-asian="15pt" style:font-size-complex="15pt"/>
    </style:style>
    <style:style style:name="T70" style:family="text">
      <style:text-properties fo:font-size="15pt" officeooo:rsid="0062c0e7" style:font-size-asian="15pt" style:font-size-complex="15pt"/>
    </style:style>
    <style:style style:name="T71" style:family="text">
      <style:text-properties fo:font-size="15pt" officeooo:rsid="0079805d" style:font-size-asian="15pt" style:font-size-complex="15pt"/>
    </style:style>
    <style:style style:name="T72" style:family="text">
      <style:text-properties fo:font-size="15pt" officeooo:rsid="000ee09a" style:font-size-asian="15pt" style:font-size-complex="15pt"/>
    </style:style>
    <style:style style:name="T73" style:family="text">
      <style:text-properties fo:font-size="15pt" officeooo:rsid="0080c2d5" style:font-size-asian="15pt" style:font-size-complex="15pt"/>
    </style:style>
    <style:style style:name="T74" style:family="text">
      <style:text-properties fo:font-size="15pt" officeooo:rsid="00647b69" style:font-size-asian="15pt" style:font-size-complex="15pt"/>
    </style:style>
    <style:style style:name="T75" style:family="text">
      <style:text-properties fo:font-size="15pt" officeooo:rsid="0082583f" style:font-size-asian="15pt" style:font-size-complex="15pt"/>
    </style:style>
    <style:style style:name="T76" style:family="text">
      <style:text-properties fo:font-size="15pt" officeooo:rsid="00272dfb" style:font-size-asian="15pt" style:font-size-complex="15pt"/>
    </style:style>
    <style:style style:name="T77" style:family="text">
      <style:text-properties fo:font-size="15pt" officeooo:rsid="00841ebd" style:font-size-asian="15pt" style:font-size-complex="15pt"/>
    </style:style>
    <style:style style:name="T78" style:family="text">
      <style:text-properties style:text-position="0% 100%" fo:font-size="15pt" style:font-size-asian="15pt" style:font-size-complex="15pt"/>
    </style:style>
    <style:style style:name="T79" style:family="text">
      <style:text-properties style:text-position="0% 100%" fo:font-size="15pt" officeooo:rsid="004bee24" style:font-size-asian="15pt" style:font-size-complex="15pt"/>
    </style:style>
    <style:style style:name="T80" style:family="text">
      <style:text-properties style:text-position="0% 100%" fo:font-size="15pt" officeooo:rsid="004f52ba" style:font-size-asian="15pt" style:font-size-complex="15pt"/>
    </style:style>
    <style:style style:name="T81" style:family="text">
      <style:text-properties officeooo:rsid="005482a8"/>
    </style:style>
    <style:style style:name="T82" style:family="text">
      <style:text-properties officeooo:rsid="0056bdd4"/>
    </style:style>
    <style:style style:name="T83" style:family="text">
      <style:text-properties officeooo:rsid="0066e34c"/>
    </style:style>
    <style:style style:name="T84" style:family="text">
      <style:text-properties officeooo:rsid="00680081"/>
    </style:style>
    <style:style style:name="T85" style:family="text">
      <style:text-properties officeooo:rsid="006a281e"/>
    </style:style>
    <style:style style:name="T86" style:family="text">
      <style:text-properties officeooo:rsid="006cf741"/>
    </style:style>
    <style:style style:name="T87" style:family="text">
      <style:text-properties officeooo:rsid="006ea198"/>
    </style:style>
    <style:style style:name="T88" style:family="text">
      <style:text-properties officeooo:rsid="00705063"/>
    </style:style>
    <style:style style:name="T89" style:family="text">
      <style:text-properties officeooo:rsid="0071c7f7"/>
    </style:style>
    <style:style style:name="T90" style:family="text">
      <style:text-properties officeooo:rsid="000d62b7"/>
    </style:style>
    <style:style style:name="T91" style:family="text">
      <style:text-properties officeooo:rsid="0073add2"/>
    </style:style>
    <style:style style:name="T92" style:family="text">
      <style:text-properties officeooo:rsid="005cd23a"/>
    </style:style>
    <style:style style:name="T93" style:family="text">
      <style:text-properties officeooo:rsid="0053f1be"/>
    </style:style>
    <style:style style:name="T94" style:family="text">
      <style:text-properties officeooo:rsid="00762472"/>
    </style:style>
    <style:style style:name="T95" style:family="text">
      <style:text-properties officeooo:rsid="00779fe3"/>
    </style:style>
    <style:style style:name="T96" style:family="text">
      <style:text-properties officeooo:rsid="00137398"/>
    </style:style>
    <style:style style:name="T97" style:family="text">
      <style:text-properties officeooo:rsid="00639663"/>
    </style:style>
    <style:style style:name="T98" style:family="text">
      <style:text-properties officeooo:rsid="0078591c"/>
    </style:style>
    <style:style style:name="T99" style:family="text">
      <style:text-properties officeooo:rsid="0015d37b"/>
    </style:style>
    <style:style style:name="T100" style:family="text">
      <style:text-properties officeooo:rsid="0079805d"/>
    </style:style>
    <style:style style:name="T101" style:family="text">
      <style:text-properties officeooo:rsid="007aa0a6"/>
    </style:style>
    <style:style style:name="T102" style:family="text">
      <style:text-properties officeooo:rsid="0010a043"/>
    </style:style>
    <style:style style:name="T103" style:family="text">
      <style:text-properties officeooo:rsid="00664da3"/>
    </style:style>
    <style:style style:name="T104" style:family="text">
      <style:text-properties officeooo:rsid="007c2a8c"/>
    </style:style>
    <style:style style:name="T105" style:family="text">
      <style:text-properties officeooo:rsid="007ddef2"/>
    </style:style>
    <style:style style:name="T106" style:family="text">
      <style:text-properties officeooo:rsid="00267cb9"/>
    </style:style>
    <style:style style:name="T107" style:family="text">
      <style:text-properties officeooo:rsid="0051f38f"/>
    </style:style>
    <style:style style:name="T108" style:family="text">
      <style:text-properties officeooo:rsid="007fcea8"/>
    </style:style>
    <style:style style:name="T109" style:family="text">
      <style:text-properties officeooo:rsid="0062c0e7"/>
    </style:style>
    <style:style style:name="T110" style:family="text">
      <style:text-properties officeooo:rsid="0080c2d5"/>
    </style:style>
    <style:style style:name="T111" style:family="text">
      <style:text-properties officeooo:rsid="0082583f"/>
    </style:style>
    <style:style style:name="T112" style:family="text">
      <style:text-properties officeooo:rsid="00647b69"/>
    </style:style>
    <style:style style:name="T113" style:family="text">
      <style:text-properties officeooo:rsid="00841eb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7cm" fo:text-indent="-0.635cm" fo:margin-left="1.9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05cm" fo:text-indent="-0.635cm" fo:margin-left="2.6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75cm" fo:text-indent="-0.635cm" fo:margin-left="3.8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1cm" fo:text-indent="-0.635cm" fo:margin-left="4.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45cm" fo:text-indent="-0.635cm" fo:margin-left="5.1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15cm" fo:text-indent="-0.635cm" fo:margin-left="6.4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85cm" fo:text-indent="-0.635cm" fo:margin-left="7.6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7cm" fo:text-indent="-0.635cm" fo:margin-left="1.9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05cm" fo:text-indent="-0.635cm" fo:margin-left="2.6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75cm" fo:text-indent="-0.635cm" fo:margin-left="3.8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1cm" fo:text-indent="-0.635cm" fo:margin-left="4.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45cm" fo:text-indent="-0.635cm" fo:margin-left="5.1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15cm" fo:text-indent="-0.635cm" fo:margin-left="6.4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85cm" fo:text-indent="-0.635cm" fo:margin-left="7.6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97cm" fo:text-indent="-0.635cm" fo:margin-left="1.9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05cm" fo:text-indent="-0.635cm" fo:margin-left="2.6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75cm" fo:text-indent="-0.635cm" fo:margin-left="3.8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1cm" fo:text-indent="-0.635cm" fo:margin-left="4.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45cm" fo:text-indent="-0.635cm" fo:margin-left="5.1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15cm" fo:text-indent="-0.635cm" fo:margin-left="6.4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85cm" fo:text-indent="-0.635cm" fo:margin-left="7.6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7cm" fo:text-indent="-0.635cm" fo:margin-left="1.9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05cm" fo:text-indent="-0.635cm" fo:margin-left="2.6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75cm" fo:text-indent="-0.635cm" fo:margin-left="3.8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1cm" fo:text-indent="-0.635cm" fo:margin-left="4.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45cm" fo:text-indent="-0.635cm" fo:margin-left="5.1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15cm" fo:text-indent="-0.635cm" fo:margin-left="6.4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85cm" fo:text-indent="-0.635cm" fo:margin-left="7.6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ower Plant Engineering</text:p>
      <text:p text:style-name="P34">Assignment </text:p>
      <text:p text:style-name="P34">Max Marks 15</text:p>
      <text:p text:style-name="P34">A batch</text:p>
      <text:p text:style-name="P34">Each student shall answer the question assigned to him.</text:p>
      <text:list xml:id="list3747555887" text:style-name="L1">
        <text:list-header>
          <text:p text:style-name="P87"/>
          <text:p text:style-name="P164"><text:span text:style-name="T113">1</text:span><text:span text:style-name="T95">(a)</text:span></text:p>
          <text:p text:style-name="P172">The input output curve of a 10MW power station<text:span text:style-name="T82"> </text:span>is expressed as follows:</text:p>
          <text:p text:style-name="P172">i=10<text:span text:style-name="T13">6</text:span>(8+L+0.4L<text:span text:style-name="T13">2</text:span>)</text:p>
          <text:p text:style-name="P172">where <text:span text:style-name="T82">i</text:span> is in kcal per hour and L is in MW.</text:p>
          <text:p text:style-name="P237"><text:span text:style-name="T55">Determine the average heat rate of the power station for a day if</text:span><text:span text:style-name="T56"> </text:span><text:span text:style-name="T55">it operates at its full capacity for 12 hours and is kept running at zero</text:span><text:span text:style-name="T56"> </text:span><text:span text:style-name="T55">load for remaining 12 hours. Also calculate the saving per kWh of</text:span><text:span text:style-name="T56"> </text:span><text:span text:style-name="T55">energy produced if the energy is generated at a constant 24 hours</text:span><text:span text:style-name="T56"> </text:span><text:span text:style-name="T55">load (10</text:span><text:span text:style-name="T56">0% </text:span><text:span text:style-name="T55">load factor).</text:span></text:p>
        </text:list-header>
      </text:list>
      <text:p text:style-name="P173"/>
      <text:list xml:id="list224923979187633" text:continue-numbering="true" text:style-name="L1">
        <text:list-header>
          <text:p text:style-name="P164"/>
          <text:p text:style-name="P237"><text:span text:style-name="T64">(b)</text:span><text:span text:style-name="T57">A common load is to be shared by two power</text:span><text:span text:style-name="T58"> </text:span><text:span text:style-name="T57">plants. One power plant is a base load plant with 30 MW installed</text:span><text:span text:style-name="T58"> </text:span><text:span text:style-name="T57">capacity and other power plant is a standby plant with 20 MW</text:span><text:span text:style-name="T58"> </text:span><text:span text:style-name="T57">capacity. The yearly output of the base load plant is 130 x 10</text:span><text:span text:style-name="T16">6</text:span><text:span text:style-name="T15"> </text:span><text:span text:style-name="T57">kWh</text:span><text:span text:style-name="T58"> </text:span><text:span text:style-name="T57">and that of standby plant is 9 x 10 </text:span><text:span text:style-name="T15">6 </text:span><text:span text:style-name="T57">kWh. The peak load taken by the</text:span><text:span text:style-name="T58"> </text:span><text:span text:style-name="T57">standb y plant is 15 MW and this plant works for 2800 hours during</text:span><text:span text:style-name="T58"> </text:span><text:span text:style-name="T57">the year. The base load plant takes a peak </text:span><text:span text:style-name="T60"><text:s/>of</text:span><text:span text:style-name="T57">25 MW. Determine the</text:span><text:span text:style-name="T58"> </text:span><text:span text:style-name="T57">following for both plants:</text:span></text:p>
          <text:p text:style-name="P215">(a) Annual load factor</text:p>
          <text:p text:style-name="P237"><text:span text:style-name="T57">(</text:span><text:span text:style-name="T58">b</text:span><text:span text:style-name="T57">) Plant use factor</text:span></text:p>
          <text:p text:style-name="P215">(c) Capacity factor.</text:p>
          <text:p text:style-name="P215"/>
          <text:p text:style-name="P164"><text:span text:style-name="T113">2</text:span><text:span text:style-name="T95">(a)</text:span></text:p>
          <text:p text:style-name="P131">The maximum (peak) load on a thermal power plant of 60 MW capacity is 50 MW at an annual load factor of 50%. The loads having maximum demands of25 MW, 20 MW, 8 MW and 5 M are connected to the power station. Determine : (a) Average load on power station (b) Energy generated per year (c) Demand factor (d) Diversity factor.</text:p>
          <text:p text:style-name="P131"/>
          <text:p text:style-name="P92"/>
          <text:p text:style-name="P92"><text:span text:style-name="T87">(b)</text:span>The capital cost of a power generating equipment in a steam power<text:span text:style-name="T12"> </text:span>plant is Rs 80 <text:span text:style-name="T12">*</text:span>10<text:span text:style-name="T13"> 6</text:span> . The useful life of the plant is 30 years and its<text:span text:style-name="T12"> </text:span><text:soft-page-break/>salvage value is 5%<text:span text:style-name="T12"> </text:span>of the capital cost. Determine by the sinking-fund method the amount of money to be<text:span text:style-name="T12"> </text:span>saved annually for replacement if the yearly rate of compound interest is 6%.</text:p>
          <text:p text:style-name="P116"/>
        </text:list-header>
      </text:list>
      <text:list xml:id="list848346182" text:style-name="L3">
        <text:list-header>
          <text:p text:style-name="P122"/>
        </text:list-header>
      </text:list>
      <text:list xml:id="list1582589078" text:style-name="L2">
        <text:list-header>
          <text:p text:style-name="P120"><text:span text:style-name="T113">3</text:span><text:span text:style-name="T108"> (A)</text:span></text:p>
          <text:p text:style-name="P120"/>
          <text:p text:style-name="P110">A power station supplies the following loads to the consumers:</text:p>
          <text:p text:style-name="P110"/>
        </text:list-header>
      </text:list>
      <table:table table:name="Table1" table:style-name="Table1">
        <table:table-column table:style-name="Table1.A" table:number-columns-repeated="6"/>
        <table:table-column table:style-name="Table1.G"/>
        <table:table-column table:style-name="Table1.H"/>
        <table:table-row table:style-name="TableLine94879870426864">
          <table:table-cell table:style-name="Table1.A1" office:value-type="string">
            <text:p text:style-name="P71">Time (hours)</text:p>
          </table:table-cell>
          <table:table-cell table:style-name="Table1.A1" office:value-type="string">
            <text:p text:style-name="P71">0-6</text:p>
          </table:table-cell>
          <table:table-cell table:style-name="Table1.A1" office:value-type="string">
            <text:p text:style-name="P71">6-10</text:p>
          </table:table-cell>
          <table:table-cell table:style-name="Table1.A1" office:value-type="string">
            <text:p text:style-name="P71">10-12</text:p>
          </table:table-cell>
          <table:table-cell table:style-name="Table1.A1" office:value-type="string">
            <text:p text:style-name="P71">12-16</text:p>
          </table:table-cell>
          <table:table-cell table:style-name="Table1.A1" office:value-type="string">
            <text:p text:style-name="P71">16-20</text:p>
          </table:table-cell>
          <table:table-cell table:style-name="Table1.A1" office:value-type="string">
            <text:p text:style-name="P71">20-22</text:p>
          </table:table-cell>
          <table:table-cell table:style-name="Table1.H1" office:value-type="string">
            <text:p text:style-name="P71">22-24</text:p>
          </table:table-cell>
        </table:table-row>
        <table:table-row table:style-name="TableLine94879807071808">
          <table:table-cell table:style-name="Table1.A2" office:value-type="string">
            <text:p text:style-name="P71">Load (MW)</text:p>
          </table:table-cell>
          <table:table-cell table:style-name="Table1.A2" office:value-type="string">
            <text:p text:style-name="P71">30</text:p>
          </table:table-cell>
          <table:table-cell table:style-name="Table1.A2" office:value-type="string">
            <text:p text:style-name="P71">70</text:p>
          </table:table-cell>
          <table:table-cell table:style-name="Table1.A2" office:value-type="string">
            <text:p text:style-name="P71">90</text:p>
          </table:table-cell>
          <table:table-cell table:style-name="Table1.A2" office:value-type="string">
            <text:p text:style-name="P71">60</text:p>
          </table:table-cell>
          <table:table-cell table:style-name="Table1.A2" office:value-type="string">
            <text:p text:style-name="P71">100</text:p>
          </table:table-cell>
          <table:table-cell table:style-name="Table1.A2" office:value-type="string">
            <text:p text:style-name="P71">80</text:p>
          </table:table-cell>
          <table:table-cell table:style-name="Table1.H2" office:value-type="string">
            <text:p text:style-name="P71">60</text:p>
          </table:table-cell>
        </table:table-row>
      </table:table>
      <text:list xml:id="list224923929015041" text:continue-numbering="true" text:style-name="L2">
        <text:list-header>
          <text:p text:style-name="P110"/>
          <text:p text:style-name="P110">(a) Draw the load curve and estimate the load factor of the plant. </text:p>
          <text:p text:style-name="P110">(b) What is the load factor of a standby equipment of 30 MW capacity if it takes up all loads above 70 MW? What is its use factor?</text:p>
        </text:list-header>
      </text:list>
      <text:p text:style-name="P41"/>
      <text:p text:style-name="P41"/>
      <text:p text:style-name="P41"/>
      <text:list xml:id="list224924551393296" text:continue-numbering="true" text:style-name="L2">
        <text:list-header>
          <text:p text:style-name="P231"><text:span text:style-name="T65">(</text:span><text:span text:style-name="T77">B</text:span><text:span text:style-name="T65">)</text:span><text:span text:style-name="T62">A plant costing Rs </text:span><text:span text:style-name="T65">12</text:span><text:span text:style-name="T62">5,000 has a useful life of </text:span><text:span text:style-name="T65">20</text:span><text:span text:style-name="T62"> years. Find the amount which should</text:span><text:span text:style-name="T66"> </text:span><text:span text:style-name="T62">be saved annually to replace the equipment at the end of that time (a) by the straight-line</text:span><text:span text:style-name="T66"> </text:span><text:span text:style-name="T62">method, and (b) by the</text:span><text:span text:style-name="T66"> </text:span><text:span text:style-name="T62">sinking-fund method if the annual rate of compound interest is</text:span><text:span text:style-name="T66"> </text:span><text:span text:style-name="T65">7</text:span><text:span text:style-name="T62">%. Assume that the salvage value of the equipment is Rs</text:span><text:span text:style-name="T65">5</text:span><text:span text:style-name="T62">5000.</text:span></text:p>
        </text:list-header>
      </text:list>
      <text:p text:style-name="P238"><text:span text:style-name="T62"/></text:p>
      <text:p text:style-name="P217"><text:span text:style-name="T113">4</text:span>.<text:span text:style-name="T108">(A)</text:span></text:p>
      <text:p text:style-name="P217"/>
      <text:p text:style-name="P217"><text:s/>A power station has to meet the following demand :</text:p>
      <text:p text:style-name="P217">Group A : <text:span text:style-name="T4">15</text:span>0 kW between 8 A.M. and 6 P.M.</text:p>
      <text:p text:style-name="P217">Group B : <text:span text:style-name="T4">35</text:span>0 kW between 6 A.M. and 10 A.M.</text:p>
      <text:p text:style-name="P217">Group C : <text:span text:style-name="T4">3</text:span>50 kW between 6 A.M. and 10 A.M.</text:p>
      <text:p text:style-name="P217">Group D : <text:span text:style-name="T4">5</text:span>0 kW between 10 A.M. and 6 P.M. and then between 6 P.M. and 6 A.M.</text:p>
      <text:p text:style-name="P217">Plot the daily load curve and determine (i) diversity factor (ii) units generated per day (iii) load factor. <text:s text:c="2"/></text:p>
      <text:p text:style-name="P217"/>
      <text:list xml:id="list1058868138" text:style-name="L5">
        <text:list-header>
          <text:p text:style-name="P233"><text:span text:style-name="T69">(B)</text:span><text:span text:style-name="T59">A chimney is 2</text:span><text:span text:style-name="T69">9</text:span><text:span text:style-name="T59"> metres high and the temperature</text:span><text:span text:style-name="T70"> </text:span><text:span text:style-name="T59">of hot gases inside the chimney is 320</text:span><text:span text:style-name="T18">o</text:span><text:span text:style-name="T59">C. The ternperaiuie of outside</text:span><text:span text:style-name="T70"> </text:span><text:span text:style-name="T59">air is 27</text:span><text:span text:style-name="T18">o</text:span><text:span text:style-name="T59">C and furnace </text:span><text:soft-page-break/><text:span text:style-name="T59">as supplied with 15 kg of air per kg of coal</text:span><text:span text:style-name="T70"> </text:span><text:span text:style-name="T59">burnt. Calculate</text:span></text:p>
          <text:p text:style-name="P128">(a) Draught in mm of water.</text:p>
          <text:p text:style-name="P128">(b) Draught height in metres of hot gases.</text:p>
        </text:list-header>
      </text:list>
      <text:p text:style-name="P135"/>
      <text:p text:style-name="P135"/>
      <text:p text:style-name="P219">5</text:p>
      <text:p text:style-name="P217">At the end of a power distribution system, a certain feeder supplies three distri-</text:p>
      <text:p text:style-name="P217">bution transformers, each one supplying a group of customers whose connected load are listed as</text:p>
      <text:p text:style-name="P217">follows :</text:p>
      <text:p text:style-name="P217">Transformer 1 <text:s text:c="23"/>Transformer 2 <text:s text:c="26"/>Transformer 3</text:p>
      <text:p text:style-name="P217">General power <text:s text:c="15"/>Residence lighting <text:s text:c="17"/>Store lighting and power <text:s/></text:p>
      <text:p text:style-name="P217">service and lighting</text:p>
      <text:p text:style-name="P217"><text:s/></text:p>
      <text:p text:style-name="P217">a : <text:span text:style-name="T1">22</text:span> H.P., 1<text:span text:style-name="T3">4</text:span>kW <text:s text:c="17"/>e : <text:span text:style-name="T1">15</text:span> kW <text:s text:c="41"/>i : <text:span text:style-name="T1">25</text:span> kW</text:p>
      <text:p text:style-name="P217">b : <text:span text:style-name="T1">13</text:span> H.P., <text:span text:style-name="T1">1</text:span>4kW <text:s text:c="15"/>f : <text:span text:style-name="T1">12</text:span> kW <text:s text:c="41"/>l : <text:span text:style-name="T1">1</text:span>6 kW</text:p>
      <text:p text:style-name="P217">c : 1<text:span text:style-name="T3">4</text:span> H.P. <text:s text:c="26"/>g : <text:span text:style-name="T2">6</text:span> kW <text:s text:c="40"/>j : <text:span text:style-name="T1">28</text:span> kW, 7 H.P. </text:p>
      <text:p text:style-name="P217">d : <text:span text:style-name="T1">7</text:span> H.P., <text:span text:style-name="T3">1</text:span>2 kW <text:s text:c="15"/>h : 1<text:span text:style-name="T3">2</text:span> kW <text:s text:c="39"/>k : <text:span text:style-name="T3">1</text:span>6 kW, <text:span text:style-name="T1">23</text:span> H.P.</text:p>
      <text:p text:style-name="P217"/>
      <text:p text:style-name="P217"/>
      <text:p text:style-name="P217">Demand factor for all type of load is .6<text:span text:style-name="T2">2</text:span> &amp; Diversity factor as 1.<text:span text:style-name="T2">3</text:span>5</text:p>
      <text:p text:style-name="P217">Use the factor <text:s text:c="2"/>and predict the maximum demand on the feeder. The H.P. load</text:p>
      <text:p text:style-name="P217">is motor load and assume an efficiency of <text:span text:style-name="T3">75</text:span>%. <text:s text:c="8"/></text:p>
      <text:p text:style-name="P217"/>
      <text:p text:style-name="P143"/>
      <text:list xml:id="list1915177459" text:style-name="L10">
        <text:list-header>
          <text:p text:style-name="P141"><text:span text:style-name="T113">6</text:span><text:span text:style-name="T86">.</text:span><text:span text:style-name="T88">(a)</text:span></text:p>
          <text:p text:style-name="P141">The maximum (peak) load on a thermal power plant of 60 <text:span text:style-name="T84">M</text:span>W capacity is 50 mW at<text:span text:style-name="T5"> </text:span>an annual load factor of 50%. The loads having maximum demands of 25 <text:span text:style-name="T84">M</text:span>W, 20 <text:span text:style-name="T84">M</text:span>W, 8 <text:span text:style-name="T84">M</text:span>W and, 5 <text:span text:style-name="T84">M</text:span>W<text:span text:style-name="T5"> </text:span>are connected to the power station.</text:p>
          <text:p text:style-name="P141">Determine: (a) Average load on power station (b) Energy generated per year (c) Demand factor<text:span text:style-name="T5"> </text:span>(d) Diversity factor.</text:p>
          <text:p text:style-name="P141"/>
          <text:p text:style-name="P141"><text:span text:style-name="T113">6</text:span><text:span text:style-name="T88">(b)</text:span></text:p>
          <text:p text:style-name="P141">In a steam power plant the capital cost of power generation equipment is Rs. 25 ×<text:span text:style-name="T5"> </text:span>10 . The useful life of the plant is 30 years and salvage value of the plant to Rs. 1 × 10 <text:span text:style-name="T13">5</text:span> . Determine by<text:span text:style-name="T5"> </text:span>sinking fund method the amount to be saved annually for replacement if the rate of annual compound<text:span text:style-name="T5"> </text:span>interest is 6%.</text:p>
          <text:p text:style-name="P141"/>
          <text:p text:style-name="P141"><text:soft-page-break/></text:p>
          <text:p text:style-name="P220">7</text:p>
          <text:p text:style-name="P145">(a) </text:p>
          <text:p text:style-name="P141"/>
          <text:p text:style-name="P141">Two lamps are to be compared:</text:p>
          <text:p text:style-name="P141">(a) Cost of first lamp is Re. 1 and it takes 100 watts.</text:p>
          <text:p text:style-name="P141">(b) Cost of second lamp is Rs. 4 and it takes 60 watts.</text:p>
          <text:p text:style-name="P141">Both lamps are of equal candle<text:span text:style-name="T5"> </text:span>power and each has a useful life of 100 hours. Which lamp will<text:span text:style-name="T5"> </text:span>prove economical if the energy is charged at Rs. 70 per kW of maximum demand per year plus 5 paise<text:span text:style-name="T5"> </text:span>per kWh? At what load factor both the lamps will be equally advantageous?</text:p>
          <text:p text:style-name="P141"/>
        </text:list-header>
      </text:list>
      <text:p text:style-name="P146">(b)<text:span text:style-name="T92">The input-output curve of a 150 MW station is expressed by the formula, </text:span></text:p>
      <text:list xml:id="list982437241" text:style-name="L11">
        <text:list-header>
          <text:p text:style-name="P239"><text:span text:style-name="T59">I = 10</text:span><text:span text:style-name="T17">6</text:span><text:span text:style-name="T59"> (250 + 5L + 0.03L</text:span><text:span text:style-name="T17">3</text:span><text:span text:style-name="T59">) + L</text:span><text:span text:style-name="T17">4</text:span></text:p>
          <text:p text:style-name="P132">where I is in kcal per hour and L is in mega-watts. Find the load at which minimum heat rate occurs and check with the plot.</text:p>
        </text:list-header>
      </text:list>
      <text:p text:style-name="P134"/>
      <text:list xml:id="list224923179493315" text:continue-list="list1915177459" text:style-name="L10">
        <text:list-header>
          <text:p text:style-name="P141"/>
        </text:list-header>
      </text:list>
      <text:p text:style-name="P218"><text:span text:style-name="T113">8</text:span><text:span text:style-name="T108">(A)</text:span></text:p>
      <text:list xml:id="list1368328816" text:style-name="L12">
        <text:list-header>
          <text:p text:style-name="P102">A power station has to supply load as follows:</text:p>
          <text:p text:style-name="P102"/>
        </text:list-header>
      </text:list>
      <table:table table:name="Table5" table:style-name="Table5">
        <table:table-column table:style-name="Table5.A" table:number-columns-repeated="5"/>
        <table:table-column table:style-name="Table5.F"/>
        <table:table-row table:style-name="TableLine94879844865136">
          <table:table-cell table:style-name="Table5.A1" office:value-type="string">
            <text:p text:style-name="P257">Time (hours)</text:p>
          </table:table-cell>
          <table:table-cell table:style-name="Table5.A1" office:value-type="string">
            <text:p text:style-name="P257">0-6</text:p>
          </table:table-cell>
          <table:table-cell table:style-name="Table5.A1" office:value-type="string">
            <text:p text:style-name="P257">6-12</text:p>
          </table:table-cell>
          <table:table-cell table:style-name="Table5.A1" office:value-type="string">
            <text:p text:style-name="P257">12-14</text:p>
          </table:table-cell>
          <table:table-cell table:style-name="Table5.A1" office:value-type="string">
            <text:p text:style-name="P257">14-18</text:p>
          </table:table-cell>
          <table:table-cell table:style-name="Table5.F1" office:value-type="string">
            <text:p text:style-name="P257">18-24</text:p>
          </table:table-cell>
        </table:table-row>
        <table:table-row table:style-name="TableLine94879815530496">
          <table:table-cell table:style-name="Table5.A2" office:value-type="string">
            <text:p text:style-name="P258">Load (MW)</text:p>
          </table:table-cell>
          <table:table-cell table:style-name="Table5.A2" office:value-type="string">
            <text:p text:style-name="P257">30</text:p>
          </table:table-cell>
          <table:table-cell table:style-name="Table5.A2" office:value-type="string">
            <text:p text:style-name="P257">90</text:p>
          </table:table-cell>
          <table:table-cell table:style-name="Table5.A2" office:value-type="string">
            <text:p text:style-name="P257">60</text:p>
          </table:table-cell>
          <table:table-cell table:style-name="Table5.A2" office:value-type="string">
            <text:p text:style-name="P257">100</text:p>
          </table:table-cell>
          <table:table-cell table:style-name="Table5.F2" office:value-type="string">
            <text:p text:style-name="P257">50</text:p>
          </table:table-cell>
        </table:table-row>
      </table:table>
      <text:list xml:id="list224924262539831" text:continue-numbering="true" text:style-name="L12">
        <text:list-header>
          <text:p text:style-name="P102">(a) Draw the load curve. (b) Draw the load duration curve. (c) Select suitable generating<text:span text:style-name="T11"> </text:span>units to supply the load. (d) Cal culate the load factor. (e) Calculate the capacity of the<text:span text:style-name="T11"> </text:span>plant and the plant capacity factor.</text:p>
        </text:list-header>
      </text:list>
      <text:p text:style-name="P104"/>
      <text:list xml:id="list224923637120521" text:continue-numbering="true" text:style-name="L12">
        <text:list-header>
          <text:p text:style-name="P102"><text:span text:style-name="T87">(</text:span><text:span text:style-name="T108">B</text:span><text:span text:style-name="T87">)</text:span>The capital cost of a power generating equipment in a steam power<text:span text:style-name="T12"> </text:span>plant is Rs 80 <text:span text:style-name="T12">*</text:span>10<text:span text:style-name="T13"> 6</text:span> . The useful life of the plant is 30 years and its<text:span text:style-name="T12"> </text:span>salvage value is <text:span text:style-name="T100">7</text:span>%<text:span text:style-name="T12"> </text:span>of the capital cost. Determine by the sinking-fund method the amount of money to be<text:span text:style-name="T12"> </text:span>saved annually for replacement if the yearly rate of compound interest is 6<text:span text:style-name="T100">.5</text:span>%.</text:p>
        </text:list-header>
      </text:list>
      <text:p text:style-name="P103"/>
      <text:p text:style-name="P218"/>
      <text:list xml:id="list224923716246203" text:continue-list="list224923179493315" text:style-name="L10">
        <text:list-header>
          <text:p text:style-name="P240"><text:span text:style-name="T62"/></text:p>
        </text:list-header>
      </text:list>
      <text:p text:style-name="P238"><text:span text:style-name="T62"/></text:p>
      <text:list xml:id="list224923935862397" text:continue-list="list224924551393296" text:style-name="L2">
        <text:list-header>
          <text:p text:style-name="P93"/>
          <text:p text:style-name="P107"><text:soft-page-break/></text:p>
        </text:list-header>
      </text:list>
      <text:p text:style-name="P41"/>
      <text:list xml:id="list224923889240003" text:continue-numbering="true" text:style-name="L2">
        <text:list-header>
          <text:p text:style-name="P111"><text:span text:style-name="T89">9 </text:span><text:span text:style-name="T95"><text:s text:c="2"/>(a)</text:span></text:p>
          <text:p text:style-name="P111">The incremental fuel costs for two generating units <text:span text:style-name="T95">A </text:span>and <text:span text:style-name="T95">B</text:span> of a power plant are given by the following relations,</text:p>
          <text:p text:style-name="P110">dF<text:span text:style-name="T6">a</text:span> /dP<text:span text:style-name="T6">a</text:span> = 0.065 P<text:span text:style-name="T6">a</text:span> + 25</text:p>
          <text:p text:style-name="P110">dF<text:span text:style-name="T6">b </text:span>/dP<text:span text:style-name="T6">b</text:span> = 0.08 P<text:span text:style-name="T6">a</text:span> + 20</text:p>
          <text:p text:style-name="P110">where F is the fuel cost in rupees per hour and P is the power output in MW. Estimate</text:p>
          <text:p text:style-name="P110">(a) the economic loading of the two units when the total load supplied by the power<text:span text:style-name="T9"> </text:span>plants is 200 MW, (b) the loss in fuel cost per hour if the load is equally shared by both<text:span text:style-name="T9"> </text:span>units.</text:p>
        </text:list-header>
      </text:list>
      <text:p text:style-name="P41"/>
      <text:p text:style-name="P41"/>
      <text:p text:style-name="P49">(b)</text:p>
      <text:p text:style-name="P49"/>
      <text:list xml:id="list900014404" text:style-name="L4">
        <text:list-header>
          <text:p text:style-name="P136">In a steam power plant the capital cost of power generation equipment is Rs. 25 ×<text:span text:style-name="T5"> </text:span>10 . The useful life of the plant is 30 years and salvage value of the plant to Rs. 1 × 10 <text:span text:style-name="T13">5</text:span> . Determine by<text:span text:style-name="T5"> </text:span>sinking fund method the amount to be saved annually for replacement if the rate of annual compound<text:span text:style-name="T5"> </text:span>interest is 6%.</text:p>
        </text:list-header>
      </text:list>
      <text:list xml:id="list224923519856640" text:continue-list="list224923889240003" text:style-name="L2">
        <text:list-header>
          <text:p text:style-name="P94"/>
          <text:p text:style-name="P120">10<text:span text:style-name="T95"> (a)</text:span></text:p>
          <text:p text:style-name="P94">The following loads are connected to a power plant:</text:p>
          <text:p text:style-name="P94"/>
        </text:list-header>
      </text:list>
      <table:table table:name="Table3" table:style-name="Table3">
        <table:table-column table:style-name="Table3.A" table:number-columns-repeated="3"/>
        <table:table-column table:style-name="Table3.D"/>
        <table:table-row table:style-name="TableLine94879873458240">
          <table:table-cell table:style-name="Table3.A1" office:value-type="string">
            <text:p text:style-name="P75">Type of load</text:p>
            <text:p text:style-name="P75"/>
          </table:table-cell>
          <table:table-cell table:style-name="Table3.A1" office:value-type="string">
            <text:p text:style-name="P75">Max. demand</text:p>
            <text:p text:style-name="P75">(MW)</text:p>
          </table:table-cell>
          <table:table-cell table:style-name="Table3.A1" office:value-type="string">
            <text:p text:style-name="P75">Diversity factor</text:p>
          </table:table-cell>
          <table:table-cell table:style-name="Table3.D1" office:value-type="string">
            <text:p text:style-name="P75">Demand factor</text:p>
          </table:table-cell>
        </table:table-row>
        <table:table-row table:style-name="TableLine94879867414400">
          <table:table-cell table:style-name="Table3.A2" office:value-type="string">
            <text:p text:style-name="P77">Domestic</text:p>
          </table:table-cell>
          <table:table-cell table:style-name="Table3.A2" office:value-type="string">
            <text:p text:style-name="P77">15</text:p>
          </table:table-cell>
          <table:table-cell table:style-name="Table3.A2" office:value-type="string">
            <text:p text:style-name="P77">1.25</text:p>
          </table:table-cell>
          <table:table-cell table:style-name="Table3.D2" office:value-type="string">
            <text:p text:style-name="P77">0.70</text:p>
          </table:table-cell>
        </table:table-row>
        <table:table-row table:style-name="TableLine94879842040304">
          <table:table-cell table:style-name="Table3.A2" office:value-type="string">
            <text:p text:style-name="P77">Commercial</text:p>
          </table:table-cell>
          <table:table-cell table:style-name="Table3.A2" office:value-type="string">
            <text:p text:style-name="P77">25</text:p>
          </table:table-cell>
          <table:table-cell table:style-name="Table3.A2" office:value-type="string">
            <text:p text:style-name="P77">1.20</text:p>
          </table:table-cell>
          <table:table-cell table:style-name="Table3.D2" office:value-type="string">
            <text:p text:style-name="P77">0.90</text:p>
          </table:table-cell>
        </table:table-row>
        <table:table-row table:style-name="TableLine94879839025104">
          <table:table-cell table:style-name="Table3.A2" office:value-type="string">
            <text:p text:style-name="P77">Industrial</text:p>
          </table:table-cell>
          <table:table-cell table:style-name="Table3.A2" office:value-type="string">
            <text:p text:style-name="P77">50</text:p>
          </table:table-cell>
          <table:table-cell table:style-name="Table3.A2" office:value-type="string">
            <text:p text:style-name="P77">1.30</text:p>
          </table:table-cell>
          <table:table-cell table:style-name="Table3.D2" office:value-type="string">
            <text:p text:style-name="P77">0.98</text:p>
          </table:table-cell>
        </table:table-row>
      </table:table>
      <text:list xml:id="list224924417291585" text:continue-numbering="true" text:style-name="L2">
        <text:list-header>
          <text:p text:style-name="P94"/>
          <text:p text:style-name="P94">If the overall diversity factor is 1.5, determine (a) the maximum load, and (b) the<text:span text:style-name="T10"> </text:span>connected load of each type</text:p>
        </text:list-header>
      </text:list>
      <text:p text:style-name="P37"/>
      <text:p text:style-name="P37"/>
      <text:p text:style-name="P52">(b)<text:span text:style-name="T96">The incremental fuel costs for two generating units </text:span><text:span text:style-name="T95">A </text:span><text:span text:style-name="T96">and </text:span><text:span text:style-name="T95">B</text:span><text:span text:style-name="T96"> of a power plant are given by the following relations,</text:span></text:p>
      <text:list xml:id="list224924721327565" text:continue-numbering="true" text:style-name="L2">
        <text:list-header>
          <text:p text:style-name="P112">dF<text:span text:style-name="T6">a</text:span> /dP<text:span text:style-name="T6">a</text:span> = 0.06 P<text:span text:style-name="T6">a</text:span> + <text:span text:style-name="T98">3</text:span>5</text:p>
          <text:p text:style-name="P112">dF<text:span text:style-name="T6">b </text:span>/dP<text:span text:style-name="T6">b</text:span> = 0.0<text:span text:style-name="T98">9</text:span> P<text:span text:style-name="T6">a</text:span> + 2<text:span text:style-name="T98">5</text:span></text:p>
          <text:p text:style-name="P112"><text:soft-page-break/>where F is the fuel cost in rupees per hour and P is the power output in MW. Estimate</text:p>
        </text:list-header>
      </text:list>
      <text:p text:style-name="P42">(a) the economic loading of the two units when the total load supplied by the power<text:span text:style-name="T9"> </text:span>plants is <text:span text:style-name="T98">15</text:span>0 MW, (b) the loss in fuel cost per hour if the load is equally shared by both<text:span text:style-name="T9"> </text:span>units.</text:p>
      <text:p text:style-name="P35"/>
      <text:p text:style-name="P35"/>
      <text:p text:style-name="P35">11<text:span text:style-name="T98"> (a)</text:span></text:p>
      <text:p text:style-name="P3"><text:s/>A power station has to meet the following demand :</text:p>
      <text:p text:style-name="P3">Group A : 200 kW between 8 A.M. and 6 P.M.</text:p>
      <text:p text:style-name="P3">Group B : 100 kW between 6 A.M. and 10 A.M.</text:p>
      <text:p text:style-name="P3">Group C : 50 kW between 6 A.M. and 10 A.M.</text:p>
      <text:p text:style-name="P3">Group D : 100 kW between 10 A.M. and 6 P.M. and then between 6 P.M. and 6 A.M.</text:p>
      <text:p text:style-name="P3">Plot the daily load curve and determine (i) diversity factor (ii) units generated per day (iii) load factor. </text:p>
      <text:p text:style-name="P3"/>
      <text:p text:style-name="P51">(b)</text:p>
      <text:p text:style-name="P3"/>
      <text:p text:style-name="P3"><text:span text:style-name="T86">1</text:span>2</text:p>
      <text:p text:style-name="P3">At the end of a power distribution system, a certain feeder supplies three distri-</text:p>
      <text:p text:style-name="P3">bution transformers, each one supplying a group of customers whose connected load are listed as</text:p>
      <text:p text:style-name="P3">follows :</text:p>
      <text:p text:style-name="P3">Transformer 1 <text:s text:c="23"/>Transformer 2 <text:s text:c="26"/>Transformer 3</text:p>
      <text:p text:style-name="P3">General power <text:s text:c="15"/>Residence lighting <text:s text:c="17"/>Store lighting and power <text:s/></text:p>
      <text:p text:style-name="P3">service and lighting</text:p>
      <text:p text:style-name="P3"><text:s/></text:p>
      <text:p text:style-name="P3">a : 10 H.P., 5kW <text:s text:c="17"/>e : 5 kW <text:s text:c="41"/>i : 20 kW</text:p>
      <text:p text:style-name="P3">b : 7·5 H.P., 4kW <text:s text:c="15"/>f : 4 kW <text:s text:c="41"/>l : 4 kW</text:p>
      <text:p text:style-name="P3">c : 15 H.P. <text:s text:c="26"/>g : 8 kW <text:s text:c="40"/>j : 10 kW, 5 H.P. </text:p>
      <text:p text:style-name="P3">d : 5 H.P., 2 kW <text:s text:c="15"/>h : 15 kW <text:s text:c="39"/>k : 8 kW, 25 H.P.</text:p>
      <text:p text:style-name="P3"/>
      <text:p text:style-name="P3">Demand factor for all type of load is .60 &amp; Diversity factor as 1.25</text:p>
      <text:p text:style-name="P3">Use the factor <text:s text:c="2"/>and predict the maximum demand on the feeder. The H.P. load</text:p>
      <text:p text:style-name="P3">is motor load and assume an efficiency of 72%. <text:s text:c="8"/></text:p>
      <text:p text:style-name="P3"/>
      <text:p text:style-name="P2"/>
      <text:p text:style-name="P6"><text:span text:style-name="T86">1</text:span><text:span text:style-name="T84">3</text:span><text:span text:style-name="T108"> (A)</text:span></text:p>
      <text:p text:style-name="P6">Example 3.11. A power station has to meet the following demand :</text:p>
      <text:p text:style-name="P4"><text:soft-page-break/>Group A : 4<text:span text:style-name="T1">5</text:span>0 kW between 8 A.M. and 6 P.M.</text:p>
      <text:p text:style-name="P4">Group B : 2<text:span text:style-name="T1">5</text:span>0 kW between 6 A.M. and 10 A.M.</text:p>
      <text:p text:style-name="P4">Group C : <text:span text:style-name="T1">2</text:span>50 kW between 6 A.M. and 10 A.M.</text:p>
      <text:p text:style-name="P4">Group D : <text:span text:style-name="T1">1</text:span>00 kW between 10 A.M. and 6 P.M. and then between 6 P.M. and 6 A.M.</text:p>
      <text:p text:style-name="P4">Plot the daily load curve and determine (i) diversity factor (ii) units generated per day (iii) load factor. </text:p>
      <text:list xml:id="list224924012006473" text:continue-list="list1058868138" text:style-name="L5">
        <text:list-header>
          <text:p text:style-name="P232"><text:span text:style-name="T69">(B)</text:span><text:span text:style-name="T59">A chimney is </text:span><text:span text:style-name="T69">26</text:span><text:span text:style-name="T59"> metres high and the temperature</text:span><text:span text:style-name="T70"> </text:span><text:span text:style-name="T59">of hot gases inside the chimney is 3</text:span><text:span text:style-name="T69">5</text:span><text:span text:style-name="T59">0</text:span><text:span text:style-name="T18">o</text:span><text:span text:style-name="T59">C. The ternperaiuie of outside</text:span><text:span text:style-name="T70"> </text:span><text:span text:style-name="T59">air is </text:span><text:span text:style-name="T69">25</text:span><text:span text:style-name="T18">o</text:span><text:span text:style-name="T59">C and furnace as supplied with 1</text:span><text:span text:style-name="T69">3</text:span><text:span text:style-name="T59"> kg of air per kg of coal</text:span><text:span text:style-name="T70"> </text:span><text:span text:style-name="T59">burnt. Calculate</text:span></text:p>
          <text:p text:style-name="P127">(a) Draught in mm of water.</text:p>
          <text:p text:style-name="P127">(b) Draught height in metres of hot gases.</text:p>
        </text:list-header>
      </text:list>
      <text:p text:style-name="P4"/>
      <text:p text:style-name="P30">14</text:p>
      <text:p text:style-name="P4">At the end of a power distribution system, a certain feeder supplies three distri-</text:p>
      <text:p text:style-name="P4">bution transformers, each one supplying a group of customers whose connected load are listed as</text:p>
      <text:p text:style-name="P4">follows :</text:p>
      <text:p text:style-name="P4">Transformer 1 <text:s text:c="23"/>Transformer 2 <text:s text:c="26"/>Transformer 3</text:p>
      <text:p text:style-name="P4">General power <text:s text:c="15"/>Residence lighting <text:s text:c="17"/>Store lighting and power <text:s/></text:p>
      <text:p text:style-name="P4">service and lighting</text:p>
      <text:p text:style-name="P4"><text:s/></text:p>
      <text:p text:style-name="P4">a : <text:span text:style-name="T1">20</text:span> H.P., 1<text:span text:style-name="T1">5</text:span>kW <text:s text:c="17"/>e : <text:span text:style-name="T1">12</text:span> kW <text:s text:c="41"/>i : <text:span text:style-name="T1">20</text:span> kW</text:p>
      <text:p text:style-name="P4">b : <text:span text:style-name="T1">13</text:span> H.P., <text:span text:style-name="T1">1</text:span>4kW <text:s text:c="15"/>f : <text:span text:style-name="T1">12</text:span> kW <text:s text:c="41"/>l : <text:span text:style-name="T1">1</text:span>6 kW</text:p>
      <text:p text:style-name="P4">c : 1<text:span text:style-name="T2">1</text:span> H.P. <text:s text:c="26"/>g : <text:span text:style-name="T2">6</text:span> kW <text:s text:c="40"/>j : <text:span text:style-name="T1">22</text:span> kW, 7 H.P. </text:p>
      <text:p text:style-name="P4">d : <text:span text:style-name="T1">7</text:span> H.P., 2 kW <text:s text:c="15"/>h : 1<text:span text:style-name="T2">5</text:span> kW <text:s text:c="39"/>k : 6 kW, <text:span text:style-name="T1">23</text:span> H.P.</text:p>
      <text:p text:style-name="P4"/>
      <text:p text:style-name="P4"/>
      <text:p text:style-name="P4">Demand factor for all type of load is .6<text:span text:style-name="T2">2</text:span> &amp; Diversity factor as 1.<text:span text:style-name="T2">3</text:span>5</text:p>
      <text:p text:style-name="P4">Use the factor <text:s text:c="2"/>and predict the maximum demand on the feeder. The H.P. load</text:p>
      <text:p text:style-name="P4">is motor load and assume an efficiency of <text:span text:style-name="T3">75</text:span>%. <text:s text:c="8"/></text:p>
      <text:p text:style-name="P4"/>
      <text:p text:style-name="P4"/>
      <text:p text:style-name="P6">1<text:span text:style-name="T86">5</text:span>.<text:span text:style-name="T108">(A)</text:span></text:p>
      <text:p text:style-name="P6"/>
      <text:p text:style-name="P6"><text:s/>A power station has to meet the following demand :</text:p>
      <text:p text:style-name="P5">Group A : <text:span text:style-name="T4">15</text:span>0 kW between 8 A.M. and 6 P.M.</text:p>
      <text:p text:style-name="P5">Group B : <text:span text:style-name="T4">35</text:span>0 kW between 6 A.M. and 10 A.M.</text:p>
      <text:p text:style-name="P5">Group C : <text:span text:style-name="T4">3</text:span>50 kW between 6 A.M. and 10 A.M.</text:p>
      <text:p text:style-name="P5">Group D : <text:span text:style-name="T4">5</text:span>0 kW between 10 A.M. and 6 P.M. and then between 6 P.M. and 6 <text:soft-page-break/>A.M.</text:p>
      <text:p text:style-name="P5">Plot the daily load curve and determine (i) diversity factor (ii) units generated per day (iii) load factor. <text:s text:c="2"/></text:p>
      <text:p text:style-name="P5"/>
      <text:list xml:id="list224924028046155" text:continue-numbering="true" text:style-name="L5">
        <text:list-header>
          <text:p text:style-name="P232"><text:span text:style-name="T69">(B)</text:span><text:span text:style-name="T59">A chimney is 2</text:span><text:span text:style-name="T69">9</text:span><text:span text:style-name="T59"> metres high and the temperature</text:span><text:span text:style-name="T70"> </text:span><text:span text:style-name="T59">of hot gases inside the chimney is 320</text:span><text:span text:style-name="T18">o</text:span><text:span text:style-name="T59">C. The ternperaiuie of outside</text:span><text:span text:style-name="T70"> </text:span><text:span text:style-name="T59">air is 27</text:span><text:span text:style-name="T18">o</text:span><text:span text:style-name="T59">C and furnace as supplied with 15 kg of air per kg of coal</text:span><text:span text:style-name="T70"> </text:span><text:span text:style-name="T59">burnt. Calculate</text:span></text:p>
          <text:p text:style-name="P127">(a) Draught in mm of water.</text:p>
          <text:p text:style-name="P127">(b) Draught height in metres of hot gases.</text:p>
        </text:list-header>
      </text:list>
      <text:p text:style-name="P29"/>
      <text:p text:style-name="P29"/>
      <text:p text:style-name="P30">16</text:p>
      <text:p text:style-name="P5">At the end of a power distribution system, a certain feeder supplies three distri-</text:p>
      <text:p text:style-name="P5">bution transformers, each one supplying a group of customers whose connected load are listed as</text:p>
      <text:p text:style-name="P5">follows :</text:p>
      <text:p text:style-name="P5">Transformer 1 <text:s text:c="23"/>Transformer 2 <text:s text:c="26"/>Transformer 3</text:p>
      <text:p text:style-name="P5">General power <text:s text:c="15"/>Residence lighting <text:s text:c="17"/>Store lighting and power <text:s/></text:p>
      <text:p text:style-name="P5">service and lighting</text:p>
      <text:p text:style-name="P5"><text:s/></text:p>
      <text:p text:style-name="P5">a : <text:span text:style-name="T1">22</text:span> H.P., 1<text:span text:style-name="T3">4</text:span>kW <text:s text:c="17"/>e : <text:span text:style-name="T1">15</text:span> kW <text:s text:c="41"/>i : <text:span text:style-name="T1">25</text:span> kW</text:p>
      <text:p text:style-name="P5">b : <text:span text:style-name="T1">13</text:span> H.P., <text:span text:style-name="T1">1</text:span>4kW <text:s text:c="15"/>f : <text:span text:style-name="T1">12</text:span> kW <text:s text:c="41"/>l : <text:span text:style-name="T1">1</text:span>6 kW</text:p>
      <text:p text:style-name="P5">c : 1<text:span text:style-name="T3">4</text:span> H.P. <text:s text:c="26"/>g : <text:span text:style-name="T2">6</text:span> kW <text:s text:c="40"/>j : <text:span text:style-name="T1">28</text:span> kW, 7 H.P. </text:p>
      <text:p text:style-name="P5">d : <text:span text:style-name="T1">7</text:span> H.P., <text:span text:style-name="T3">1</text:span>2 kW <text:s text:c="15"/>h : 1<text:span text:style-name="T3">2</text:span> kW <text:s text:c="39"/>k : <text:span text:style-name="T3">1</text:span>6 kW, <text:span text:style-name="T1">23</text:span> H.P.</text:p>
      <text:p text:style-name="P5"/>
      <text:p text:style-name="P5"/>
      <text:p text:style-name="P5">Demand factor for all type of load is .6<text:span text:style-name="T2">2</text:span> &amp; Diversity factor as 1.<text:span text:style-name="T2">3</text:span>5</text:p>
      <text:p text:style-name="P5">Use the factor <text:s text:c="2"/>and predict the maximum demand on the feeder. The H.P. load</text:p>
      <text:p text:style-name="P5">is motor load and assume an efficiency of <text:span text:style-name="T3">75</text:span>%. <text:s text:c="8"/></text:p>
      <text:p text:style-name="P5"/>
      <text:p text:style-name="P8"/>
      <text:list xml:id="list224923565119349" text:continue-list="list900014404" text:style-name="L4">
        <text:list-header>
          <text:p text:style-name="P137"><text:span text:style-name="T86">17.</text:span><text:span text:style-name="T88">(a)</text:span></text:p>
          <text:p text:style-name="P137">The maximum (peak) load on a thermal power plant of 60 <text:span text:style-name="T84">M</text:span>W capacity is 50 mW at<text:span text:style-name="T5"> </text:span>an annual load factor of 50%. The loads having maximum demands of 25 <text:span text:style-name="T84">M</text:span>W, 20 <text:span text:style-name="T84">M</text:span>W, 8 <text:span text:style-name="T84">M</text:span>W and, 5 <text:span text:style-name="T84">M</text:span>W<text:span text:style-name="T5"> </text:span>are connected to the power station.</text:p>
          <text:p text:style-name="P138">Determine: (a) Average load on power station (b) Energy generated per year (c) Demand factor<text:span text:style-name="T5"> </text:span>(d) Diversity factor.</text:p>
          <text:p text:style-name="P138"/>
          <text:p text:style-name="P137"><text:span text:style-name="T86">1</text:span><text:span text:style-name="T88">7(b)</text:span></text:p>
          <text:p text:style-name="P137"><text:soft-page-break/>In a steam power plant the capital cost of power generation equipment is Rs. 25 ×<text:span text:style-name="T5"> </text:span>10 . The useful life of the plant is 30 years and salvage value of the plant to Rs. 1 × 10 <text:span text:style-name="T13">5</text:span> . Determine by<text:span text:style-name="T5"> </text:span>sinking fund method the amount to be saved annually for replacement if the rate of annual compound<text:span text:style-name="T5"> </text:span>interest is 6%.</text:p>
          <text:p text:style-name="P138"/>
          <text:p text:style-name="P138"/>
          <text:p text:style-name="P137"><text:span text:style-name="T86">1</text:span><text:span text:style-name="T88">8</text:span></text:p>
          <text:p text:style-name="P144">(a) </text:p>
          <text:p text:style-name="P139"/>
          <text:p text:style-name="P139">Two lamps are to be compared:</text:p>
          <text:p text:style-name="P138">(a) Cost of first lamp is Re. 1 and it takes 100 watts.</text:p>
          <text:p text:style-name="P138">(b) Cost of second lamp is Rs. 4 and it takes 60 watts.</text:p>
          <text:p text:style-name="P138">Both lamps are of equal candle<text:span text:style-name="T5"> </text:span>power and each has a useful life of 100 hours. Which lamp will<text:span text:style-name="T5"> </text:span>prove economical if the energy is charged at Rs. 70 per kW of maximum demand per year plus 5 paise<text:span text:style-name="T5"> </text:span>per kWh? At what load factor both the lamps will be equally advantageous?</text:p>
          <text:p text:style-name="P138"/>
        </text:list-header>
      </text:list>
      <text:p text:style-name="P39">(b)<text:span text:style-name="T92">The input-output curve of a 150 MW station is expressed by the formula, </text:span></text:p>
      <text:list xml:id="list224924119540895" text:continue-list="list848346182" text:style-name="L3">
        <text:list-header>
          <text:p text:style-name="P223"><text:span text:style-name="T59">I = 10</text:span><text:span text:style-name="T17">6</text:span><text:span text:style-name="T59"> (250 + 5L + 0.03L</text:span><text:span text:style-name="T17">3</text:span><text:span text:style-name="T59">) + L</text:span><text:span text:style-name="T17">4</text:span></text:p>
          <text:p text:style-name="P123">where I is in kcal per hour and L is in mega-watts. Find the load at which minimum heat rate occurs and check with the plot.</text:p>
        </text:list-header>
      </text:list>
      <text:p text:style-name="P27"/>
      <text:list xml:id="list224924727518029" text:continue-list="list224923565119349" text:style-name="L4">
        <text:list-header>
          <text:p text:style-name="P138"/>
        </text:list-header>
      </text:list>
      <text:p text:style-name="P35">19<text:span text:style-name="T108"> (A)</text:span></text:p>
      <text:list xml:id="list224923503020560" text:continue-list="list224923979187633" text:style-name="L1">
        <text:list-header>
          <text:p text:style-name="P90">A power station has to supply load as follows:</text:p>
          <text:p text:style-name="P90"/>
        </text:list-header>
      </text:list>
      <table:table table:name="Table2" table:style-name="Table2">
        <table:table-column table:style-name="Table2.A" table:number-columns-repeated="5"/>
        <table:table-column table:style-name="Table2.F"/>
        <table:table-row table:style-name="TableLine94879866533072">
          <table:table-cell table:style-name="Table2.A1" office:value-type="string">
            <text:p text:style-name="P79">Time (hours)</text:p>
          </table:table-cell>
          <table:table-cell table:style-name="Table2.A1" office:value-type="string">
            <text:p text:style-name="P79">0-6</text:p>
          </table:table-cell>
          <table:table-cell table:style-name="Table2.A1" office:value-type="string">
            <text:p text:style-name="P79">6-12</text:p>
          </table:table-cell>
          <table:table-cell table:style-name="Table2.A1" office:value-type="string">
            <text:p text:style-name="P79">12-14</text:p>
          </table:table-cell>
          <table:table-cell table:style-name="Table2.A1" office:value-type="string">
            <text:p text:style-name="P79">14-18</text:p>
          </table:table-cell>
          <table:table-cell table:style-name="Table2.F1" office:value-type="string">
            <text:p text:style-name="P79">18-24</text:p>
          </table:table-cell>
        </table:table-row>
        <table:table-row table:style-name="TableLine94879840461632">
          <table:table-cell table:style-name="Table2.A2" office:value-type="string">
            <text:p text:style-name="P74">Load (MW)</text:p>
          </table:table-cell>
          <table:table-cell table:style-name="Table2.A2" office:value-type="string">
            <text:p text:style-name="P79">30</text:p>
          </table:table-cell>
          <table:table-cell table:style-name="Table2.A2" office:value-type="string">
            <text:p text:style-name="P79">90</text:p>
          </table:table-cell>
          <table:table-cell table:style-name="Table2.A2" office:value-type="string">
            <text:p text:style-name="P79">60</text:p>
          </table:table-cell>
          <table:table-cell table:style-name="Table2.A2" office:value-type="string">
            <text:p text:style-name="P79">100</text:p>
          </table:table-cell>
          <table:table-cell table:style-name="Table2.F2" office:value-type="string">
            <text:p text:style-name="P79">50</text:p>
          </table:table-cell>
        </table:table-row>
      </table:table>
      <text:list xml:id="list224924556189515" text:continue-numbering="true" text:style-name="L1">
        <text:list-header>
          <text:p text:style-name="P90">(a) Draw the load curve. (b) Draw the load duration curve. (c) Select suitable generating<text:span text:style-name="T11"> </text:span>units to supply the load. (d) Cal culate the load factor. (e) Calculate the capacity of the<text:span text:style-name="T11"> </text:span>plant and the plant capacity factor.</text:p>
        </text:list-header>
      </text:list>
      <text:p text:style-name="P15"/>
      <text:list xml:id="list224924745810034" text:continue-numbering="true" text:style-name="L1">
        <text:list-header>
          <text:p text:style-name="P90"><text:span text:style-name="T87">(</text:span><text:span text:style-name="T108">B</text:span><text:span text:style-name="T87">)</text:span>The capital cost of a power generating equipment in a steam power<text:span text:style-name="T12"> </text:span>plant is Rs 80 <text:span text:style-name="T12">*</text:span>10<text:span text:style-name="T13"> 6</text:span> . The useful life of the plant is 30 years and its<text:span text:style-name="T12"> </text:span>salvage value is <text:span text:style-name="T100">7</text:span>%<text:span text:style-name="T12"> </text:span>of the capital cost. Determine by the sinking-fund method the amount of money to be<text:span text:style-name="T12"> </text:span>saved annually for replacement if <text:soft-page-break/>the yearly rate of compound interest is 6<text:span text:style-name="T100">.5</text:span>%.</text:p>
        </text:list-header>
      </text:list>
      <text:p text:style-name="P14"/>
      <text:p text:style-name="P35"/>
      <text:list xml:id="list224924418698529" text:continue-list="list224924727518029" text:style-name="L4">
        <text:list-header>
          <text:p text:style-name="P148"><text:span text:style-name="T86">20</text:span><text:span text:style-name="T100"> (a)</text:span></text:p>
          <text:p text:style-name="P148"><text:s/>The annual peak load on a 30 <text:span text:style-name="T83">M</text:span>W power station is 25 mW. The power station supplies load having maximum demands of 10 <text:span text:style-name="T84">M</text:span>W, 8.5 <text:span text:style-name="T84">M</text:span>W, 5 <text:span text:style-name="T84">M</text:span>W and 4.5 <text:span text:style-name="T84">M</text:span>W. The annual load factor is 0.45. Find:</text:p>
          <text:p text:style-name="P149">(i) Average load</text:p>
          <text:p text:style-name="P149">(ii) Energy supplied per year</text:p>
          <text:p text:style-name="P149">(iii) Diversity factor</text:p>
          <text:p text:style-name="P149">(iv) Demand factor</text:p>
        </text:list-header>
      </text:list>
      <text:p text:style-name="P13"/>
      <text:p text:style-name="P53">(b)<text:span text:style-name="T90">In a steam power plant the capital cost of power generation equipment is Rs. </text:span>3<text:span text:style-name="T90">5 ×</text:span><text:span text:style-name="T5"> </text:span><text:span text:style-name="T90">10 . The useful life of the plant is </text:span>25<text:span text:style-name="T90"> years and salvage value of the plant to Rs. </text:span>2<text:span text:style-name="T90"> × 10 </text:span><text:span text:style-name="T24">5</text:span><text:span text:style-name="T90"> . Determine by</text:span><text:span text:style-name="T5"> </text:span><text:span text:style-name="T90">sinking fund method the amount to be saved annually for replacement if the rate of annual compound</text:span><text:span text:style-name="T5"> </text:span><text:span text:style-name="T90">interest is </text:span>5<text:span text:style-name="T90">%.</text:span></text:p>
      <text:list xml:id="list224923107167122" text:continue-numbering="true" text:style-name="L4">
        <text:list-header>
          <text:p text:style-name="P157"/>
          <text:p text:style-name="P157">21<text:span text:style-name="T100"> </text:span><text:span text:style-name="T108">(A</text:span><text:span text:style-name="T100">)</text:span></text:p>
          <text:p text:style-name="P150"><text:span text:style-name="T91">(</text:span>A power station has a maximum demand of 15 <text:span text:style-name="T84">M</text:span>W, a load factor of 0.7, a plant capacity factor of 0.525 and a plant use factor of 0.85. Find:</text:p>
          <text:p text:style-name="P149">(i) The daily energy produced.</text:p>
          <text:p text:style-name="P149">(ii) The reserve capacity of the plant.</text:p>
          <text:p text:style-name="P248">(iii) The maximum energy that could be produced daily if the plant operating schedule is fully loaded when in operation.</text:p>
          <text:p text:style-name="P249"/>
          <text:p text:style-name="P251">(<text:span text:style-name="T108">B</text:span>)<text:span text:style-name="T93">The input output curve of a 10MW power station</text:span><text:span text:style-name="T82"> </text:span><text:span text:style-name="T93">is expressed as follows:</text:span></text:p>
          <text:p text:style-name="P167">i=10<text:span text:style-name="T13">6</text:span>(8+L+0.4L<text:span text:style-name="T13">2</text:span>)</text:p>
          <text:p text:style-name="P167">where <text:span text:style-name="T82">i</text:span> is in kcal per hour and L is in MW.</text:p>
          <text:p text:style-name="P234"><text:span text:style-name="T55">Determine the average heat rate of the power station for a day if</text:span><text:span text:style-name="T56"> </text:span><text:span text:style-name="T55">it operates at its full capacity for 12 hours and is kept running at zero</text:span><text:span text:style-name="T56"> </text:span><text:span text:style-name="T55">load for remaining 12 hours. </text:span></text:p>
          <text:p text:style-name="P253"/>
        </text:list-header>
      </text:list>
      <text:p text:style-name="P86"/>
      <text:list xml:id="list2864363456" text:style-name="L6">
        <text:list-header>
          <text:p text:style-name="P158">22</text:p>
          <text:p text:style-name="P175"><text:span text:style-name="T91">(a)</text:span>A residential load of a locality is given below:</text:p>
        </text:list-header>
      </text:list>
      <table:table table:name="Table10" table:style-name="Table10">
        <table:table-column table:style-name="Table10.A" table:number-columns-repeated="6"/>
        <table:table-column table:style-name="Table10.G"/>
        <table:table-row table:style-name="TableLine94879843754928">
          <table:table-cell table:style-name="Table10.A1" office:value-type="string">
            <text:p text:style-name="P61">Time (h)</text:p>
          </table:table-cell>
          <table:table-cell table:style-name="Table10.A1" office:value-type="string">
            <text:p text:style-name="P61">0-5</text:p>
          </table:table-cell>
          <table:table-cell table:style-name="Table10.A1" office:value-type="string">
            <text:p text:style-name="P61">5-6</text:p>
          </table:table-cell>
          <table:table-cell table:style-name="Table10.A1" office:value-type="string">
            <text:p text:style-name="P61">6-9</text:p>
          </table:table-cell>
          <table:table-cell table:style-name="Table10.A1" office:value-type="string">
            <text:p text:style-name="P61">9-18</text:p>
          </table:table-cell>
          <table:table-cell table:style-name="Table10.A1" office:value-type="string">
            <text:p text:style-name="P61">18-21</text:p>
          </table:table-cell>
          <table:table-cell table:style-name="Table10.G1" office:value-type="string">
            <text:p text:style-name="P61">21-24</text:p>
          </table:table-cell>
        </table:table-row>
        <table:table-row table:style-name="TableLine94879798302160">
          <table:table-cell table:style-name="Table10.A2" office:value-type="string">
            <text:p text:style-name="P61">Load (kW)</text:p>
          </table:table-cell>
          <table:table-cell table:style-name="Table10.A2" office:value-type="string">
            <text:p text:style-name="P61">2</text:p>
          </table:table-cell>
          <table:table-cell table:style-name="Table10.A2" office:value-type="string">
            <text:p text:style-name="P61">6</text:p>
          </table:table-cell>
          <table:table-cell table:style-name="Table10.A2" office:value-type="string">
            <text:p text:style-name="P61">18</text:p>
          </table:table-cell>
          <table:table-cell table:style-name="Table10.A2" office:value-type="string">
            <text:p text:style-name="P61">0</text:p>
          </table:table-cell>
          <table:table-cell table:style-name="Table10.A2" office:value-type="string">
            <text:p text:style-name="P61">12</text:p>
          </table:table-cell>
          <table:table-cell table:style-name="Table10.G2" office:value-type="string">
            <text:p text:style-name="P61">8</text:p>
          </table:table-cell>
        </table:table-row>
      </table:table>
      <text:list xml:id="list224925024729478" text:continue-numbering="true" text:style-name="L6">
        <text:list-header>
          <text:p text:style-name="P176"><text:soft-page-break/>Draw the load curve and find out the load factor and energy consumed during 24 hr.</text:p>
        </text:list-header>
      </text:list>
      <text:p text:style-name="P20"/>
      <text:p text:style-name="P40"><text:s text:c="8"/>(b) <text:s/><text:span text:style-name="T34">A power plant has the following annual factors: Load factor = 70 per cent; capacity factor = 50</text:span><text:span text:style-name="T35"> </text:span><text:span text:style-name="T34">per cent. Use factor = 60 per cent. Maximum demand is 20 MW. Find out the following:</text:span></text:p>
      <text:list xml:id="list224924381782996" text:continue-numbering="true" text:style-name="L6">
        <text:list-header>
          <text:p text:style-name="P180">(a) Annual energy production</text:p>
          <text:p text:style-name="P180">(b) Reserve capacity over and above peak load</text:p>
          <text:p text:style-name="P180">(c) Hours during which the plant is not in service per year</text:p>
        </text:list-header>
      </text:list>
      <text:p text:style-name="P23"/>
      <text:list xml:id="list224923255321796" text:continue-numbering="true" text:style-name="L6">
        <text:list-header>
          <text:p text:style-name="P176"/>
          <text:p text:style-name="P158"/>
          <text:p text:style-name="P158">23<text:span text:style-name="T100"> (a)</text:span></text:p>
          <text:p text:style-name="P175">A power station supplies the following loads to the consumers:</text:p>
        </text:list-header>
      </text:list>
      <table:table table:name="Table11" table:style-name="Table11">
        <table:table-column table:style-name="Table11.A"/>
        <table:table-column table:style-name="Table11.B" table:number-columns-repeated="7"/>
        <table:table-row table:style-name="TableLine94879867994864">
          <table:table-cell table:style-name="Table11.A1" office:value-type="string">
            <text:p text:style-name="P61">Time (h)</text:p>
          </table:table-cell>
          <table:table-cell table:style-name="Table11.A1" office:value-type="string">
            <text:p text:style-name="P61">0-6</text:p>
          </table:table-cell>
          <table:table-cell table:style-name="Table11.A1" office:value-type="string">
            <text:p text:style-name="P61">6-10</text:p>
          </table:table-cell>
          <table:table-cell table:style-name="Table11.A1" office:value-type="string">
            <text:p text:style-name="P61">10-12</text:p>
          </table:table-cell>
          <table:table-cell table:style-name="Table11.A1" office:value-type="string">
            <text:p text:style-name="P61">12-16</text:p>
          </table:table-cell>
          <table:table-cell table:style-name="Table11.A1" office:value-type="string">
            <text:p text:style-name="P61">16-20</text:p>
          </table:table-cell>
          <table:table-cell table:style-name="Table11.A1" office:value-type="string">
            <text:p text:style-name="P61">20-22</text:p>
          </table:table-cell>
          <table:table-cell table:style-name="Table11.H1" office:value-type="string">
            <text:p text:style-name="P61">22-24</text:p>
          </table:table-cell>
        </table:table-row>
        <table:table-row table:style-name="TableLine94879819399920">
          <table:table-cell table:style-name="Table11.A2" office:value-type="string">
            <text:p text:style-name="P61">Load (MW)</text:p>
          </table:table-cell>
          <table:table-cell table:style-name="Table11.A2" office:value-type="string">
            <text:p text:style-name="P61">30</text:p>
          </table:table-cell>
          <table:table-cell table:style-name="Table11.A2" office:value-type="string">
            <text:p text:style-name="P61">50</text:p>
          </table:table-cell>
          <table:table-cell table:style-name="Table11.A2" office:value-type="string">
            <text:p text:style-name="P61">60</text:p>
          </table:table-cell>
          <table:table-cell table:style-name="Table11.A2" office:value-type="string">
            <text:p text:style-name="P61">40</text:p>
          </table:table-cell>
          <table:table-cell table:style-name="Table11.A2" office:value-type="string">
            <text:p text:style-name="P61">80</text:p>
          </table:table-cell>
          <table:table-cell table:style-name="Table11.A2" office:value-type="string">
            <text:p text:style-name="P61">70</text:p>
          </table:table-cell>
          <table:table-cell table:style-name="Table11.H2" office:value-type="string">
            <text:p text:style-name="P61">40</text:p>
          </table:table-cell>
        </table:table-row>
      </table:table>
      <text:list xml:id="list224924701122212" text:continue-numbering="true" text:style-name="L6">
        <text:list-header>
          <text:p text:style-name="P176">Find (a) the load factor of the plant and (b) what is the load factor of a standby equipment of 30 MW capacity if it takes up all loads above 60 MW?</text:p>
          <text:p text:style-name="P176"/>
        </text:list-header>
      </text:list>
      <text:list xml:id="list1562311491" text:style-name="L7">
        <text:list-header>
          <text:p text:style-name="P140"><text:span text:style-name="T100">(b)</text:span>In a steam power plant the capital cost of power generation equipment is Rs. <text:span text:style-name="T100">1</text:span>5 ×<text:span text:style-name="T5"> </text:span>10 . The useful life of the plant is 30 years and salvage value of the plant to Rs. 1<text:span text:style-name="T100">.25</text:span> × 10 <text:span text:style-name="T13">5</text:span> . Determine by<text:span text:style-name="T5"> </text:span>sinking fund method the amount to be saved annually for replacement if the rate of annual compound<text:span text:style-name="T5"> </text:span>interest is <text:span text:style-name="T100">4</text:span>%.</text:p>
        </text:list-header>
      </text:list>
      <text:p text:style-name="P54"/>
      <text:p text:style-name="P20"/>
      <text:list xml:id="list224924854255958" text:continue-list="list224924701122212" text:style-name="L6">
        <text:list-header>
          <text:p text:style-name="P176"/>
          <text:p text:style-name="P158">24<text:span text:style-name="T100"> (a)</text:span></text:p>
          <text:p text:style-name="P175">The peak load on a power station is 35 MW. The loads having maximum demands of 15, 10,<text:span text:style-name="T33"> </text:span>5 and 7 MW are connected to the power station. The capacity of the power station is 40 MW<text:span text:style-name="T33"> </text:span>and annual load factor is 50 per cent. Find (a) the average load on the power station, (b) energy<text:span text:style-name="T33"> </text:span>supplied per year, (c) demand factor and (d) diversity factor.</text:p>
          <text:p text:style-name="P175"/>
          <text:p text:style-name="P190">(b)<text:span text:style-name="T92">The input-output curve of a 150 MW station is expressed by the formula, </text:span></text:p>
          <text:p text:style-name="P235"><text:span text:style-name="T59">I = 10</text:span><text:span text:style-name="T17">6</text:span><text:span text:style-name="T59"> (250 + 5L + 0.03L</text:span><text:span text:style-name="T17">3</text:span><text:span text:style-name="T59">) + L</text:span><text:span text:style-name="T17">4</text:span></text:p>
          <text:p text:style-name="P129"><text:soft-page-break/>where I is in kcal per hour and L is in mega-watts. Find the load at which minimum heat rate occurs <text:span text:style-name="T100">.</text:span></text:p>
          <text:p text:style-name="P158"/>
          <text:p text:style-name="P158"/>
          <text:p text:style-name="P158">25<text:span text:style-name="T100"> (a)</text:span></text:p>
          <text:p text:style-name="P175">A power plant supplies the loads having maximum demands of 40, 50 and 30 MW respectively.<text:span text:style-name="T33"> </text:span>The load factor of the plant on the basis of annual load curve is 60 per cent and the diversity<text:span text:style-name="T33"> </text:span>factor of the load is 1.2. Determine (a) the maximum load on the power plant, (b) the capacity<text:span text:style-name="T33"> </text:span>of the power plant required to take the loads and (c) annual energy supplied by the power plant.</text:p>
          <text:p text:style-name="P175"/>
        </text:list-header>
      </text:list>
      <text:p text:style-name="P55">(b)<text:span text:style-name="T99">The capital cost of a power generating equipment in a steam power</text:span><text:span text:style-name="T12"> </text:span><text:span text:style-name="T99">plant is Rs </text:span>70<text:span text:style-name="T99"> </text:span><text:span text:style-name="T12">*</text:span><text:span text:style-name="T99">10</text:span><text:span text:style-name="T25"> 6</text:span><text:span text:style-name="T99"> . The useful life of the plant is </text:span>20<text:span text:style-name="T99"> years and its</text:span><text:span text:style-name="T12"> </text:span><text:span text:style-name="T99">salvage value is </text:span>8<text:span text:style-name="T99">%</text:span><text:span text:style-name="T12"> </text:span><text:span text:style-name="T99">of the capital cost. Determine by the sinking-fund method the amount of money to be</text:span><text:span text:style-name="T12"> </text:span><text:span text:style-name="T99">saved annually for replacement if the yearly rate of compound interest is </text:span>5<text:span text:style-name="T99">%.</text:span></text:p>
      <text:list xml:id="list224923630339016" text:continue-numbering="true" text:style-name="L6">
        <text:list-header>
          <text:p text:style-name="P175"/>
          <text:p text:style-name="P158">26 <text:span text:style-name="T101">(A)</text:span></text:p>
          <text:p text:style-name="P175">A power plant supplies the loads having maximum demands of 40, 50 and 30 MW respectively.<text:span text:style-name="T34"> </text:span>The load factor of the plant on the basis of annual load curve is 60 percent and the diversity<text:span text:style-name="T34"> </text:span>factor of the load is 1.2. Determine (a) the maximum load on the power plant, (b) the capacity<text:span text:style-name="T34"> </text:span>of the power plant required to take the loads and (c) annual energy supplied by the power plant.</text:p>
        </text:list-header>
      </text:list>
      <text:p text:style-name="P21"/>
      <text:p text:style-name="P55">(B)<text:span text:style-name="T99">The following loads are connected to a power plant:</text:span></text:p>
      <table:table table:name="Table6" table:style-name="Table6">
        <table:table-column table:style-name="Table6.A" table:number-columns-repeated="3"/>
        <table:table-column table:style-name="Table6.D"/>
        <table:table-row table:style-name="TableLine94879839046656">
          <table:table-cell table:style-name="Table6.A1" office:value-type="string">
            <text:p text:style-name="P76">Type of load</text:p>
            <text:p text:style-name="P76"/>
          </table:table-cell>
          <table:table-cell table:style-name="Table6.A1" office:value-type="string">
            <text:p text:style-name="P76">Max. demand</text:p>
            <text:p text:style-name="P76">(MW)</text:p>
          </table:table-cell>
          <table:table-cell table:style-name="Table6.A1" office:value-type="string">
            <text:p text:style-name="P76">Diversity factor</text:p>
          </table:table-cell>
          <table:table-cell table:style-name="Table6.A1" office:value-type="string">
            <text:p text:style-name="P76">Demand factor</text:p>
          </table:table-cell>
        </table:table-row>
        <table:table-row table:style-name="TableLine94879847110608">
          <table:table-cell table:style-name="Table6.A1" office:value-type="string">
            <text:p text:style-name="P78">Domestic</text:p>
          </table:table-cell>
          <table:table-cell table:style-name="Table6.A1" office:value-type="string">
            <text:p text:style-name="P78">15</text:p>
          </table:table-cell>
          <table:table-cell table:style-name="Table6.A1" office:value-type="string">
            <text:p text:style-name="P78">1.5</text:p>
          </table:table-cell>
          <table:table-cell table:style-name="Table6.A1" office:value-type="string">
            <text:p text:style-name="P78">0.7<text:span text:style-name="T101">5</text:span></text:p>
          </table:table-cell>
        </table:table-row>
        <table:table-row table:style-name="TableLine94879836444640">
          <table:table-cell table:style-name="Table6.A1" office:value-type="string">
            <text:p text:style-name="P78">Commercial</text:p>
          </table:table-cell>
          <table:table-cell table:style-name="Table6.A1" office:value-type="string">
            <text:p text:style-name="P78">25</text:p>
          </table:table-cell>
          <table:table-cell table:style-name="Table6.A1" office:value-type="string">
            <text:p text:style-name="P78">1.2<text:span text:style-name="T101">5</text:span></text:p>
          </table:table-cell>
          <table:table-cell table:style-name="Table6.A1" office:value-type="string">
            <text:p text:style-name="P78">0.<text:span text:style-name="T101">85</text:span></text:p>
          </table:table-cell>
        </table:table-row>
        <table:table-row table:style-name="TableLine94879877072896">
          <table:table-cell table:style-name="Table6.A1" office:value-type="string">
            <text:p text:style-name="P78">Industrial</text:p>
          </table:table-cell>
          <table:table-cell table:style-name="Table6.A1" office:value-type="string">
            <text:p text:style-name="P78">50</text:p>
          </table:table-cell>
          <table:table-cell table:style-name="Table6.A1" office:value-type="string">
            <text:p text:style-name="P78">1.3<text:span text:style-name="T101">5</text:span></text:p>
          </table:table-cell>
          <table:table-cell table:style-name="Table6.A1" office:value-type="string">
            <text:p text:style-name="P78">0.9</text:p>
          </table:table-cell>
        </table:table-row>
      </table:table>
      <text:list xml:id="list3783141184" text:style-name="L8">
        <text:list-header>
          <text:p text:style-name="P95"/>
        </text:list-header>
      </text:list>
      <text:p text:style-name="P18">If the overall diversity factor is 1.5, determine (a) the maximum load, and (b) the<text:span text:style-name="T10"> </text:span>connected load of each type.</text:p>
      <text:list xml:id="list224923893239583" text:continue-list="list224923630339016" text:style-name="L6">
        <text:list-header>
          <text:p text:style-name="P177"/>
          <text:p text:style-name="P159">27<text:span text:style-name="T89">(</text:span><text:span text:style-name="T101">A</text:span><text:span text:style-name="T89">)</text:span><text:span text:style-name="T102">The annual peak load on a </text:span><text:span text:style-name="T104">35</text:span><text:span text:style-name="T102"> </text:span><text:span text:style-name="T103">M</text:span><text:span text:style-name="T102">W power station is </text:span><text:span text:style-name="T104">30</text:span><text:span text:style-name="T102"> </text:span><text:span text:style-name="T103">M</text:span><text:span text:style-name="T102">W. The power station supplies load having maximum demands of </text:span><text:span text:style-name="T104">9</text:span><text:span text:style-name="T103">M</text:span><text:span text:style-name="T102">W, </text:span><text:span text:style-name="T104">12</text:span><text:span text:style-name="T102"> </text:span><text:span text:style-name="T103">M</text:span><text:span text:style-name="T102">W, 5 </text:span><text:span text:style-name="T103">M</text:span><text:span text:style-name="T102">W and </text:span><text:span text:style-name="T104">5</text:span><text:span text:style-name="T102">.5 </text:span><text:span text:style-name="T103">M</text:span><text:span text:style-name="T102">W. The annual load factor is 0.5</text:span><text:span text:style-name="T104">5</text:span><text:span text:style-name="T102"> Find:</text:span></text:p>
          <text:p text:style-name="P151">(i) Average load</text:p>
          <text:p text:style-name="P151"><text:soft-page-break/>(ii) Energy supplied per year</text:p>
          <text:p text:style-name="P151">(iii) Diversity factor</text:p>
          <text:p text:style-name="P152">(iv) Demand factor</text:p>
          <text:p text:style-name="P130"/>
          <text:p text:style-name="P130"><text:span text:style-name="T101">(B)</text:span>The input-output curve of a 150 MW station is expressed by the formula, </text:p>
          <text:p text:style-name="P236"><text:span text:style-name="T59">I = 10</text:span><text:span text:style-name="T17">6</text:span><text:span text:style-name="T59"> (</text:span><text:span text:style-name="T68">30</text:span><text:span text:style-name="T59">0 + </text:span><text:span text:style-name="T68">6</text:span><text:span text:style-name="T59">L + 0.03</text:span><text:span text:style-name="T68">5</text:span><text:span text:style-name="T59">L</text:span><text:span text:style-name="T17">3</text:span><text:span text:style-name="T59">) + L</text:span><text:span text:style-name="T17">4</text:span></text:p>
          <text:p text:style-name="P130">where I is in kcal per hour and L is in mega-watts. Find the load at which minimum heat rate occurs and check with the plot.</text:p>
          <text:p text:style-name="P181"/>
          <text:p text:style-name="P158">28<text:span text:style-name="T108">(A)</text:span></text:p>
          <text:p text:style-name="P181">A load duration curve for an industrial load is served by hydro-thermal plants follows a straight line. The maximum and minimum loads are 30 and 10 MW, respectively. The hydel-plant is available at the time of minimum regulating flow which is just enough to take a peak load of 75 MWh per day. On investigation, it was found economical to pump water from lower reservoir to higher reservoir using the excess power from steam plant during peak period allowing steam plant to run at 100 per cent load all the times. Determine the capacities of hydel and steam plants required for the purpose. Assume efficiency of steam to electric conversion = 45%</text:p>
          <text:p text:style-name="P181"/>
        </text:list-header>
      </text:list>
      <text:p text:style-name="P57">(B)<text:span text:style-name="T90">In a steam power plant the capital cost of power generation equipment is Rs. </text:span><text:span text:style-name="T100">3</text:span>0<text:span text:style-name="T90"> ×</text:span><text:span text:style-name="T5"> </text:span><text:span text:style-name="T90">10 . The useful life of the plant is </text:span><text:span text:style-name="T100">2</text:span>7<text:span text:style-name="T90"> years and salvage value of the plant to Rs. </text:span>1<text:span text:style-name="T90"> × 10 </text:span><text:span text:style-name="T24">5</text:span><text:span text:style-name="T90"> . Determine by</text:span><text:span text:style-name="T5"> </text:span><text:span text:style-name="T90">sinking fund method the amount to be saved annually for replacement if the rate of annual compound</text:span><text:span text:style-name="T5"> </text:span><text:span text:style-name="T90">interest is </text:span><text:span text:style-name="T100">5</text:span><text:span text:style-name="T90">%.</text:span></text:p>
      <text:p text:style-name="P32"/>
      <text:list xml:id="list224924442488581" text:continue-numbering="true" text:style-name="L6">
        <text:list-header>
          <text:p text:style-name="P182"/>
          <text:p text:style-name="P158">29<text:span text:style-name="T105">(A)</text:span></text:p>
          <text:p text:style-name="P181">The yearly duration curve for a certain plant can be considered as a straight line from 2<text:span text:style-name="T104">0</text:span> to <text:span text:style-name="T104">5</text:span> MW <text:span text:style-name="T104">, WHERE </text:span>power <text:span text:style-name="T104">IS </text:span>supplied <text:span text:style-name="T104">BY</text:span> one generator rated at 5 MW and two<text:span text:style-name="T104"> GENERATING </text:span><text:s/>units of 10 MW capacity each. Determine</text:p>
          <text:p text:style-name="P182">(a) Installed capacity</text:p>
          <text:p text:style-name="P182">(b) Plant factor</text:p>
          <text:p text:style-name="P182">(c) Maximum demand</text:p>
          <text:p text:style-name="P182">(d) Load factor</text:p>
          <text:p text:style-name="P182">(e) Utilization factor</text:p>
        </text:list-header>
      </text:list>
      <text:p text:style-name="P22"/>
      <text:p text:style-name="P56">(B)<text:span text:style-name="T99">A central power station has annual load factor, capacity factor and use factor </text:span><text:soft-page-break/><text:span text:style-name="T99">as 60%,</text:span><text:span text:style-name="T106"> </text:span><text:span text:style-name="T99">40% and 45%, respectively. The maximum demand is 15 MW. Estimate (a) the annual</text:span><text:span text:style-name="T106"> </text:span><text:span text:style-name="T99">energy produc tion and revenue earned if the cost of energy is Re 1/</text:span><text:span text:style-name="T103">UNIT</text:span><text:span text:style-name="T99">, (b) the reserve</text:span><text:span text:style-name="T106"> </text:span><text:span text:style-name="T99">capacity over and above the peak load, and (c) the hours per year the station is not in</text:span><text:span text:style-name="T106"> </text:span><text:span text:style-name="T99">service.</text:span></text:p>
      <text:list xml:id="list224923349728475" text:continue-numbering="true" text:style-name="L6">
        <text:list-header>
          <text:p text:style-name="P182"/>
          <text:p text:style-name="P158">30<text:span text:style-name="T105"> (A)</text:span></text:p>
          <text:p text:style-name="P181">A power plant has the following annual factors: Load factor = 70 per cent; capacity factor = 50<text:span text:style-name="T35"> </text:span>per cent. Use factor = 60 per cent. Maximum demand is 20 MW. Find out the following:</text:p>
          <text:p text:style-name="P183">(a) Annual energy production</text:p>
          <text:p text:style-name="P182">(b) Reserve capacity over and above peak load</text:p>
          <text:p text:style-name="P182">(c) Hours during which the plant is not in service per year</text:p>
        </text:list-header>
      </text:list>
      <text:p text:style-name="P22"/>
      <text:p text:style-name="P56">(B)<text:span text:style-name="T99">he incremental fuel costs for two generating units A and B of a power plant are given</text:span><text:span text:style-name="T29"> </text:span><text:span text:style-name="T99">by the following relations:</text:span></text:p>
      <text:list xml:id="list224923528847427" text:continue-list="list3783141184" text:style-name="L8">
        <text:list-header>
          <text:p text:style-name="P96">dF<text:span text:style-name="T6">A </text:span>/dP<text:span text:style-name="T6">A</text:span> = 0.0<text:span text:style-name="T105">7</text:span> P<text:span text:style-name="T6">A</text:span> + 1<text:span text:style-name="T105">0</text:span></text:p>
          <text:p text:style-name="P96">dF<text:span text:style-name="T6">B </text:span>/dP<text:span text:style-name="T6">B </text:span>= 0.0<text:span text:style-name="T105">8</text:span> P<text:span text:style-name="T6">B</text:span> + 1<text:span text:style-name="T105">2</text:span></text:p>
          <text:p text:style-name="P96">where P is the power in MW and F is the fuel cost in rupees per hour.</text:p>
          <text:p text:style-name="P96">(a) Find the economic loading of the two units when the total load to<text:span text:style-name="T29"> </text:span>be supplied by the<text:span text:style-name="T29"> </text:span>power station is 1<text:span text:style-name="T105">2</text:span>0 MW.</text:p>
        </text:list-header>
      </text:list>
      <text:p text:style-name="P19"><text:s/>Find the net increase in fuel cost per hour if the load is equally<text:span text:style-name="T29"> </text:span>shared by the two<text:span text:style-name="T29"> </text:span>units.</text:p>
      <text:p text:style-name="P56"/>
      <text:list xml:id="list224925209479886" text:continue-list="list224923349728475" text:style-name="L6">
        <text:list-header>
          <text:p text:style-name="P158">3<text:span text:style-name="T94">1</text:span><text:span text:style-name="T105"> (A)</text:span></text:p>
          <text:p text:style-name="P181">A base load power station and a standby power station share a common load as follows:</text:p>
          <text:p text:style-name="P182">Base load station annual output = 150 × 10 6 kWh</text:p>
          <text:p text:style-name="P182">Base load station capacity = 25 MW</text:p>
          <text:p text:style-name="P182">Maximum demand on base load station = 30 MW</text:p>
          <text:p text:style-name="P182">Stand by station capacity = 18 MW</text:p>
          <text:p text:style-name="P182">Maximum demand on standby station = 15 MW</text:p>
          <text:p text:style-name="P182">Stand-by-station annual output = 14 × 10 6 kWh</text:p>
          <text:p text:style-name="P182">Maximum demand on standby station = 15 MW</text:p>
          <text:p text:style-name="P182">Determine the following for both power stations: (a) load factor and (b) capacity factor</text:p>
        </text:list-header>
      </text:list>
      <text:p text:style-name="P22"/>
      <text:p text:style-name="P56">(B)<text:span text:style-name="T99">The capital cost of a power generating equipment in a steam power</text:span><text:span text:style-name="T12"> </text:span><text:span text:style-name="T99">plant is Rs </text:span>9<text:span text:style-name="T99">0 </text:span><text:span text:style-name="T12">*</text:span><text:span text:style-name="T99">10</text:span><text:span text:style-name="T25"> 6</text:span><text:span text:style-name="T99"> . The useful life of the plant is </text:span>25<text:span text:style-name="T99"> years and its</text:span><text:span text:style-name="T12"> </text:span><text:span text:style-name="T99">salvage value is </text:span>10<text:span text:style-name="T99">%</text:span><text:span text:style-name="T12"> </text:span><text:span text:style-name="T99">of the capital cost. Determine by the sinking-fund method the amount of money to be</text:span><text:span text:style-name="T12"> </text:span><text:span text:style-name="T99">saved annually for replacement if the yearly rate of compound interest is </text:span><text:soft-page-break/>3<text:span text:style-name="T99">%.</text:span></text:p>
      <text:list xml:id="list224923859379530" text:continue-numbering="true" text:style-name="L6">
        <text:list-header>
          <text:p text:style-name="P182"/>
          <text:p text:style-name="P158">3<text:span text:style-name="T94">2</text:span><text:span text:style-name="T105">(A)</text:span></text:p>
          <text:p text:style-name="P181">The peak load on a power station is 40 MW. The loads having maximum demands of 18, 12,<text:span text:style-name="T35"> </text:span>8 and 9 MW are connected to the power station. The capacity of the power station is 50 MW,<text:span text:style-name="T35"> </text:span>annual load factor is 62 per cent find,<text:span text:style-name="T35"> </text:span></text:p>
          <text:p text:style-name="P183">(i) Average load on the power station</text:p>
          <text:p text:style-name="P182">(ii) Energy supplied per yea<text:span text:style-name="T35">r</text:span></text:p>
          <text:p text:style-name="P182">(iii) Demand factor</text:p>
          <text:p text:style-name="P182">(iv) Diversity factor</text:p>
        </text:list-header>
      </text:list>
      <text:p text:style-name="P22"/>
      <text:p text:style-name="P56">(B)<text:span text:style-name="T99">A power plant has the following annual factors:</text:span><text:span text:style-name="T30"> </text:span><text:span text:style-name="T99">Load factor = 70%; Capacity factor = 50%; Use factor = 60%; Maximum demand = 20</text:span><text:span text:style-name="T30"> </text:span><text:span text:style-name="T99">MW.</text:span><text:span text:style-name="T30"> </text:span><text:span text:style-name="T99">Estimate (a) annual energy production, (b) reserve capacity over and above the peak</text:span><text:span text:style-name="T30"> </text:span><text:span text:style-name="T99">load, and (c) the hours per year during which the plant is not in service.</text:span></text:p>
      <text:list xml:id="list224923939396959" text:continue-numbering="true" text:style-name="L6">
        <text:list-header>
          <text:p text:style-name="P182"/>
        </text:list-header>
      </text:list>
      <text:p text:style-name="P48">33<text:span text:style-name="T105"> (A)</text:span></text:p>
      <text:list xml:id="list224925307218039" text:continue-list="list224924119540895" text:style-name="L3">
        <text:list-header>
          <text:p text:style-name="P162"/>
          <text:p text:style-name="P124"><text:span text:style-name="T89">(</text:span><text:span text:style-name="T102">The annual peak load on a 30 </text:span><text:span text:style-name="T103">M</text:span><text:span text:style-name="T102">W power station is 25 </text:span><text:span text:style-name="T103">M</text:span><text:span text:style-name="T102">W. The power station supplies load having maximum demands of 10 </text:span><text:span text:style-name="T103">M</text:span><text:span text:style-name="T102">W, 8.5 </text:span><text:span text:style-name="T103">M</text:span><text:span text:style-name="T102">W, 5 </text:span><text:span text:style-name="T103">M</text:span><text:span text:style-name="T102">W and 4.5 </text:span><text:span text:style-name="T103">M</text:span><text:span text:style-name="T102">W. The annual load factor is 0.5. Find:</text:span></text:p>
          <text:p text:style-name="P153">(i) Average load</text:p>
          <text:p text:style-name="P153">(ii) Energy supplied per year</text:p>
          <text:p text:style-name="P153">(iii) Diversity factor</text:p>
          <text:p text:style-name="P154">(iv) Demand factor</text:p>
          <text:p text:style-name="P124"/>
          <text:p text:style-name="P124"><text:span text:style-name="T101">(B)</text:span>The input-output curve of a 150 MW station is expressed by the formula, </text:p>
          <text:p text:style-name="P224"><text:span text:style-name="T59">I = 10</text:span><text:span text:style-name="T17">6</text:span><text:span text:style-name="T59"> (250 + 5L + 0.03L</text:span><text:span text:style-name="T17">3</text:span><text:span text:style-name="T59">) + L</text:span><text:span text:style-name="T17">4</text:span></text:p>
          <text:p text:style-name="P125">where I is in kcal per hour and L is in mega-watts. Find the load at which minimum heat rate occurs and check with the plot.</text:p>
          <text:p text:style-name="P125"/>
          <text:p text:style-name="P97"/>
          <text:p text:style-name="P187"/>
        </text:list-header>
      </text:list>
      <text:list xml:id="list224923881715394" text:continue-list="list224923939396959" text:style-name="L6">
        <text:list-header>
          <text:p text:style-name="P158">34<text:span text:style-name="T101"> (A)</text:span></text:p>
          <text:p text:style-name="P181">The maximum demand of a power station is 26,000 kW and daily load curve is described as<text:span text:style-name="T36"> </text:span>follows:</text:p>
        </text:list-header>
      </text:list>
      <table:table table:name="Table12" table:style-name="Table12">
        <table:table-column table:style-name="Table12.A" table:number-columns-repeated="6"/>
        <table:table-column table:style-name="Table12.G"/>
        <table:table-row table:style-name="TableLine94879801159968">
          <table:table-cell table:style-name="Table12.A1" office:value-type="string">
            <text:p text:style-name="P62">Time (h)</text:p>
          </table:table-cell>
          <table:table-cell table:style-name="Table12.A1" office:value-type="string">
            <text:p text:style-name="P62">0-4</text:p>
          </table:table-cell>
          <table:table-cell table:style-name="Table12.A1" office:value-type="string">
            <text:p text:style-name="P62">4-8</text:p>
          </table:table-cell>
          <table:table-cell table:style-name="Table12.A1" office:value-type="string">
            <text:p text:style-name="P62">8-12</text:p>
          </table:table-cell>
          <table:table-cell table:style-name="Table12.A1" office:value-type="string">
            <text:p text:style-name="P62">12-16</text:p>
          </table:table-cell>
          <table:table-cell table:style-name="Table12.A1" office:value-type="string">
            <text:p text:style-name="P62">16-20</text:p>
          </table:table-cell>
          <table:table-cell table:style-name="Table12.G1" office:value-type="string">
            <text:p text:style-name="P62">22-24</text:p>
          </table:table-cell>
        </table:table-row>
        <text:soft-page-break/>
        <table:table-row table:style-name="TableLine94879873841696">
          <table:table-cell table:style-name="Table12.A2" office:value-type="string">
            <text:p text:style-name="P62">Load (MW)</text:p>
          </table:table-cell>
          <table:table-cell table:style-name="Table12.A2" office:value-type="string">
            <text:p text:style-name="P62">8</text:p>
          </table:table-cell>
          <table:table-cell table:style-name="Table12.A2" office:value-type="string">
            <text:p text:style-name="P62">15</text:p>
          </table:table-cell>
          <table:table-cell table:style-name="Table12.A2" office:value-type="string">
            <text:p text:style-name="P62">28</text:p>
          </table:table-cell>
          <table:table-cell table:style-name="Table12.A2" office:value-type="string">
            <text:p text:style-name="P62">15</text:p>
          </table:table-cell>
          <table:table-cell table:style-name="Table12.A2" office:value-type="string">
            <text:p text:style-name="P62">42</text:p>
          </table:table-cell>
          <table:table-cell table:style-name="Table12.G2" office:value-type="string">
            <text:p text:style-name="P62">8</text:p>
          </table:table-cell>
        </table:table-row>
      </table:table>
      <text:list xml:id="list224923386186126" text:continue-numbering="true" text:style-name="L6">
        <text:list-header>
          <text:p text:style-name="P182"><text:span text:style-name="T36">(i) </text:span>Determine the load factor</text:p>
          <text:p text:style-name="P182">(ii)<text:span text:style-name="T36"> </text:span>What is the load factor of stand by equipment rated at 8 MW that takes up all load in<text:span text:style-name="T36"> </text:span>excess of 15 MW. Calculate use factor also.</text:p>
        </text:list-header>
      </text:list>
      <text:p text:style-name="P22"/>
      <text:list xml:id="list224923634365166" text:continue-numbering="true" text:style-name="L6">
        <text:list-header>
          <text:p text:style-name="P101"/>
          <text:p text:style-name="P101"><text:span text:style-name="T87">(</text:span><text:span text:style-name="T105">B</text:span><text:span text:style-name="T87">)</text:span>The capital cost of a power generating equipment in a steam power<text:span text:style-name="T12"> </text:span>plant is Rs 80 <text:span text:style-name="T12">*</text:span>10<text:span text:style-name="T13"> 6</text:span> . The useful life of the plant is 30 years and its<text:span text:style-name="T12"> </text:span>salvage value is 5%<text:span text:style-name="T12"> </text:span>of the capital cost. Determine by the sinking-fund method the amount of money to be<text:span text:style-name="T12"> </text:span>saved annually for replacement if the yearly rate of compound interest is 6%.</text:p>
          <text:p text:style-name="P101"/>
          <text:p text:style-name="P158">35<text:span text:style-name="T105"> </text:span><text:span text:style-name="T110">(</text:span><text:span text:style-name="T105">A)</text:span></text:p>
          <text:p text:style-name="P181"/>
          <text:p text:style-name="P181"><text:span text:style-name="T36"><text:s/></text:span>Draw <text:s/>load curve and the load duration curve from the following data.<text:span text:style-name="T36"> </text:span>Find the load factor and utilization factor of the plant serving this load if its capacity is 90 MW.</text:p>
        </text:list-header>
      </text:list>
      <table:table table:name="Table13" table:style-name="Table13">
        <table:table-column table:style-name="Table13.A" table:number-columns-repeated="10"/>
        <table:table-column table:style-name="Table13.K"/>
        <table:table-row table:style-name="TableLine94879873112912">
          <table:table-cell table:style-name="Table13.A1" office:value-type="string">
            <text:p text:style-name="P62">Time</text:p>
          </table:table-cell>
          <table:table-cell table:style-name="Table13.A1" office:value-type="string">
            <text:p text:style-name="P62">12 PM</text:p>
          </table:table-cell>
          <table:table-cell table:style-name="Table13.A1" office:value-type="string">
            <text:p text:style-name="P62">2 AM</text:p>
          </table:table-cell>
          <table:table-cell table:style-name="Table13.A1" office:value-type="string">
            <text:p text:style-name="P62">6 AM</text:p>
          </table:table-cell>
          <table:table-cell table:style-name="Table13.A1" office:value-type="string">
            <text:p text:style-name="P62">8 AM</text:p>
          </table:table-cell>
          <table:table-cell table:style-name="Table13.A1" office:value-type="string">
            <text:p text:style-name="P62">12 AM</text:p>
          </table:table-cell>
          <table:table-cell table:style-name="Table13.A1" office:value-type="string">
            <text:p text:style-name="P62">12.30 PM</text:p>
          </table:table-cell>
          <table:table-cell table:style-name="Table13.A1" office:value-type="string">
            <text:p text:style-name="P62">1 PM</text:p>
          </table:table-cell>
          <table:table-cell table:style-name="Table13.A1" office:value-type="string">
            <text:p text:style-name="P62">5 PM</text:p>
          </table:table-cell>
          <table:table-cell table:style-name="Table13.A1" office:value-type="string">
            <text:p text:style-name="P62">6 PM</text:p>
          </table:table-cell>
          <table:table-cell table:style-name="Table13.K1" office:value-type="string">
            <text:p text:style-name="P62">12 PM</text:p>
          </table:table-cell>
        </table:table-row>
        <table:table-row table:style-name="TableLine94879868748928">
          <table:table-cell table:style-name="Table13.A2" office:value-type="string">
            <text:p text:style-name="P62">Load (MW)</text:p>
          </table:table-cell>
          <table:table-cell table:style-name="Table13.A2" office:value-type="string">
            <text:p text:style-name="P62">18</text:p>
          </table:table-cell>
          <table:table-cell table:style-name="Table13.A2" office:value-type="string">
            <text:p text:style-name="P62">8</text:p>
          </table:table-cell>
          <table:table-cell table:style-name="Table13.A2" office:value-type="string">
            <text:p text:style-name="P62">8</text:p>
          </table:table-cell>
          <table:table-cell table:style-name="Table13.A2" office:value-type="string">
            <text:p text:style-name="P62">48</text:p>
          </table:table-cell>
          <table:table-cell table:style-name="Table13.A2" office:value-type="string">
            <text:p text:style-name="P62">48</text:p>
          </table:table-cell>
          <table:table-cell table:style-name="Table13.A2" office:value-type="string">
            <text:p text:style-name="P62">38</text:p>
          </table:table-cell>
          <table:table-cell table:style-name="Table13.A2" office:value-type="string">
            <text:p text:style-name="P62">48</text:p>
          </table:table-cell>
          <table:table-cell table:style-name="Table13.A2" office:value-type="string">
            <text:p text:style-name="P62">48</text:p>
          </table:table-cell>
          <table:table-cell table:style-name="Table13.A2" office:value-type="string">
            <text:p text:style-name="P62">68</text:p>
          </table:table-cell>
          <table:table-cell table:style-name="Table13.K2" office:value-type="string">
            <text:p text:style-name="P62">18</text:p>
          </table:table-cell>
        </table:table-row>
      </table:table>
      <text:p text:style-name="P22"/>
      <text:p text:style-name="P22"/>
      <text:p text:style-name="P56">(B)</text:p>
      <text:list xml:id="list224923330790535" text:continue-list="list224923528847427" text:style-name="L8">
        <text:list-header>
          <text:p text:style-name="P96">The connected loads of a consumer consist of 10 electric bulbs of 60 W each and 2<text:span text:style-name="T31"> </text:span>electric heaters of 1000 W each. His maximum demand is 1500 W. On an average, he<text:span text:style-name="T31"> </text:span>uses 8 bulbs for 5 hours a day and one heater for 3 hours a day. Estimate his average<text:span text:style-name="T31"> </text:span>load, monthly energy consumption and load factor.</text:p>
        </text:list-header>
      </text:list>
      <text:list xml:id="list224924341877963" text:continue-list="list224923634365166" text:style-name="L6">
        <text:list-header>
          <text:p text:style-name="P158"/>
          <text:p text:style-name="P158">36<text:span text:style-name="T105"> (A)</text:span></text:p>
          <text:p text:style-name="P181"/>
          <text:p text:style-name="P181">A power station has a maximum demand of 80 × 10 3 kW and daily load curve is defined as<text:span text:style-name="T37"> </text:span>follows:</text:p>
          <text:p text:style-name="P184"/>
        </text:list-header>
      </text:list>
      <table:table table:name="Table14" table:style-name="Table14">
        <table:table-column table:style-name="Table14.A"/>
        <table:table-column table:style-name="Table14.B" table:number-columns-repeated="5"/>
        <table:table-column table:style-name="Table14.A"/>
        <table:table-column table:style-name="Table14.H"/>
        <table:table-row table:style-name="TableLine94879867861744">
          <table:table-cell table:style-name="Table14.A1" office:value-type="string">
            <text:p text:style-name="P63">Time (h)</text:p>
          </table:table-cell>
          <table:table-cell table:style-name="Table14.A1" office:value-type="string">
            <text:p text:style-name="P63">0-<text:span text:style-name="T37">6</text:span></text:p>
          </table:table-cell>
          <table:table-cell table:style-name="Table14.A1" office:value-type="string">
            <text:p text:style-name="P63"><text:span text:style-name="T37">6</text:span>-8</text:p>
          </table:table-cell>
          <table:table-cell table:style-name="Table14.A1" office:value-type="string">
            <text:p text:style-name="P63">8-12</text:p>
          </table:table-cell>
          <table:table-cell table:style-name="Table14.A1" office:value-type="string">
            <text:p text:style-name="P63">12-1<text:span text:style-name="T37">4</text:span></text:p>
          </table:table-cell>
          <table:table-cell table:style-name="Table14.A1" office:value-type="string">
            <text:p text:style-name="P63">1<text:span text:style-name="T37">4</text:span>-<text:span text:style-name="T37">18</text:span></text:p>
          </table:table-cell>
          <table:table-cell table:style-name="Table14.A1" office:value-type="string">
            <text:p text:style-name="P65">18-22</text:p>
          </table:table-cell>
          <table:table-cell table:style-name="Table14.H1" office:value-type="string">
            <text:p text:style-name="P63">22-24</text:p>
          </table:table-cell>
        </table:table-row>
        <table:table-row table:style-name="TableLine94879840247296">
          <table:table-cell table:style-name="Table14.A2" office:value-type="string">
            <text:p text:style-name="P63">Load <text:soft-page-break/>(MW)</text:p>
          </table:table-cell>
          <table:table-cell table:style-name="Table14.A2" office:value-type="string">
            <text:p text:style-name="P65">40</text:p>
          </table:table-cell>
          <table:table-cell table:style-name="Table14.A2" office:value-type="string">
            <text:p text:style-name="P65">50</text:p>
          </table:table-cell>
          <table:table-cell table:style-name="Table14.A2" office:value-type="string">
            <text:p text:style-name="P65">60</text:p>
          </table:table-cell>
          <table:table-cell table:style-name="Table14.A2" office:value-type="string">
            <text:p text:style-name="P63">5<text:span text:style-name="T37">0</text:span></text:p>
          </table:table-cell>
          <table:table-cell table:style-name="Table14.A2" office:value-type="string">
            <text:p text:style-name="P65">70</text:p>
          </table:table-cell>
          <table:table-cell table:style-name="Table14.A2" office:value-type="string">
            <text:p text:style-name="P65">80</text:p>
          </table:table-cell>
          <table:table-cell table:style-name="Table14.H2" office:value-type="string">
            <text:p text:style-name="P65">40</text:p>
          </table:table-cell>
        </table:table-row>
      </table:table>
      <text:list xml:id="list224924433548628" text:continue-numbering="true" text:style-name="L6">
        <text:list-header>
          <text:p text:style-name="P185"><text:span text:style-name="T37">(</text:span>a) Draw <text:s/>load curve and the load duration curve <text:span text:style-name="T94">.D</text:span>etermine the load factor of power station.</text:p>
          <text:p text:style-name="P184">(b)<text:span text:style-name="T37"> </text:span>What is the load factor of standby equipment raid at 25 MW that takes up all load in<text:span text:style-name="T37"> </text:span>excess of 60 MW? Also calculate its use factor.</text:p>
        </text:list-header>
      </text:list>
      <text:p text:style-name="P24"/>
      <text:p text:style-name="P24"/>
      <text:p text:style-name="P56">(B)<text:span text:style-name="T34">An yearly load duration curve of a gas turbine power plant is a straight line from 50,000 to 5,000 kW. The load is taken by a power plant that consists of two units of 30,000 kW each and one unit of 20,000 kW. Determine (a) load factor and (b) capacity factor of the plant.</text:span></text:p>
      <text:p text:style-name="P9"/>
      <text:list xml:id="list224923780603420" text:continue-numbering="true" text:style-name="L6">
        <text:list-header>
          <text:p text:style-name="P194"/>
          <text:p text:style-name="P158">37 (a)</text:p>
          <text:p text:style-name="P195">A power station has two 60 MW unit each running for 7,000 hr a year and an 30 MW unit<text:span text:style-name="T38"> </text:span>running for 1,500 hr a year. The energy produced per year is 700 × 10 6 kWh, calculate the<text:span text:style-name="T38"> </text:span>following:</text:p>
          <text:p text:style-name="P194">(a) Plant load factor</text:p>
          <text:p text:style-name="P194">(b) Plant use factor</text:p>
          <text:p text:style-name="P194"/>
          <text:p text:style-name="P194"><text:span text:style-name="T86">(b)</text:span>The original value of an equipment is <text:span text:style-name="T85">Rs</text:span>2,50,000 and its salvage value at the end of its useful<text:span text:style-name="T39"> </text:span>life of 20 years is <text:span text:style-name="T85">Rs</text:span>25,000. Find the value of the equipment at the end of 10 years of its use by<text:span text:style-name="T39"> </text:span>the following methods: (a) straight line depreciation and (b) sinking fund depreciation, when it<text:span text:style-name="T39"> </text:span>is compounded annually at 8%.</text:p>
          <text:p text:style-name="P194"/>
          <text:p text:style-name="P196"/>
          <text:p text:style-name="P158">38<text:span text:style-name="T105"> (A)</text:span></text:p>
          <text:p text:style-name="P195"/>
          <text:p text:style-name="P195">The loads on a power plant with respect to time for 24 hr are listed below:</text:p>
        </text:list-header>
      </text:list>
      <table:table table:name="Table15" table:style-name="Table15">
        <table:table-column table:style-name="Table15.A" table:number-columns-repeated="7"/>
        <table:table-column table:style-name="Table15.H"/>
        <table:table-row table:style-name="TableLine94879855416752">
          <table:table-cell table:style-name="Table15.A1" office:value-type="string">
            <text:p text:style-name="P66">Time (h)</text:p>
          </table:table-cell>
          <table:table-cell table:style-name="Table15.A1" office:value-type="string">
            <text:p text:style-name="P66">0-6</text:p>
          </table:table-cell>
          <table:table-cell table:style-name="Table15.A1" office:value-type="string">
            <text:p text:style-name="P66">6-8</text:p>
          </table:table-cell>
          <table:table-cell table:style-name="Table15.A1" office:value-type="string">
            <text:p text:style-name="P66">8-12</text:p>
          </table:table-cell>
          <table:table-cell table:style-name="Table15.A1" office:value-type="string">
            <text:p text:style-name="P66">12-14</text:p>
          </table:table-cell>
          <table:table-cell table:style-name="Table15.A1" office:value-type="string">
            <text:p text:style-name="P66">14-18</text:p>
          </table:table-cell>
          <table:table-cell table:style-name="Table15.A1" office:value-type="string">
            <text:p text:style-name="P66">18-22</text:p>
          </table:table-cell>
          <table:table-cell table:style-name="Table15.H1" office:value-type="string">
            <text:p text:style-name="P66">22-24</text:p>
          </table:table-cell>
        </table:table-row>
        <table:table-row table:style-name="TableLine94879815048944">
          <table:table-cell table:style-name="Table15.A2" office:value-type="string">
            <text:p text:style-name="P66">Load (MW)</text:p>
          </table:table-cell>
          <table:table-cell table:style-name="Table15.A2" office:value-type="string">
            <text:p text:style-name="P66">40</text:p>
          </table:table-cell>
          <table:table-cell table:style-name="Table15.A2" office:value-type="string">
            <text:p text:style-name="P66">40</text:p>
          </table:table-cell>
          <table:table-cell table:style-name="Table15.A2" office:value-type="string">
            <text:p text:style-name="P66">60</text:p>
          </table:table-cell>
          <table:table-cell table:style-name="Table15.A2" office:value-type="string">
            <text:p text:style-name="P66">50</text:p>
          </table:table-cell>
          <table:table-cell table:style-name="Table15.A2" office:value-type="string">
            <text:p text:style-name="P66">70</text:p>
          </table:table-cell>
          <table:table-cell table:style-name="Table15.A2" office:value-type="string">
            <text:p text:style-name="P66">80</text:p>
          </table:table-cell>
          <table:table-cell table:style-name="Table15.H2" office:value-type="string">
            <text:p text:style-name="P66">40</text:p>
          </table:table-cell>
        </table:table-row>
      </table:table>
      <text:list xml:id="list224923557206087" text:continue-numbering="true" text:style-name="L6">
        <text:list-header>
          <text:p text:style-name="P196">Draw the load curve<text:span text:style-name="T94">,LOAD DURATION CURVE </text:span><text:s/>and find cut the load factor of the power station. If the loads above 60 MW are<text:span text:style-name="T40"> </text:span>taken by stand by unit of 20 MW capacity, find out the load factor of the stand by unit.</text:p>
        </text:list-header>
      </text:list>
      <text:p text:style-name="P10"/>
      <text:p text:style-name="P56">(B)<text:span text:style-name="T37">A power station has two 60 MW unit each running for 7,000 hr a year and an 30 MW unit</text:span><text:span text:style-name="T38"> </text:span><text:span text:style-name="T37">running for 1,500 hr a year. The energy produced per year is 700 × </text:span><text:soft-page-break/><text:span text:style-name="T37">10 6 kWh, calculate the</text:span><text:span text:style-name="T38"> </text:span><text:span text:style-name="T37">following:</text:span></text:p>
      <text:list xml:id="list1989284659" text:style-name="L9">
        <text:list-header>
          <text:p text:style-name="P199">(a) Plant load factor</text:p>
        </text:list-header>
      </text:list>
      <text:p text:style-name="P12">(b) Plant use factor</text:p>
      <text:list xml:id="list224925046473034" text:continue-list="list224923557206087" text:style-name="L6">
        <text:list-header>
          <text:p text:style-name="P196"/>
          <text:p text:style-name="P158">39<text:span text:style-name="T95"> (</text:span><text:span text:style-name="T105">A</text:span><text:span text:style-name="T95">)</text:span></text:p>
          <text:p text:style-name="P195">The daily load of a power station is given below:</text:p>
        </text:list-header>
      </text:list>
      <table:table table:name="Table16" table:style-name="Table16">
        <table:table-column table:style-name="Table16.A" table:number-columns-repeated="10"/>
        <table:table-column table:style-name="Table16.K"/>
        <table:table-row table:style-name="TableLine94879870644016">
          <table:table-cell table:style-name="Table16.A1" office:value-type="string">
            <text:p text:style-name="P67">Time</text:p>
          </table:table-cell>
          <table:table-cell table:style-name="Table16.A1" office:value-type="string">
            <text:p text:style-name="P67">12 night</text:p>
          </table:table-cell>
          <table:table-cell table:style-name="Table16.A1" office:value-type="string">
            <text:p text:style-name="P67">12 AM</text:p>
          </table:table-cell>
          <table:table-cell table:style-name="Table16.A1" office:value-type="string">
            <text:p text:style-name="P67">6 AM</text:p>
          </table:table-cell>
          <table:table-cell table:style-name="Table16.A1" office:value-type="string">
            <text:p text:style-name="P67">8 AM</text:p>
          </table:table-cell>
          <table:table-cell table:style-name="Table16.A1" office:value-type="string">
            <text:p text:style-name="P67">12 noon</text:p>
          </table:table-cell>
          <table:table-cell table:style-name="Table16.A1" office:value-type="string">
            <text:p text:style-name="P67">12:30 PM</text:p>
          </table:table-cell>
          <table:table-cell table:style-name="Table16.A1" office:value-type="string">
            <text:p text:style-name="P67">1 PM</text:p>
          </table:table-cell>
          <table:table-cell table:style-name="Table16.A1" office:value-type="string">
            <text:p text:style-name="P67">5 PM</text:p>
          </table:table-cell>
          <table:table-cell table:style-name="Table16.A1" office:value-type="string">
            <text:p text:style-name="P67">6 PM</text:p>
          </table:table-cell>
          <table:table-cell table:style-name="Table16.K1" office:value-type="string">
            <text:p text:style-name="P67">12 night</text:p>
          </table:table-cell>
        </table:table-row>
        <table:table-row table:style-name="TableLine94879815194352">
          <table:table-cell table:style-name="Table16.A2" office:value-type="string">
            <text:p text:style-name="P67">Load (MW)</text:p>
          </table:table-cell>
          <table:table-cell table:style-name="Table16.A2" office:value-type="string">
            <text:p text:style-name="P67">20</text:p>
          </table:table-cell>
          <table:table-cell table:style-name="Table16.A2" office:value-type="string">
            <text:p text:style-name="P67">10</text:p>
          </table:table-cell>
          <table:table-cell table:style-name="Table16.A2" office:value-type="string">
            <text:p text:style-name="P67">10</text:p>
          </table:table-cell>
          <table:table-cell table:style-name="Table16.A2" office:value-type="string">
            <text:p text:style-name="P67">40</text:p>
          </table:table-cell>
          <table:table-cell table:style-name="Table16.A2" office:value-type="string">
            <text:p text:style-name="P67">40</text:p>
          </table:table-cell>
          <table:table-cell table:style-name="Table16.A2" office:value-type="string">
            <text:p text:style-name="P67">30</text:p>
          </table:table-cell>
          <table:table-cell table:style-name="Table16.A2" office:value-type="string">
            <text:p text:style-name="P67">40</text:p>
          </table:table-cell>
          <table:table-cell table:style-name="Table16.A2" office:value-type="string">
            <text:p text:style-name="P67">40</text:p>
          </table:table-cell>
          <table:table-cell table:style-name="Table16.A2" office:value-type="string">
            <text:p text:style-name="P67">60</text:p>
          </table:table-cell>
          <table:table-cell table:style-name="Table16.K2" office:value-type="string">
            <text:p text:style-name="P67">20</text:p>
          </table:table-cell>
        </table:table-row>
      </table:table>
      <text:list xml:id="list224924177437194" text:continue-numbering="true" text:style-name="L6">
        <text:list-header>
          <text:p text:style-name="P196">(a) Plot load and load duration curve for the system</text:p>
          <text:p text:style-name="P196">(b) Find out the load factor</text:p>
        </text:list-header>
      </text:list>
      <text:p text:style-name="P10"/>
      <text:p text:style-name="P50">(<text:span text:style-name="T105">B</text:span>)<text:span text:style-name="T107">The incremental fuel costs of two generating</text:span><text:span text:style-name="T93"> </text:span><text:span text:style-name="T107">units A and B of a power station are given by the following expressions:</text:span></text:p>
      <text:list xml:id="list224925080629975" text:continue-list="list224924028046155" text:style-name="L5">
        <text:list-header>
          <text:p text:style-name="P243"><text:span text:style-name="T51">dF</text:span><text:span text:style-name="T8">A</text:span><text:span text:style-name="T78">/d</text:span><text:span text:style-name="T51">P</text:span><text:span text:style-name="T8">A</text:span><text:span text:style-name="T51">=0.0</text:span><text:span text:style-name="T69">25</text:span><text:span text:style-name="T51"> P</text:span><text:span text:style-name="T8">A</text:span><text:span text:style-name="T51">+2.5</text:span></text:p>
          <text:p text:style-name="P243"><text:span text:style-name="T79">dF</text:span><text:span text:style-name="T7">B</text:span><text:span text:style-name="T79">/dP</text:span><text:span text:style-name="T7">B</text:span><text:span text:style-name="T48"> =</text:span><text:span text:style-name="T50"> </text:span><text:span text:style-name="T48">0.</text:span><text:span text:style-name="T50">0</text:span><text:span text:style-name="T69">2</text:span><text:span text:style-name="T48">P</text:span><text:span text:style-name="T7">B</text:span><text:span text:style-name="T48">+1</text:span><text:span text:style-name="T42">.</text:span><text:span text:style-name="T69">75</text:span></text:p>
        </text:list-header>
      </text:list>
      <text:p text:style-name="P45"><text:span text:style-name="T107">where F is in rupees per hour and P it is MW. Determine incremental</text:span> <text:span text:style-name="T107">fuel cost and loading schedule for minimum cost if the total load to</text:span> <text:span text:style-name="T107">be</text:span> s<text:span text:style-name="T107">upplied is to be 50 MW 175 MW and 200MW. Both units operate</text:span> <text:span text:style-name="T107">at all times and maximum and minimum load on each unit is to be</text:span> <text:span text:style-name="T107">100 MW and 15 MW respectively.</text:span></text:p>
      <text:p text:style-name="P49"/>
      <text:p text:style-name="P49"/>
      <text:list xml:id="list224924972583926" text:continue-list="list224924177437194" text:style-name="L6">
        <text:list-header>
          <text:p text:style-name="P160">40<text:span text:style-name="T108">(A)</text:span></text:p>
          <text:p text:style-name="P160"/>
          <text:p text:style-name="P160"><text:span text:style-name="T93">The input output curve of a 10MW power station</text:span><text:span text:style-name="T82"> </text:span><text:span text:style-name="T93">is expressed as follows:</text:span></text:p>
          <text:p text:style-name="P168">i=10<text:span text:style-name="T13">6</text:span>(8+L+0.4L<text:span text:style-name="T13">2</text:span>)</text:p>
          <text:p text:style-name="P168">where <text:span text:style-name="T82">i</text:span> is in kcal per hour and L is in MW.</text:p>
          <text:p text:style-name="P161"><text:span text:style-name="T93">Determine the average heat rate of the power station for a day if</text:span><text:span text:style-name="T82"> </text:span><text:span text:style-name="T93">it operates at its full capacity for 12 hours and is kept running at zero</text:span><text:span text:style-name="T82"> </text:span><text:span text:style-name="T93">load for remaining 12 hours. Also calculate the saving per kWh of</text:span><text:span text:style-name="T82"> </text:span><text:span text:style-name="T93">energy produced if the energy is generated at a constant 24 hours</text:span><text:span text:style-name="T82"> </text:span><text:span text:style-name="T93">load (10</text:span><text:span text:style-name="T82">0% </text:span><text:span text:style-name="T93">load factor).</text:span></text:p>
        </text:list-header>
      </text:list>
      <text:p text:style-name="P57">(B)</text:p>
      <text:list xml:id="list224925123634925" text:continue-numbering="true" text:style-name="L6">
        <text:list-header>
          <text:p text:style-name="P195">The following data are collected from a daily load curve of a power plant.</text:p>
        </text:list-header>
      </text:list>
      <table:table table:name="Table17" table:style-name="Table17">
        <table:table-column table:style-name="Table17.A" table:number-columns-repeated="7"/>
        <table:table-column table:style-name="Table17.H"/>
        <table:table-row table:style-name="TableLine94879853637600">
          <table:table-cell table:style-name="Table17.A1" office:value-type="string">
            <text:p text:style-name="P69">Load (kW)</text:p>
          </table:table-cell>
          <table:table-cell table:style-name="Table17.A1" office:value-type="string">
            <text:p text:style-name="P69">15000</text:p>
          </table:table-cell>
          <table:table-cell table:style-name="Table17.A1" office:value-type="string">
            <text:p text:style-name="P69">12000</text:p>
          </table:table-cell>
          <table:table-cell table:style-name="Table17.A1" office:value-type="string">
            <text:p text:style-name="P69">10000</text:p>
          </table:table-cell>
          <table:table-cell table:style-name="Table17.A1" office:value-type="string">
            <text:p text:style-name="P69">8000</text:p>
          </table:table-cell>
          <table:table-cell table:style-name="Table17.A1" office:value-type="string">
            <text:p text:style-name="P69">6000</text:p>
          </table:table-cell>
          <table:table-cell table:style-name="Table17.A1" office:value-type="string">
            <text:p text:style-name="P69">4000</text:p>
          </table:table-cell>
          <table:table-cell table:style-name="Table17.H1" office:value-type="string">
            <text:p text:style-name="P69">2000</text:p>
          </table:table-cell>
        </table:table-row>
        <table:table-row table:style-name="TableLine94879869444816">
          <table:table-cell table:style-name="Table17.A2" office:value-type="string">
            <text:p text:style-name="P69">No of hours at <text:soft-page-break/>load</text:p>
          </table:table-cell>
          <table:table-cell table:style-name="Table17.A2" office:value-type="string">
            <text:p text:style-name="P69">875</text:p>
          </table:table-cell>
          <table:table-cell table:style-name="Table17.A2" office:value-type="string">
            <text:p text:style-name="P69">876</text:p>
          </table:table-cell>
          <table:table-cell table:style-name="Table17.A2" office:value-type="string">
            <text:p text:style-name="P69">1750</text:p>
          </table:table-cell>
          <table:table-cell table:style-name="Table17.A2" office:value-type="string">
            <text:p text:style-name="P69">2630</text:p>
          </table:table-cell>
          <table:table-cell table:style-name="Table17.A2" office:value-type="string">
            <text:p text:style-name="P69">4380</text:p>
          </table:table-cell>
          <table:table-cell table:style-name="Table17.A2" office:value-type="string">
            <text:p text:style-name="P69">7000</text:p>
          </table:table-cell>
          <table:table-cell table:style-name="Table17.H2" office:value-type="string">
            <text:p text:style-name="P69">8740</text:p>
          </table:table-cell>
        </table:table-row>
      </table:table>
      <text:list xml:id="list224923560162598" text:continue-numbering="true" text:style-name="L6">
        <text:list-header>
          <text:p text:style-name="P196">(a) <text:span text:style-name="T108">F</text:span>ind out the load factor of the system.</text:p>
          <text:p text:style-name="P196">(b) If the load is supplied by two plants one is acting as base load plant of 10,000 kW capacity and<text:span text:style-name="T41"> </text:span>other as peak load plant of 7,500 kW capacity, find out the annual load factor, annual capacity<text:span text:style-name="T41"> </text:span>factor and annual use factor for both plants.</text:p>
        </text:list-header>
      </text:list>
      <text:p text:style-name="P57"/>
      <text:list xml:id="list224924203278776" text:continue-numbering="true" text:style-name="L6">
        <text:list-header>
          <text:p text:style-name="P197"/>
        </text:list-header>
      </text:list>
      <text:list xml:id="list224923904424127" text:continue-list="list224925307218039" text:style-name="L3">
        <text:list-header>
          <text:p text:style-name="P163">41<text:span text:style-name="T108">(A)</text:span></text:p>
          <text:p text:style-name="P200">A power station has a maximum demand of 80 x 10 k W and daily load curve is defined as follows:</text:p>
        </text:list-header>
      </text:list>
      <table:table table:name="Table18" table:style-name="Table18">
        <table:table-column table:style-name="Table18.A" table:number-columns-repeated="7"/>
        <table:table-column table:style-name="Table18.H"/>
        <table:table-row table:style-name="TableLine94879841238704">
          <table:table-cell table:style-name="Table18.A1" office:value-type="string">
            <text:p text:style-name="P70">Time (h)</text:p>
          </table:table-cell>
          <table:table-cell table:style-name="Table18.A1" office:value-type="string">
            <text:p text:style-name="P70">0-6</text:p>
          </table:table-cell>
          <table:table-cell table:style-name="Table18.A1" office:value-type="string">
            <text:p text:style-name="P70">6-8</text:p>
          </table:table-cell>
          <table:table-cell table:style-name="Table18.A1" office:value-type="string">
            <text:p text:style-name="P70">8-12</text:p>
          </table:table-cell>
          <table:table-cell table:style-name="Table18.A1" office:value-type="string">
            <text:p text:style-name="P70">12-14</text:p>
          </table:table-cell>
          <table:table-cell table:style-name="Table18.A1" office:value-type="string">
            <text:p text:style-name="P70">14-18</text:p>
          </table:table-cell>
          <table:table-cell table:style-name="Table18.A1" office:value-type="string">
            <text:p text:style-name="P70">18-26</text:p>
          </table:table-cell>
          <table:table-cell table:style-name="Table18.H1" office:value-type="string">
            <text:p text:style-name="P70">22-24</text:p>
          </table:table-cell>
        </table:table-row>
        <table:table-row table:style-name="TableLine94879845029040">
          <table:table-cell table:style-name="Table18.A2" office:value-type="string">
            <text:p text:style-name="P70">Load (MW)</text:p>
          </table:table-cell>
          <table:table-cell table:style-name="Table18.A2" office:value-type="string">
            <text:p text:style-name="P70">40</text:p>
          </table:table-cell>
          <table:table-cell table:style-name="Table18.A2" office:value-type="string">
            <text:p text:style-name="P70">50</text:p>
          </table:table-cell>
          <table:table-cell table:style-name="Table18.A2" office:value-type="string">
            <text:p text:style-name="P70">60</text:p>
          </table:table-cell>
          <table:table-cell table:style-name="Table18.A2" office:value-type="string">
            <text:p text:style-name="P70">50</text:p>
          </table:table-cell>
          <table:table-cell table:style-name="Table18.A2" office:value-type="string">
            <text:p text:style-name="P70">70</text:p>
          </table:table-cell>
          <table:table-cell table:style-name="Table18.A2" office:value-type="string">
            <text:p text:style-name="P70">80</text:p>
          </table:table-cell>
          <table:table-cell table:style-name="Table18.H2" office:value-type="string">
            <text:p text:style-name="P70">40</text:p>
          </table:table-cell>
        </table:table-row>
      </table:table>
      <text:list xml:id="list224923507649253" text:continue-numbering="true" text:style-name="L3">
        <text:list-header>
          <text:p text:style-name="P201">(a) <text:span text:style-name="T37"><text:s/>Draw the load </text:span><text:span text:style-name="T94"><text:s/>CURVE AND load </text:span><text:span text:style-name="T37">duration curve and find out the load factor of the</text:span> power station.</text:p>
          <text:p text:style-name="P202">(b) What is the load factor of standby equipment rated at 25 MW that takes up all load in excess of 60 MW ? Also calculate its use factor.</text:p>
          <text:p text:style-name="P202"/>
        </text:list-header>
      </text:list>
      <text:p text:style-name="P57">(B)<text:span text:style-name="T92">A chimney is 28 metres high and the temperature</text:span><text:span text:style-name="T109"> </text:span><text:span text:style-name="T92">of hot gases inside the chimney is 320</text:span><text:span text:style-name="T26">o</text:span><text:span text:style-name="T92">C. The ternperaiuie of outside</text:span><text:span text:style-name="T109"> </text:span><text:span text:style-name="T92">air is 27</text:span><text:span text:style-name="T26">o</text:span><text:span text:style-name="T92">C and furnace as supplied with 15 kg of air per kg of coal</text:span><text:span text:style-name="T109"> </text:span><text:span text:style-name="T92">burnt. Calculate</text:span></text:p>
      <text:list xml:id="list224925452770058" text:continue-list="list224925080629975" text:style-name="L5">
        <text:list-header>
          <text:p text:style-name="P127">(a) Draught in mm of water.</text:p>
        </text:list-header>
      </text:list>
      <text:p text:style-name="P29">(b) Draught height in metres of hot gases.</text:p>
      <text:list xml:id="list224923879647014" text:continue-list="list224923507649253" text:style-name="L3">
        <text:list-header>
          <text:p text:style-name="P202"/>
          <text:p text:style-name="P163">42<text:span text:style-name="T110"> (A)</text:span></text:p>
          <text:p text:style-name="P225"><text:span text:style-name="T43">Find the diversity factor of power station </text:span><text:span text:style-name="T44">which <text:s/>s</text:span><text:span text:style-name="T43">upplies the follo</text:span><text:span text:style-name="T44">w</text:span><text:span text:style-name="T43">ing loads</text:span><text:span text:style-name="T44">:</text:span></text:p>
          <text:p text:style-name="P226"><text:span text:style-name="T43">Load A</text:span><text:span text:style-name="T44">:</text:span><text:span text:style-name="T43"> Motor load of 100 k</text:span><text:span text:style-name="T44">W</text:span><text:span text:style-name="T43"> working between </text:span><text:span text:style-name="T44">10</text:span><text:span text:style-name="T43">AM. </text:span><text:span text:style-name="T44">and 6</text:span><text:span text:style-name="T43">P.M.</text:span></text:p>
          <text:p text:style-name="P226"><text:span text:style-name="T43">Load B</text:span><text:span text:style-name="T44">:</text:span><text:span text:style-name="T43"> Lighting load of </text:span><text:span text:style-name="T44">60</text:span><text:span text:style-name="T43"> kW between 6 P.M. and 10A.M.</text:span></text:p>
          <text:p text:style-name="P226"><text:span text:style-name="T43">Load C</text:span><text:span text:style-name="T44">:</text:span><text:span text:style-name="T43"> Pumping load of 40 kW between 4 P.M. and </text:span><text:span text:style-name="T44">10</text:span><text:span text:style-name="T43">AM.</text:span></text:p>
        </text:list-header>
      </text:list>
      <text:p text:style-name="P203"/>
      <text:p text:style-name="P60"><text:span text:style-name="T43">(</text:span><text:span text:style-name="T42">B)</text:span></text:p>
      <text:p text:style-name="P60"><text:span text:style-name="T67">In a steam power plant the capital cost of power generation equipment is Rs. </text:span><text:span text:style-name="T71">3</text:span><text:span text:style-name="T42">0</text:span><text:span text:style-name="T67"> ×</text:span><text:span text:style-name="T72"> </text:span><text:span text:style-name="T67">10 . The useful life of the plant is </text:span><text:span text:style-name="T71">2</text:span><text:span text:style-name="T42">4</text:span><text:span text:style-name="T67"> years and salvage value of the plant to Rs. </text:span><text:span text:style-name="T42">1.5</text:span><text:span text:style-name="T67"> × 10 </text:span><text:span text:style-name="T19">5</text:span><text:span text:style-name="T67"> . Determine by</text:span><text:span text:style-name="T72"> </text:span><text:span text:style-name="T67">sinking fund method the amount to be saved annually for replacement if the rate of annual compound</text:span><text:span text:style-name="T72"> </text:span><text:span text:style-name="T67">interest is </text:span><text:span text:style-name="T42">7</text:span><text:span text:style-name="T67">%.</text:span></text:p>
      <text:p text:style-name="P33"/>
      <text:list xml:id="list224923576534534" text:continue-numbering="true" text:style-name="L3">
        <text:list-header>
          <text:p text:style-name="P202"/>
          <text:p text:style-name="P202"><text:soft-page-break/></text:p>
          <text:p text:style-name="P163">44<text:span text:style-name="T110"> (A)</text:span></text:p>
          <text:p text:style-name="P225"><text:span text:style-name="T43">The annual peak load on a 30 MW power station</text:span><text:span text:style-name="T44"> </text:span><text:span text:style-name="T43">is 25 MW. The power station supplies loads having maximum</text:span><text:span text:style-name="T44"> </text:span><text:span text:style-name="T43">demands of 10MW, 8.5 MW, 5 MW and 4.5 MW. The annual load</text:span><text:span text:style-name="T44"> </text:span><text:span text:style-name="T43">factor is 45%.</text:span></text:p>
          <text:p text:style-name="P202">Find:</text:p>
          <text:p text:style-name="P202">(a) Average load,</text:p>
          <text:p text:style-name="P226"><text:span text:style-name="T43">(b) Energy supplied </text:span><text:span text:style-name="T44">per </text:span><text:span text:style-name="T43">year,</text:span></text:p>
          <text:p text:style-name="P226"><text:span text:style-name="T43">(c) Diversity f</text:span><text:span text:style-name="T44">ac</text:span><text:span text:style-name="T43">tor,</text:span></text:p>
          <text:p text:style-name="P226"><text:span text:style-name="T43">(d) Demand </text:span><text:span text:style-name="T44">fa</text:span><text:span text:style-name="T43">ctor.</text:span></text:p>
        </text:list-header>
      </text:list>
      <text:p text:style-name="P203"/>
      <text:p text:style-name="P60"><text:span text:style-name="T43">(</text:span><text:span text:style-name="T42">B)</text:span><text:span text:style-name="T59">Determine the height of chimney to gel net</text:span><text:span text:style-name="T74"> </text:span><text:span text:style-name="T59">draught of 12 mm if the total draft losses are 4mm. The temperature</text:span><text:span text:style-name="T74"> </text:span><text:span text:style-name="T59">of air is 25</text:span><text:span text:style-name="T20">o</text:span><text:span text:style-name="T59">C and the temperature of chimney gases is 300</text:span><text:span text:style-name="T20">o</text:span><text:span text:style-name="T59">C. The</text:span><text:span text:style-name="T74"> </text:span><text:span text:style-name="T59">m</text:span><text:span text:style-name="T74">a</text:span><text:span text:style-name="T59">ss of air used per kg of fuel used is 18 kg. One kg of</text:span><text:span text:style-name="T74"> </text:span><text:span text:style-name="T59">air occupies</text:span><text:span text:style-name="T74"> </text:span><text:span text:style-name="T59">a vol</text:span><text:span text:style-name="T74">u</text:span><text:span text:style-name="T59">me of 0. 7734</text:span><text:span text:style-name="T74"> m</text:span><text:span text:style-name="T17">3</text:span><text:span text:style-name="T59"> at N.T.P.</text:span></text:p>
      <text:p text:style-name="P43"/>
      <text:list xml:id="list224925331079023" text:continue-numbering="true" text:style-name="L3">
        <text:list-header>
          <text:p text:style-name="P247"><text:span text:style-name="T43">4</text:span><text:span text:style-name="T42">5</text:span><text:span text:style-name="T73">(A)</text:span></text:p>
          <text:p text:style-name="P226"><text:span text:style-name="T43">For a power station the yearly load duration curve</text:span><text:span text:style-name="T44"> </text:span><text:span text:style-name="T43">is a straight line from 30,000 to 4,000 kW. To meet the load three</text:span><text:span text:style-name="T44"> </text:span><text:span text:style-name="T43">turbo-generator</text:span><text:span text:style-name="T44">s</text:span><text:span text:style-name="T43"> are installed. The capacity of two generators is</text:span><text:span text:style-name="T44"> 1</text:span><text:span text:style-name="T43">5,000 kW each and the third is rated at 5,000 kW. Determine the</text:span><text:span text:style-name="T44"> </text:span><text:span text:style-name="T43">following:</text:span></text:p>
          <text:p text:style-name="P202">(a) Load factor,</text:p>
          <text:p text:style-name="P202">(b) Capacity factor or plant factor,</text:p>
          <text:p text:style-name="P202">(c) Maximum demand.</text:p>
          <text:p text:style-name="P202"/>
        </text:list-header>
      </text:list>
      <text:p text:style-name="P58">(B)<text:span text:style-name="T37">The daily load of a power station is given below:</text:span></text:p>
      <table:table table:name="Table7" table:style-name="Table7">
        <table:table-column table:style-name="Table7.A" table:number-columns-repeated="10"/>
        <table:table-column table:style-name="Table7.K"/>
        <table:table-row table:style-name="TableLine94879789176832">
          <table:table-cell table:style-name="Table7.A1" office:value-type="string">
            <text:p text:style-name="P68">Time</text:p>
          </table:table-cell>
          <table:table-cell table:style-name="Table7.A1" office:value-type="string">
            <text:p text:style-name="P68">12 night</text:p>
          </table:table-cell>
          <table:table-cell table:style-name="Table7.A1" office:value-type="string">
            <text:p text:style-name="P68">12 AM</text:p>
          </table:table-cell>
          <table:table-cell table:style-name="Table7.A1" office:value-type="string">
            <text:p text:style-name="P68">6 AM</text:p>
          </table:table-cell>
          <table:table-cell table:style-name="Table7.A1" office:value-type="string">
            <text:p text:style-name="P68">8 AM</text:p>
          </table:table-cell>
          <table:table-cell table:style-name="Table7.A1" office:value-type="string">
            <text:p text:style-name="P68">12 noon</text:p>
          </table:table-cell>
          <table:table-cell table:style-name="Table7.A1" office:value-type="string">
            <text:p text:style-name="P68">12:30 PM</text:p>
          </table:table-cell>
          <table:table-cell table:style-name="Table7.A1" office:value-type="string">
            <text:p text:style-name="P68">1 PM</text:p>
          </table:table-cell>
          <table:table-cell table:style-name="Table7.A1" office:value-type="string">
            <text:p text:style-name="P68">5 PM</text:p>
          </table:table-cell>
          <table:table-cell table:style-name="Table7.A1" office:value-type="string">
            <text:p text:style-name="P68">6 PM</text:p>
          </table:table-cell>
          <table:table-cell table:style-name="Table7.K1" office:value-type="string">
            <text:p text:style-name="P68">12 night</text:p>
          </table:table-cell>
        </table:table-row>
        <table:table-row table:style-name="TableLine94879867864576">
          <table:table-cell table:style-name="Table7.A2" office:value-type="string">
            <text:p text:style-name="P68">Load (MW)</text:p>
          </table:table-cell>
          <table:table-cell table:style-name="Table7.A2" office:value-type="string">
            <text:p text:style-name="P68">20</text:p>
          </table:table-cell>
          <table:table-cell table:style-name="Table7.A2" office:value-type="string">
            <text:p text:style-name="P68">10</text:p>
          </table:table-cell>
          <table:table-cell table:style-name="Table7.A2" office:value-type="string">
            <text:p text:style-name="P68">10</text:p>
          </table:table-cell>
          <table:table-cell table:style-name="Table7.A2" office:value-type="string">
            <text:p text:style-name="P68">40</text:p>
          </table:table-cell>
          <table:table-cell table:style-name="Table7.A2" office:value-type="string">
            <text:p text:style-name="P68">40</text:p>
          </table:table-cell>
          <table:table-cell table:style-name="Table7.A2" office:value-type="string">
            <text:p text:style-name="P68">30</text:p>
          </table:table-cell>
          <table:table-cell table:style-name="Table7.A2" office:value-type="string">
            <text:p text:style-name="P68">40</text:p>
          </table:table-cell>
          <table:table-cell table:style-name="Table7.A2" office:value-type="string">
            <text:p text:style-name="P68">40</text:p>
          </table:table-cell>
          <table:table-cell table:style-name="Table7.A2" office:value-type="string">
            <text:p text:style-name="P68">60</text:p>
          </table:table-cell>
          <table:table-cell table:style-name="Table7.K2" office:value-type="string">
            <text:p text:style-name="P68">20</text:p>
          </table:table-cell>
        </table:table-row>
      </table:table>
      <text:list xml:id="list224925110586575" text:continue-list="list224924203278776" text:style-name="L6">
        <text:list-header>
          <text:p text:style-name="P198">(a) Plot load and load duration curve for the system</text:p>
        </text:list-header>
      </text:list>
      <text:p text:style-name="P11">(b) Find out the load factor</text:p>
      <text:list xml:id="list224924443700250" text:continue-list="list224925331079023" text:style-name="L3">
        <text:list-header>
          <text:p text:style-name="P163"/>
          <text:p text:style-name="P163">46<text:span text:style-name="T110">(A)</text:span></text:p>
          <text:p text:style-name="P125">The maximum (peak) load on a thermal power plant of 60 MW capacity is 50 MW at an annual load factor of 50%. The loads having maximum demands of25 MW, 20 MW, 8 MW and 5 M are connected to the power station. Determine : (a) Average load on power station (b) Energy generated per year (c) Demand factor (d) Diversity factor.</text:p>
          <text:p text:style-name="P125"><text:soft-page-break/></text:p>
          <text:p text:style-name="P97"/>
          <text:p text:style-name="P97"><text:span text:style-name="T87">(</text:span><text:span text:style-name="T111">B</text:span><text:span text:style-name="T87">)</text:span>The capital cost of a power generating equipment in a steam power<text:span text:style-name="T12"> </text:span>plant is Rs 80 <text:span text:style-name="T12">*</text:span>10<text:span text:style-name="T13"> 6</text:span> . The useful life of the plant is 30 years and its<text:span text:style-name="T12"> </text:span>salvage value is 5%<text:span text:style-name="T12"> </text:span>of the capital cost. Determine by the sinking-fund method the amount of money to be<text:span text:style-name="T12"> </text:span>saved annually for replacement if the yearly rate of compound interest is 6%.</text:p>
          <text:p text:style-name="P97"/>
        </text:list-header>
      </text:list>
      <text:p text:style-name="P31"/>
      <text:list xml:id="list224925243040211" text:continue-numbering="true" text:style-name="L3">
        <text:list-header>
          <text:p text:style-name="P163">47<text:span text:style-name="T110"> (A)</text:span></text:p>
          <text:p text:style-name="P225"><text:span text:style-name="T43">A power station is to supply three region of load</text:span><text:span text:style-name="T45"> </text:span><text:span text:style-name="T43">hose peak loads are 20 MW, 15 MW and 25 MW. The annual load</text:span><text:span text:style-name="T45"> </text:span><text:span text:style-name="T43">factor is 50% and the diversity factor of t</text:span><text:span text:style-name="T45">he</text:span><text:span text:style-name="T43"> load at the station is 1.5.</text:span><text:span text:style-name="T45"> </text:span><text:span text:style-name="T43">Determine the follow</text:span><text:span text:style-name="T45">i</text:span><text:span text:style-name="T43">ng:</text:span></text:p>
          <text:p text:style-name="P202">(a) Maximum demand on the station,</text:p>
          <text:p text:style-name="P226"><text:span text:style-name="T43">(</text:span><text:span text:style-name="T45">b</text:span><text:span text:style-name="T43">) Installed capacity suggesting number of unit.</text:span></text:p>
          <text:p text:style-name="P202">(c) Annual energy supplied.</text:p>
          <text:p text:style-name="P202"/>
          <text:p text:style-name="P204">(B)<text:span text:style-name="T92">Determine the height of chimney to gel net</text:span><text:span text:style-name="T112"> </text:span><text:span text:style-name="T92">draught of 1</text:span><text:span text:style-name="T111">4</text:span><text:span text:style-name="T92"> mm if the total draft losses are </text:span><text:span text:style-name="T111">5 </text:span><text:span text:style-name="T92">mm. The temperature</text:span><text:span text:style-name="T112"> </text:span><text:span text:style-name="T92">of air is </text:span><text:span text:style-name="T111">30</text:span><text:span text:style-name="T27">o</text:span><text:span text:style-name="T92">C and the temperature of chimney gases is </text:span><text:span text:style-name="T111">2</text:span><text:span text:style-name="T92">0</text:span><text:span text:style-name="T27">o</text:span><text:span text:style-name="T92">C. The</text:span><text:span text:style-name="T112"> </text:span><text:span text:style-name="T92">m</text:span><text:span text:style-name="T112">a</text:span><text:span text:style-name="T92">ss of air used per kg of fuel used is 18 kg. One kg of</text:span><text:span text:style-name="T112"> </text:span><text:span text:style-name="T92">air occupies</text:span><text:span text:style-name="T112"> </text:span><text:span text:style-name="T92">a vol</text:span><text:span text:style-name="T112">u</text:span><text:span text:style-name="T92">me of 0. 7734</text:span><text:span text:style-name="T112"> m</text:span><text:span text:style-name="T28">3</text:span><text:span text:style-name="T92"> at N.T.P.</text:span></text:p>
          <text:p text:style-name="P113"/>
          <text:p text:style-name="P202"/>
          <text:p text:style-name="P163">48<text:span text:style-name="T110"> (A)</text:span></text:p>
          <text:p text:style-name="P225"><text:span text:style-name="T47">T</text:span><text:span text:style-name="T46">he load of a residential consumer for a day was</text:span><text:span text:style-name="T47"> </text:span><text:span text:style-name="T46">found to be as follows:</text:span></text:p>
          <text:p text:style-name="P205"/>
          <text:p text:style-name="P227"><text:span text:style-name="T46">From 12.00 midnight to 6A.M.</text:span><text:span text:style-name="T47"><text:tab/><text:tab/></text:span><text:span text:style-name="T46">No load</text:span></text:p>
          <text:p text:style-name="P227"><text:span text:style-name="T46">From 6A.M. to 8A.M.</text:span><text:span text:style-name="T47"><text:tab/><text:tab/><text:tab/><text:tab/></text:span><text:span text:style-name="T46">120W</text:span></text:p>
          <text:p text:style-name="P227"><text:span text:style-name="T46">From 6A.M. to 9.30A.M.</text:span><text:span text:style-name="T47"><text:tab/><text:tab/><text:tab/></text:span><text:span text:style-name="T46">540 W</text:span></text:p>
          <text:p text:style-name="P227"><text:span text:style-name="T46">From 9</text:span><text:span text:style-name="T47">.</text:span><text:span text:style-name="T46">30A.M. to 11.30A.M.</text:span><text:span text:style-name="T47"><text:tab/><text:tab/></text:span><text:span text:style-name="T46">No load</text:span></text:p>
          <text:p text:style-name="P227"><text:span text:style-name="T46">From 11</text:span><text:span text:style-name="T47">.</text:span><text:span text:style-name="T46">30A.M. to</text:span><text:span text:style-name="T47"> </text:span><text:span text:style-name="T46">2P.M.</text:span><text:span text:style-name="T47"><text:tab/><text:tab/><text:tab/></text:span><text:span text:style-name="T46">480W</text:span></text:p>
          <text:p text:style-name="P227"><text:span text:style-name="T46">From 2 P.M. to 3.30 P.M.</text:span><text:span text:style-name="T47"><text:tab/><text:tab/><text:tab/></text:span><text:span text:style-name="T46">No load</text:span></text:p>
          <text:p text:style-name="P227"><text:span text:style-name="T46">From 3.30 P.M. to 5P.M.</text:span><text:span text:style-name="T47"><text:tab/><text:tab/><text:tab/></text:span><text:span text:style-name="T46">120 W</text:span></text:p>
          <text:p text:style-name="P227"><text:span text:style-name="T46">From 5 P.M. to 6.30 P.M.</text:span><text:span text:style-name="T47"><text:tab/><text:tab/><text:tab/></text:span><text:span text:style-name="T46">360 W</text:span></text:p>
          <text:p text:style-name="P227"><text:span text:style-name="T46">From 6.30 A.M. to 9A.M.</text:span><text:span text:style-name="T47"><text:tab/><text:tab/><text:tab/></text:span><text:span text:style-name="T46">480 W</text:span></text:p>
          <text:p text:style-name="P226"><text:span text:style-name="T47">From 9P.M. to 12 midnight<text:tab/><text:tab/><text:tab/></text:span><text:span text:style-name="T46">120 W</text:span></text:p>
          <text:p text:style-name="P206">Calculate</text:p>
          <text:p text:style-name="P206">(a) Energy consumed</text:p>
          <text:p text:style-name="P206">(b) Load factor.</text:p>
        </text:list-header>
      </text:list>
      <text:p text:style-name="P46"/>
      <text:p text:style-name="P58"><text:soft-page-break/>(B)<text:span text:style-name="T99">A plant costing Rs </text:span><text:span text:style-name="T98">1</text:span><text:span text:style-name="T111">75</text:span><text:span text:style-name="T99">,000 has a useful life of </text:span><text:span text:style-name="T111">120</text:span><text:span text:style-name="T99">years. Find the amount which should</text:span><text:span text:style-name="T31"> </text:span><text:span text:style-name="T99">be saved annually to replace the equipment at the end of that time (a) by the straight-line</text:span><text:span text:style-name="T31"> </text:span><text:span text:style-name="T99">method, and (b) by the</text:span><text:span text:style-name="T31"> </text:span><text:span text:style-name="T99">sinking-fund method if the annual rate of compound interest is</text:span><text:span text:style-name="T31"> </text:span><text:span text:style-name="T111">5</text:span><text:span text:style-name="T99">%. Assume that the salvage value of the equipment is Rs </text:span><text:span text:style-name="T111">50</text:span><text:span text:style-name="T99">000.</text:span></text:p>
      <text:list xml:id="list224925441462837" text:continue-numbering="true" text:style-name="L3">
        <text:list-header>
          <text:p text:style-name="P207"/>
          <text:p text:style-name="P163">49<text:span text:style-name="T95"> (A)</text:span></text:p>
          <text:p text:style-name="P225"><text:span text:style-name="T48">An input-output curve of a 10 MW station is</text:span><text:span text:style-name="T49"> </text:span><text:span text:style-name="T48">expressed as follows:</text:span></text:p>
          <text:p text:style-name="P228"><text:span text:style-name="T49">I </text:span><text:span text:style-name="T48">= 10</text:span><text:span text:style-name="T14">6</text:span><text:span text:style-name="T48">(I6+8L+0.4L</text:span><text:span text:style-name="T14">2</text:span><text:span text:style-name="T80">)</text:span></text:p>
          <text:p text:style-name="P208">where I is in kcal per hour and L is in mega watts.</text:p>
          <text:p text:style-name="P228"><text:span text:style-name="T48">(</text:span><text:span text:style-name="T73">i</text:span><text:span text:style-name="T48">) Without plotting any curve find the load at which the</text:span><text:span text:style-name="T49"> </text:span><text:span text:style-name="T48">maximum efficiency occurs.</text:span></text:p>
          <text:p text:style-name="P228"><text:span text:style-name="T48">(</text:span><text:span text:style-name="T73">ii</text:span><text:span text:style-name="T48">) Find the increase in input required to increase station</text:span><text:span text:style-name="T49"> </text:span><text:span text:style-name="T48">output from 3 to 5 M</text:span><text:span text:style-name="T49">W</text:span><text:span text:style-name="T48"> by means of the input-output curve</text:span><text:span text:style-name="T49"> </text:span><text:span text:style-name="T48">and also by incremental rate curve.</text:span></text:p>
        </text:list-header>
      </text:list>
      <text:p text:style-name="P209"/>
      <text:list xml:id="list224924709945930" text:continue-numbering="true" text:style-name="L3">
        <text:list-header>
          <text:p text:style-name="P98"/>
          <text:p text:style-name="P98"><text:span text:style-name="T87">(</text:span><text:span text:style-name="T95">B</text:span><text:span text:style-name="T87">)</text:span><text:span text:style-name="T48">The capital cost of a power generating equipment in a steam power</text:span><text:span text:style-name="T12"> </text:span><text:span text:style-name="T48">plant is Rs 80 </text:span><text:span text:style-name="T12">*</text:span><text:span text:style-name="T48">10</text:span><text:span text:style-name="T22"> 6</text:span><text:span text:style-name="T48"> . The useful life of the plant is 30 years and its</text:span><text:span text:style-name="T12"> </text:span><text:span text:style-name="T48">salvage value is 5%</text:span><text:span text:style-name="T12"> </text:span><text:span text:style-name="T48">of the capital cost. Determine by the sinking-fund method the amount of money to be</text:span><text:span text:style-name="T12"> </text:span><text:span text:style-name="T48">saved annually for replacement if the yearly rate of compound interest is 6%.</text:span></text:p>
          <text:p text:style-name="P208"/>
          <text:p text:style-name="P210"/>
          <text:p text:style-name="P163">5<text:span text:style-name="T110">0(</text:span><text:span text:style-name="T111">A</text:span><text:span text:style-name="T110">)</text:span></text:p>
          <text:p text:style-name="P244"><text:span text:style-name="T51">The incremental fuel costs of two generating</text:span><text:span text:style-name="T42"> </text:span><text:span text:style-name="T51">units A and B of a power station are given by the following expressions:</text:span></text:p>
          <text:p text:style-name="P245"><text:span text:style-name="T51">dF</text:span><text:span text:style-name="T8">A</text:span><text:span text:style-name="T78">/d</text:span><text:span text:style-name="T51">P</text:span><text:span text:style-name="T8">A</text:span><text:span text:style-name="T51">=0.01 P</text:span><text:span text:style-name="T8">A</text:span><text:span text:style-name="T51">+2.25</text:span></text:p>
          <text:p text:style-name="P245"><text:span text:style-name="T79">dF</text:span><text:span text:style-name="T7">B</text:span><text:span text:style-name="T79">/dP</text:span><text:span text:style-name="T7">B</text:span><text:span text:style-name="T48"> =</text:span><text:span text:style-name="T50"> </text:span><text:span text:style-name="T48">0.</text:span><text:span text:style-name="T50">0</text:span><text:span text:style-name="T42">15</text:span><text:span text:style-name="T48">P</text:span><text:span text:style-name="T7">B</text:span><text:span text:style-name="T48">+1</text:span><text:span text:style-name="T42">.5</text:span></text:p>
          <text:p text:style-name="P245"><text:span text:style-name="T51">where F is in rupees per hour and P it is MW. Determine incremental</text:span><text:span text:style-name="T42"> </text:span><text:span text:style-name="T51">fuel cost and loading schedule for minimum cost if the total load to</text:span><text:span text:style-name="T42"> </text:span><text:span text:style-name="T51">be</text:span><text:span text:style-name="T42"> s</text:span><text:span text:style-name="T51">upplied is to be 50 MW 175 MW and 200MW. Both units operate</text:span><text:span text:style-name="T42"> </text:span><text:span text:style-name="T51">at all times and maximum and minimum load on each unit is to be</text:span><text:span text:style-name="T42"> </text:span><text:span text:style-name="T51">100 MW and 15 MW respectively.</text:span></text:p>
          <text:p text:style-name="P211"/>
        </text:list-header>
      </text:list>
      <text:p text:style-name="P60"><text:span text:style-name="T51">(</text:span><text:span text:style-name="T75">B</text:span><text:span text:style-name="T42">)</text:span><text:span text:style-name="T62">The incremental fuel costs for two generating units A and B of a power plant are given</text:span><text:span text:style-name="T76"> </text:span><text:span text:style-name="T62">by the following relations:</text:span></text:p>
      <text:list xml:id="list224924904829595" text:continue-list="list224924745810034" text:style-name="L1">
        <text:list-header>
          <text:p text:style-name="P91">dF<text:span text:style-name="T6">A </text:span>/dP<text:span text:style-name="T6">A</text:span> = 0.0<text:span text:style-name="T111">5</text:span> P<text:span text:style-name="T6">A</text:span> + 11<text:span text:style-name="T111">.5</text:span></text:p>
          <text:p text:style-name="P91">dF<text:span text:style-name="T6">B </text:span>/dP<text:span text:style-name="T6">B </text:span>= 0.07<text:span text:style-name="T111">5</text:span> P<text:span text:style-name="T6">B</text:span> + 10<text:span text:style-name="T111">.5</text:span></text:p>
          <text:p text:style-name="P91">where P is the power in MW and F is the fuel cost in rupees per hour.</text:p>
        </text:list-header>
      </text:list>
      <text:p text:style-name="P17"><text:soft-page-break/><text:span text:style-name="T42"><text:s/>Find the net increase in fuel cost per hour if the load is equally</text:span><text:span text:style-name="T29"> </text:span><text:span text:style-name="T42">shared by the two</text:span><text:span text:style-name="T29"> </text:span><text:span text:style-name="T42">units.</text:span></text:p>
      <text:list xml:id="list224923752748636" text:continue-list="list224924709945930" text:style-name="L3">
        <text:list-header>
          <text:p text:style-name="P211"/>
          <text:p text:style-name="P212"/>
          <text:p text:style-name="P163">5<text:span text:style-name="T110">1</text:span><text:span text:style-name="T95">(a)</text:span></text:p>
          <text:p text:style-name="P244"><text:span text:style-name="T52">In a power distribution system a certain feeder</text:span><text:span text:style-name="T53"> </text:span><text:span text:style-name="T52">supplies three distribution transformers each one supplying a group</text:span><text:span text:style-name="T53"> </text:span><text:span text:style-name="T52">of transformers whose connected loads are as follows:</text:span></text:p>
        </text:list-header>
      </text:list>
      <table:table table:name="Table19" table:style-name="Table19">
        <table:table-column table:style-name="Table19.A" table:number-columns-repeated="3"/>
        <table:table-row table:style-name="TableLine94879867019120">
          <table:table-cell table:style-name="Table19.A1" office:value-type="string">
            <text:p text:style-name="P82">Transformer I</text:p>
            <text:p text:style-name="P82">Store lighting and Power</text:p>
          </table:table-cell>
          <table:table-cell table:style-name="Table19.A1" office:value-type="string">
            <text:p text:style-name="P82">Transformer 2</text:p>
            <text:p text:style-name="P82">Residence Lighting</text:p>
          </table:table-cell>
          <table:table-cell table:style-name="Table19.C1" office:value-type="string">
            <text:p text:style-name="P82">Transformer 3</text:p>
            <text:p text:style-name="P82">General Power ser<text:span text:style-name="T81">v</text:span>ice<text:span text:style-name="T81"> and Commercial lighting</text:span></text:p>
          </table:table-cell>
        </table:table-row>
        <table:table-row table:style-name="TableLine94879838571584">
          <table:table-cell table:style-name="Table19.A2" office:value-type="string">
            <text:p text:style-name="P82">(j)<text:span text:style-name="T81">10 </text:span>RW,<text:span text:style-name="T81"> </text:span>5<text:span text:style-name="T81"> </text:span>H.P. </text:p>
            <text:p text:style-name="P83"><text:span text:style-name="T81">(ii)4 </text:span>kW </text:p>
          </table:table-cell>
          <table:table-cell table:style-name="Table19.A2" office:value-type="string">
            <text:p text:style-name="P84">(i)0.5kW</text:p>
            <text:p text:style-name="P84">(ii)20kW</text:p>
          </table:table-cell>
          <table:table-cell table:style-name="Table19.C2" office:value-type="string">
            <text:p text:style-name="P85">(i)10 H.P., 5 kW</text:p>
            <text:p text:style-name="P85">(ii)15 H.P.</text:p>
          </table:table-cell>
        </table:table-row>
      </table:table>
      <text:list xml:id="list224924923090440" text:continue-numbering="true" text:style-name="L3">
        <text:list-header>
          <text:p text:style-name="P246"><text:span text:style-name="T52">Assuming motor efficiency 70% and suitable demand factor and</text:span><text:span text:style-name="T54"> </text:span><text:span text:style-name="T52">diversity factor</text:span><text:span text:style-name="T60">s,</text:span><text:span text:style-name="T52"> Calculate maximum feeder</text:span><text:span text:style-name="T54"> </text:span><text:span text:style-name="T52">load.</text:span></text:p>
        </text:list-header>
      </text:list>
      <text:p text:style-name="P47"/>
      <text:p text:style-name="P49">(b)<text:span text:style-name="T34">The maximum demand of a power station is 26,000 kW and daily load curve is described as</text:span><text:span text:style-name="T36"> </text:span><text:span text:style-name="T34">follows:</text:span></text:p>
      <table:table table:name="Table4" table:style-name="Table4">
        <table:table-column table:style-name="Table4.A" table:number-columns-repeated="6"/>
        <table:table-column table:style-name="Table4.G"/>
        <table:table-row table:style-name="TableLine94879879521008">
          <table:table-cell table:style-name="Table4.A1" office:value-type="string">
            <text:p text:style-name="P64">Time (h)</text:p>
          </table:table-cell>
          <table:table-cell table:style-name="Table4.A1" office:value-type="string">
            <text:p text:style-name="P64">0-4</text:p>
          </table:table-cell>
          <table:table-cell table:style-name="Table4.A1" office:value-type="string">
            <text:p text:style-name="P64">4-8</text:p>
          </table:table-cell>
          <table:table-cell table:style-name="Table4.A1" office:value-type="string">
            <text:p text:style-name="P64">8-12</text:p>
          </table:table-cell>
          <table:table-cell table:style-name="Table4.A1" office:value-type="string">
            <text:p text:style-name="P64">12-16</text:p>
          </table:table-cell>
          <table:table-cell table:style-name="Table4.A1" office:value-type="string">
            <text:p text:style-name="P64">16-20</text:p>
          </table:table-cell>
          <table:table-cell table:style-name="Table4.G1" office:value-type="string">
            <text:p text:style-name="P64">22-24</text:p>
          </table:table-cell>
        </table:table-row>
        <table:table-row table:style-name="TableLine94879847183776">
          <table:table-cell table:style-name="Table4.A2" office:value-type="string">
            <text:p text:style-name="P64">Load (MW)</text:p>
          </table:table-cell>
          <table:table-cell table:style-name="Table4.A2" office:value-type="string">
            <text:p text:style-name="P64">8</text:p>
          </table:table-cell>
          <table:table-cell table:style-name="Table4.A2" office:value-type="string">
            <text:p text:style-name="P64">15</text:p>
          </table:table-cell>
          <table:table-cell table:style-name="Table4.A2" office:value-type="string">
            <text:p text:style-name="P64">28</text:p>
          </table:table-cell>
          <table:table-cell table:style-name="Table4.A2" office:value-type="string">
            <text:p text:style-name="P64">15</text:p>
          </table:table-cell>
          <table:table-cell table:style-name="Table4.A2" office:value-type="string">
            <text:p text:style-name="P64">42</text:p>
          </table:table-cell>
          <table:table-cell table:style-name="Table4.G2" office:value-type="string">
            <text:p text:style-name="P64">8</text:p>
          </table:table-cell>
        </table:table-row>
      </table:table>
      <text:list xml:id="list224925224007096" text:continue-list="list224925110586575" text:style-name="L6">
        <text:list-header>
          <text:p text:style-name="P186"><text:span text:style-name="T36">(i) </text:span>Determine the load factor</text:p>
        </text:list-header>
      </text:list>
      <text:p text:style-name="P25">(ii)<text:span text:style-name="T36"> </text:span>What is the load factor of stand by equipment rated at 8 MW that takes up all load in<text:span text:style-name="T36"> </text:span>excess of 15 MW. Calculate use factor also.</text:p>
      <text:p text:style-name="P47"/>
      <text:p text:style-name="P47"/>
      <text:list xml:id="list224923566128785" text:continue-list="list224924923090440" text:style-name="L3">
        <text:list-header>
          <text:p text:style-name="P163">5<text:span text:style-name="T110">2(a)</text:span></text:p>
          <text:p text:style-name="P213">A power station has to supply loud as follows:</text:p>
        </text:list-header>
      </text:list>
      <table:table table:name="Table20" table:style-name="Table20">
        <table:table-column table:style-name="Table20.A" table:number-columns-repeated="5"/>
        <table:table-column table:style-name="Table20.F"/>
        <table:table-row table:style-name="TableLine94879799156800">
          <table:table-cell table:style-name="Table20.A1" office:value-type="string">
            <text:p text:style-name="P85">Time (h)</text:p>
          </table:table-cell>
          <table:table-cell table:style-name="Table20.A1" office:value-type="string">
            <text:p text:style-name="P85">0-6</text:p>
          </table:table-cell>
          <table:table-cell table:style-name="Table20.A1" office:value-type="string">
            <text:p text:style-name="P85">6-12</text:p>
          </table:table-cell>
          <table:table-cell table:style-name="Table20.A1" office:value-type="string">
            <text:p text:style-name="P85">12-14</text:p>
          </table:table-cell>
          <table:table-cell table:style-name="Table20.A1" office:value-type="string">
            <text:p text:style-name="P85">14-18</text:p>
          </table:table-cell>
          <table:table-cell table:style-name="Table20.F1" office:value-type="string">
            <text:p text:style-name="P85">18-24</text:p>
          </table:table-cell>
        </table:table-row>
        <table:table-row table:style-name="TableLine94879811150544">
          <table:table-cell table:style-name="Table20.A2" office:value-type="string">
            <text:p text:style-name="P85">Load (MW)</text:p>
          </table:table-cell>
          <table:table-cell table:style-name="Table20.A2" office:value-type="string">
            <text:p text:style-name="P85">30</text:p>
          </table:table-cell>
          <table:table-cell table:style-name="Table20.A2" office:value-type="string">
            <text:p text:style-name="P85">90</text:p>
          </table:table-cell>
          <table:table-cell table:style-name="Table20.A2" office:value-type="string">
            <text:p text:style-name="P85">60</text:p>
          </table:table-cell>
          <table:table-cell table:style-name="Table20.A2" office:value-type="string">
            <text:p text:style-name="P85">100</text:p>
          </table:table-cell>
          <table:table-cell table:style-name="Table20.F2" office:value-type="string">
            <text:p text:style-name="P85">50</text:p>
          </table:table-cell>
        </table:table-row>
      </table:table>
      <text:list xml:id="list224924675067024" text:continue-numbering="true" text:style-name="L3">
        <text:list-header>
          <text:p text:style-name="P212">(a) Draw the load curve.</text:p>
          <text:p text:style-name="P212">(b) Draw load-duration curve.</text:p>
          <text:p text:style-name="P212">(c) Choose suitable generating units to supply the load.</text:p>
          <text:p text:style-name="P212">(d) Calculate load factor.</text:p>
          <text:p text:style-name="P212">(e) Calculate plant capacity.</text:p>
        </text:list-header>
      </text:list>
      <text:p text:style-name="P47"/>
      <text:p text:style-name="P59">(b)<text:span text:style-name="T92">Determine the height of chimney to gel net</text:span><text:span text:style-name="T112"> </text:span><text:span text:style-name="T92">draught of 1</text:span>5<text:span text:style-name="T92"> mm if the total draft losses are </text:span>5<text:span text:style-name="T92">mm. The temperature</text:span><text:span text:style-name="T112"> </text:span><text:span text:style-name="T92">of air is 2</text:span>7<text:span text:style-name="T27">o</text:span><text:span text:style-name="T92">C and the temperature of chimney gases is 3</text:span>1<text:span text:style-name="T92">0</text:span><text:span text:style-name="T27">o</text:span><text:span text:style-name="T92">C. The</text:span><text:span text:style-name="T112"> </text:span><text:span text:style-name="T92">m</text:span><text:span text:style-name="T112">a</text:span><text:span text:style-name="T92">ss of air used per kg of fuel used is 1</text:span>9<text:span text:style-name="T92"> kg. One </text:span><text:soft-page-break/><text:span text:style-name="T92">kg of</text:span><text:span text:style-name="T112"> </text:span><text:span text:style-name="T92">air occupies</text:span><text:span text:style-name="T112"> </text:span><text:span text:style-name="T92">a vol</text:span><text:span text:style-name="T112">u</text:span><text:span text:style-name="T92">me of 0. 7734</text:span><text:span text:style-name="T112"> m</text:span><text:span text:style-name="T28">3</text:span><text:span text:style-name="T92"> at N.T.P.</text:span></text:p>
      <text:p text:style-name="P43"/>
      <text:p text:style-name="P44"/>
      <text:list xml:id="list224925517995120" text:continue-numbering="true" text:style-name="L3">
        <text:list-header>
          <text:p text:style-name="P162">5<text:span text:style-name="T110">3</text:span></text:p>
          <text:p text:style-name="P162"><text:span text:style-name="T94">(</text:span><text:span text:style-name="T110">A</text:span><text:span text:style-name="T94">)</text:span></text:p>
          <text:p text:style-name="P169">The input output curve of 100 MWpower station<text:span text:style-name="T82"> </text:span>is expressed as follo<text:span text:style-name="T82">w</text:span>s:</text:p>
          <text:p text:style-name="P170"><text:span text:style-name="T82">I </text:span>= 10<text:span text:style-name="T21">6</text:span> (100+2L +0.0004<text:span text:style-name="T82">L</text:span><text:span text:style-name="T21">3</text:span>)</text:p>
          <text:p text:style-name="P170">where I is in kcal/hr and L is in MW.</text:p>
          <text:p text:style-name="P170">Determine (<text:span text:style-name="T110">i</text:span>) Input, heat rate and efficiency when load is 40<text:span text:style-name="T82"> MW</text:span></text:p>
          <text:p text:style-name="P170">(<text:span text:style-name="T110">ii</text:span>) Load at which e ff iciency is maximum.</text:p>
        </text:list-header>
      </text:list>
      <text:p text:style-name="P44"/>
      <text:p text:style-name="P48">(<text:span text:style-name="T110">B</text:span>)</text:p>
      <text:list xml:id="list224925478507164" text:continue-numbering="true" text:style-name="L3">
        <text:list-header>
          <text:p text:style-name="P187">The peak load on a power station is 40 MW. The loads having maximum demands of 18, 12,<text:span text:style-name="T35"> </text:span>8 and 9 MW are connected to the power station. The capacity of the power station is 50 MW,<text:span text:style-name="T35"> </text:span>annual load factor is 62 per cent find,<text:span text:style-name="T35"> </text:span></text:p>
          <text:p text:style-name="P187">(i) Average load on the power station</text:p>
          <text:p text:style-name="P187">(ii) Energy supplied per yea<text:span text:style-name="T35">r</text:span></text:p>
          <text:p text:style-name="P187">(iii) Demand factor</text:p>
          <text:p text:style-name="P187">(iv) Diversity factor</text:p>
        </text:list-header>
      </text:list>
      <text:p text:style-name="P48"/>
      <text:list xml:id="list224924451107167" text:continue-numbering="true" text:style-name="L3">
        <text:list-header>
          <text:p text:style-name="P119"><text:span text:style-name="T113">54</text:span><text:span text:style-name="T95"> (a)</text:span></text:p>
          <text:p text:style-name="P115">The peak load on a power plant is 60 MW. The loads having maximum demands of 30 MW, 20 MW, 10 MW and 14 MW are connected to the power plant. The capacity of the power plant is 80MW and the annual load factor is 0.50. Estimate (a) the average load on the power plant, (b) the energy supplied per year, (c) the demand factor, (d) the diversity factor.</text:p>
        </text:list-header>
      </text:list>
      <text:p text:style-name="P117"/>
      <text:list xml:id="list224925354745764" text:continue-numbering="true" text:style-name="L3">
        <text:list-header>
          <text:p text:style-name="P108"><text:span text:style-name="T57"><text:s text:c="2"/>(b)</text:span><text:span text:style-name="T92">Determine the height of chimney to produce a</text:span><text:span text:style-name="T97"> </text:span><text:span text:style-name="T92">static draught of 2</text:span><text:span text:style-name="T57">5</text:span><text:span text:style-name="T92"> mm of water if the mean fl</text:span><text:span text:style-name="T97">u</text:span><text:span text:style-name="T92">e gas temperature</text:span><text:span text:style-name="T97"> </text:span><text:span text:style-name="T92">in a chimney is </text:span><text:span text:style-name="T57">310</text:span><text:span text:style-name="T23">o</text:span><text:span text:style-name="T92">C and ambient temperature in boiler house is</text:span><text:span text:style-name="T97"> </text:span><text:span text:style-name="T92">20</text:span><text:span text:style-name="T23">o</text:span><text:span text:style-name="T92">C. <text:s/>Assume</text:span><text:span text:style-name="T97"> </text:span><text:span text:style-name="T92">barometer reading as</text:span><text:span text:style-name="T97"> </text:span><text:span text:style-name="T92">760 mm of</text:span><text:span text:style-name="T97"> m</text:span><text:span text:style-name="T92">ercury.</text:span></text:p>
          <text:p text:style-name="P214">(a) Annual load factor</text:p>
          <text:p text:style-name="P230"><text:span text:style-name="T57">(</text:span><text:span text:style-name="T58">b</text:span><text:span text:style-name="T57">) Plant use factor</text:span></text:p>
          <text:p text:style-name="P214">(c) Capacity factor.</text:p>
        </text:list-header>
      </text:list>
      <text:p text:style-name="P26"/>
      <text:list xml:id="list224924116151708" text:continue-numbering="true" text:style-name="L3">
        <text:list-header>
          <text:p text:style-name="P163">5<text:span text:style-name="T110">5</text:span><text:span text:style-name="T95">(a)</text:span></text:p>
          <text:p text:style-name="P126">The maximum (peak) load on a thermal power plant of 60 MW capacity is 50 MW at an annual load factor of 50%. The loads having maximum <text:soft-page-break/>demands of25 MW, 20 MW, 8 MW and 5 M are connected to the power station. Determine : (a) Average load on power station (b) Energy generated per year (c) Demand factor (d) Diversity factor.</text:p>
          <text:p text:style-name="P126"/>
          <text:p text:style-name="P99"/>
          <text:p text:style-name="P100"><text:span text:style-name="T87">(b)</text:span>The capital cost of a power generating equipment in a steam power<text:span text:style-name="T12"> </text:span>plant is Rs 80 <text:span text:style-name="T12">*</text:span>10<text:span text:style-name="T13"> 6</text:span> . The useful life of the plant is 30 years and its<text:span text:style-name="T12"> </text:span>salvage value is 5%<text:span text:style-name="T12"> </text:span>of the capital cost. Determine by the sinking-fund method the amount of money to be<text:span text:style-name="T12"> </text:span>saved annually for replacement if the yearly rate of compound interest is 6%.</text:p>
          <text:p text:style-name="P114"/>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size="14pt" style:font-size-asian="12.25pt" style:font-size-complex="14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779fe3" officeooo:paragraph-rsid="00779fe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6-08-23T10:54:01.817583602</meta:creation-date>
    <dc:date>2020-12-08T22:49:22.371847509</dc:date>
    <meta:editing-duration>PT4H20M27S</meta:editing-duration>
    <meta:editing-cycles>93</meta:editing-cycles>
    <meta:generator>LibreOffice/7.0.2.2$Linux_X86_64 LibreOffice_project/3a01483fc371ab18cfca4bab0d636937da5eaf70</meta:generator>
    <meta:document-statistic meta:table-count="18" meta:image-count="0" meta:object-count="0" meta:page-count="25" meta:paragraph-count="704" meta:word-count="7093" meta:character-count="36599" meta:non-whitespace-character-count="28815"/>
  </office:meta>
</office:document-meta>
</file>